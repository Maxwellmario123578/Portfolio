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svg" manifest:media-type=""/>
  <manifest:file-entry manifest:full-path="Pictures/image3.png" manifest:media-type=""/>
  <manifest:file-entry manifest:full-path="Pictures/image4.jpg" manifest:media-type=""/>
  <manifest:file-entry manifest:full-path="Pictures/image5.jpg" manifest:media-type=""/>
  <manifest:file-entry manifest:full-path="Pictures/image6.png" manifest:media-type=""/>
  <manifest:file-entry manifest:full-path="Pictures/image7.jpg" manifest:media-type=""/>
  <manifest:file-entry manifest:full-path="Pictures/image8.png" manifest:media-type=""/>
  <manifest:file-entry manifest:full-path="Pictures/image9.jp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jpg" manifest:media-type=""/>
  <manifest:file-entry manifest:full-path="Pictures/image15.png" manifest:media-type=""/>
  <manifest:file-entry manifest:full-path="Pictures/image16.jpg" manifest:media-type=""/>
  <manifest:file-entry manifest:full-path="Pictures/image17.jpg" manifest:media-type=""/>
  <manifest:file-entry manifest:full-path="Pictures/image18.png" manifest:media-type=""/>
  <manifest:file-entry manifest:full-path="Pictures/image19.png" manifest:media-type=""/>
  <manifest:file-entry manifest:full-path="Pictures/image20.jpg" manifest:media-type=""/>
  <manifest:file-entry manifest:full-path="Pictures/image21.png" manifest:media-type=""/>
  <manifest:file-entry manifest:full-path="Pictures/image22.jpg" manifest:media-type=""/>
  <manifest:file-entry manifest:full-path="Pictures/image23.png" manifest:media-type=""/>
  <manifest:file-entry manifest:full-path="Pictures/image24.png" manifest:media-type=""/>
  <manifest:file-entry manifest:full-path="Pictures/image25.png" manifest:media-type=""/>
  <manifest:file-entry manifest:full-path="Pictures/image26.png" manifest:media-type=""/>
  <manifest:file-entry manifest:full-path="Pictures/image27.png" manifest:media-type=""/>
  <manifest:file-entry manifest:full-path="Pictures/image28.png" manifest:media-type=""/>
  <manifest:file-entry manifest:full-path="Pictures/image29.png" manifest:media-type=""/>
  <manifest:file-entry manifest:full-path="Pictures/image30.png" manifest:media-type=""/>
  <manifest:file-entry manifest:full-path="Pictures/image31.png" manifest:media-type=""/>
  <manifest:file-entry manifest:full-path="Pictures/image32.png" manifest:media-type=""/>
  <manifest:file-entry manifest:full-path="Pictures/image33.png" manifest:media-type=""/>
  <manifest:file-entry manifest:full-path="Pictures/image34.jpg" manifest:media-type=""/>
  <manifest:file-entry manifest:full-path="Pictures/image35.png" manifest:media-type=""/>
  <manifest:file-entry manifest:full-path="Pictures/image36.png" manifest:media-type=""/>
  <manifest:file-entry manifest:full-path="Pictures/image37.png" manifest:media-type=""/>
  <manifest:file-entry manifest:full-path="Pictures/image38.png" manifest:media-type=""/>
  <manifest:file-entry manifest:full-path="Pictures/image39.png" manifest:media-type=""/>
  <manifest:file-entry manifest:full-path="Pictures/image40.png" manifest:media-type=""/>
  <manifest:file-entry manifest:full-path="Pictures/image41.png" manifest:media-type=""/>
  <manifest:file-entry manifest:full-path="Pictures/image42.png" manifest:media-type=""/>
  <manifest:file-entry manifest:full-path="Pictures/image43.jpg" manifest:media-type=""/>
  <manifest:file-entry manifest:full-path="Pictures/image44.png" manifest:media-type=""/>
  <manifest:file-entry manifest:full-path="Pictures/image45.jpg" manifest:media-type=""/>
  <manifest:file-entry manifest:full-path="Pictures/image46.png" manifest:media-type=""/>
  <manifest:file-entry manifest:full-path="Pictures/image47.png" manifest:media-type=""/>
  <manifest:file-entry manifest:full-path="Pictures/image48.png" manifest:media-type=""/>
  <manifest:file-entry manifest:full-path="Pictures/image49.jpg" manifest:media-type=""/>
  <manifest:file-entry manifest:full-path="Pictures/image50.png" manifest:media-type=""/>
  <manifest:file-entry manifest:full-path="Pictures/image51.jpg" manifest:media-type=""/>
  <manifest:file-entry manifest:full-path="Pictures/image5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5">
      <style:drawing-page-properties/>
    </style:style>
    <style:style style:parent-style-name="Graphics" style:family="graphic" style:name="gr2">
      <style:graphic-properties draw:image-opacity="100%" style:repeat="stretch" draw:stroke="none" style:wrap="run-through" fo:background-color="transparent"/>
    </style:style>
    <style:style style:family="graphic" style:name="gr3">
      <style:graphic-properties draw:fill="none" draw:textarea-vertical-align="middl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9">
      <style:paragraph-properties fo:text-align="center"/>
      <style:text-properties/>
    </style:style>
    <style:style style:family="text" style:name="T1">
      <style:text-properties style:text-line-through-type="none" fo:font-family="Times New Roman" style:font-family-complex="Times New Roman" fo:font-size="21pt" style:font-size-asian="21pt" style:font-size-complex="21pt" fo:font-weight="bold"/>
    </style:style>
    <style:style style:family="graphic" style:name="gr4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0">
      <style:paragraph-properties fo:line-height="150%"/>
      <style:text-properties/>
    </style:style>
    <style:style style:family="text" style:name="T2">
      <style:text-properties style:text-line-through-type="none" fo:font-family="Times New Roman" style:font-family-complex="Times New Roman" fo:font-size="18pt" style:font-size-asian="18pt" style:font-size-complex="18pt"/>
    </style:style>
    <style:style style:family="paragraph" style:name="P11">
      <style:paragraph-properties fo:line-height="150%"/>
      <style:text-properties/>
    </style:style>
    <style:style style:family="paragraph" style:name="P12">
      <style:paragraph-properties fo:line-height="150%" fo:margin-left="17.01pt" fo:margin-right="0pt" fo:text-indent="17.01pt"/>
      <style:text-properties/>
    </style:style>
    <style:style style:family="text" style:name="T3">
      <style:text-properties style:text-line-through-type="none" fo:font-family="Times New Roman" style:font-family-complex="Times New Roman" fo:font-size="18pt" style:font-size-asian="18pt" style:font-size-complex="18pt"/>
    </style:style>
    <style:style style:family="graphic" style:name="gr5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3">
      <style:paragraph-properties/>
      <style:text-properties/>
    </style:style>
    <style:style style:family="text" style:name="T4">
      <style:text-properties style:text-line-through-type="none" fo:font-family="Times New Roman" style:font-family-complex="Times New Roman" fo:font-size="18pt" style:font-size-asian="18pt" style:font-size-complex="18pt"/>
    </style:style>
    <style:style style:family="graphic" style:name="gr6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4">
      <style:paragraph-properties/>
      <style:text-properties/>
    </style:style>
    <style:style style:family="text" style:name="T5">
      <style:text-properties style:text-line-through-type="none" fo:font-family="Times New Roman" style:font-family-complex="Times New Roman" fo:font-size="18pt" style:font-size-asian="18pt" style:font-size-complex="18pt"/>
    </style:style>
    <style:style style:parent-style-name="Graphics" style:family="graphic" style:name="gr7">
      <style:graphic-properties style:repeat="stretch" style:wrap="run-through" fo:background-color="transparent"/>
    </style:style>
    <style:style style:family="drawing-page" style:name="dp6">
      <style:drawing-page-properties/>
    </style:style>
    <style:style style:family="presentation" style:name="pr3">
      <style:graphic-properties draw:fill="none" draw:textarea-vertical-align="top" draw:auto-grow-height="true" draw:fit-to-size="false" style:shrink-to-fit="false" draw:stroke="none" style:wrap="run-through" fo:background-color="transparent"/>
    </style:style>
    <style:style style:family="paragraph" style:name="P15">
      <style:paragraph-properties/>
      <style:text-properties/>
    </style:style>
    <style:style style:family="paragraph" style:name="P16">
      <style:paragraph-properties/>
      <style:text-properties/>
    </style:style>
    <style:style style:family="drawing-page" style:name="dp9">
      <style:drawing-page-properties/>
    </style:style>
    <style:style style:family="graphic" style:name="gr8">
      <style:graphic-properties draw:fill="bitmap" draw:fill-image-name="FillImage1" style:repeat="no-repeat" draw:textarea-vertical-align="middle" draw:auto-grow-height="false" draw:auto-grow-width="false" draw:stroke="solid" svg:stroke-color="#27405E" svg:stroke-width="0.035cm" fo:clip="rect(2.06359cm, 0.518795cm, 4.7369cm, 0.582136cm)" fo:padding-top="4.025pt" fo:padding-bottom="4.025pt" fo:padding-left="7.568pt" fo:padding-right="7.568pt"/>
    </style:style>
    <style:style style:family="paragraph" style:name="P21">
      <style:paragraph-properties/>
      <style:text-properties/>
    </style:style>
    <style:style style:family="graphic" style:name="gr9">
      <style:graphic-properties draw:fill="bitmap" draw:fill-image-name="FillImage2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22">
      <style:paragraph-properties/>
      <style:text-properties/>
    </style:style>
    <style:style style:family="graphic" style:name="gr10">
      <style:graphic-properties draw:fill="bitmap" draw:fill-image-name="FillImage3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23">
      <style:paragraph-properties/>
      <style:text-properties/>
    </style:style>
    <style:style style:family="graphic" style:name="gr11">
      <style:graphic-properties draw:fill="bitmap" draw:fill-image-name="FillImage4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24">
      <style:paragraph-properties/>
      <style:text-properties/>
    </style:style>
    <style:style style:family="graphic" style:name="gr12">
      <style:graphic-properties draw:fill="bitmap" draw:fill-image-name="FillImage5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25">
      <style:paragraph-properties/>
      <style:text-properties/>
    </style:style>
    <style:style style:family="graphic" style:name="gr13">
      <style:graphic-properties draw:fill="bitmap" draw:fill-image-name="FillImage6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26">
      <style:paragraph-properties/>
      <style:text-properties/>
    </style:style>
    <style:style style:family="graphic" style:name="gr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">
      <style:paragraph-properties/>
      <style:text-properties/>
    </style:style>
    <style:style style:family="text" style:name="T6">
      <style:text-properties style:text-line-through-type="none" fo:font-size="28pt" style:font-size-asian="28pt" style:font-size-complex="28pt" fo:language="fr" fo:country="FR" fo:font-weight="bold"/>
    </style:style>
    <style:style style:family="paragraph" style:name="P28">
      <style:paragraph-properties/>
      <style:text-properties/>
    </style:style>
    <style:style style:family="text" style:name="T7">
      <style:text-properties style:text-line-through-type="none" fo:font-size="28pt" style:font-size-asian="28pt" style:font-size-complex="28pt" fo:language="fr" fo:country="FR" fo:font-weight="bold"/>
    </style:style>
    <style:style style:family="paragraph" style:name="P29">
      <style:paragraph-properties/>
      <style:text-properties/>
    </style:style>
    <style:style style:family="text" style:name="T8">
      <style:text-properties style:text-line-through-type="none" fo:font-size="28pt" style:font-size-asian="28pt" style:font-size-complex="28pt" fo:language="fr" fo:country="FR" fo:font-weight="bold"/>
    </style:style>
    <style:style style:parent-style-name="Graphics" style:family="graphic" style:name="gr15">
      <style:graphic-properties style:repeat="stretch" style:wrap="run-through" fo:background-color="transparent"/>
    </style:style>
    <style:style style:family="drawing-page" style:name="dp10">
      <style:drawing-page-properties/>
    </style:style>
    <style:style style:family="presentation" style:name="pr6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0">
      <style:paragraph-properties/>
      <style:text-properties/>
    </style:style>
    <style:style style:family="paragraph" style:name="P31">
      <style:paragraph-properties/>
      <style:text-properties/>
    </style:style>
    <style:style style:family="presentation" style:name="pr7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2">
      <style:paragraph-properties/>
      <style:text-properties/>
    </style:style>
    <style:style style:family="paragraph" style:name="P33">
      <style:paragraph-properties/>
      <style:text-properties/>
    </style:style>
    <style:style style:family="presentation" style:name="pr8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4">
      <style:paragraph-properties/>
      <style:text-properties/>
    </style:style>
    <style:style style:family="paragraph" style:name="P35">
      <style:paragraph-properties fo:text-align="right"/>
      <style:text-properties/>
    </style:style>
    <style:style style:family="text" style:name="T9">
      <style:text-properties/>
    </style:style>
    <style:style style:family="drawing-page" style:name="dp11">
      <style:drawing-page-properties/>
    </style:style>
    <style:style style:family="graphic" style:name="gr1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">
      <style:paragraph-properties/>
      <style:text-properties/>
    </style:style>
    <style:style style:family="text" style:name="T10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parent-style-name="Graphics" style:family="graphic" style:name="gr17">
      <style:graphic-properties style:repeat="stretch" draw:stroke="none" style:wrap="run-through" fo:background-color="transparent"/>
    </style:style>
    <style:style style:family="graphic" style:name="gr1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">
      <style:paragraph-properties/>
      <style:text-properties/>
    </style:style>
    <style:style style:family="text" style:name="T11">
      <style:text-properties style:text-line-through-type="none" fo:font-size="28pt" style:font-size-asian="28pt" style:font-size-complex="28pt" fo:language="fr" fo:country="FR" fo:font-weight="bold"/>
    </style:style>
    <style:style style:family="graphic" style:name="gr1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">
      <style:paragraph-properties/>
      <style:text-properties/>
    </style:style>
    <style:style style:family="text" style:name="T12">
      <style:text-properties fo:color="#000000" style:text-line-through-type="none" fo:font-family="Arial" style:font-family-complex="Arial" fo:font-size="28pt" style:font-size-asian="28pt" style:font-size-complex="28pt" fo:letter-spacing="0pt" fo:language="fr" fo:country="FR" style:text-underline-type="none" fo:font-weight="bold"/>
    </style:style>
    <style:style style:parent-style-name="Graphics" style:family="graphic" style:name="gr20">
      <style:graphic-properties style:repeat="stretch" style:wrap="run-through" fo:background-color="transparent"/>
    </style:style>
    <style:style style:family="drawing-page" style:name="dp12">
      <style:drawing-page-properties/>
    </style:style>
    <style:style style:family="presentation" style:name="pr9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9">
      <style:paragraph-properties/>
      <style:text-properties/>
    </style:style>
    <style:style style:family="paragraph" style:name="P40">
      <style:paragraph-properties/>
      <style:text-properties/>
    </style:style>
    <style:style style:family="presentation" style:name="pr10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41">
      <style:paragraph-properties/>
      <style:text-properties/>
    </style:style>
    <style:style style:family="paragraph" style:name="P42">
      <style:paragraph-properties/>
      <style:text-properties/>
    </style:style>
    <style:style style:family="presentation" style:name="pr11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43">
      <style:paragraph-properties/>
      <style:text-properties/>
    </style:style>
    <style:style style:family="paragraph" style:name="P44">
      <style:paragraph-properties fo:text-align="right"/>
      <style:text-properties/>
    </style:style>
    <style:style style:family="text" style:name="T13">
      <style:text-properties/>
    </style:style>
    <style:style style:family="drawing-page" style:name="dp13">
      <style:drawing-page-properties/>
    </style:style>
    <style:style style:family="graphic" style:name="gr21">
      <style:graphic-properties style:wrap="run-through" fo:background-color="transparent"/>
    </style:style>
    <style:style style:family="table-cell" style:name="ce1">
      <style:table-cell-properties/>
      <loext:graphic-properties draw:fill="none"/>
      <style:paragraph-properties/>
    </style:style>
    <style:style style:family="table" style:name="ta1">
      <style:table-properties style:width="14.13cm"/>
    </style:style>
    <style:style style:family="table-column" style:name="co1">
      <style:table-column-properties style:column-width="7.067cm"/>
    </style:style>
    <style:style style:family="table-column" style:name="co2">
      <style:table-column-properties style:column-width="7.067cm"/>
    </style:style>
    <style:style style:family="table-row" style:name="ro1">
      <style:graphic-properties/>
      <style:table-row-properties style:row-height="40.45pt"/>
    </style:style>
    <style:style style:family="table-cell" style:name="ce2">
      <style:table-cell-properties fo:padding-top="0.2834pt" fo:padding-bottom="0.2834pt" fo:padding-left="0.2834pt" fo:padding-right="0.2834pt"/>
      <loext:graphic-properties draw:fill-color="#EEECE1" draw:fill="solid" draw:auto-grow-height="false" draw:auto-grow-width="false" draw:stroke="solid" svg:stroke-color="#000000" svg:stroke-width="0.03493cm"/>
      <style:paragraph-properties fo:border="0.99pt solid #000000"/>
    </style:style>
    <style:style style:family="paragraph" style:name="P45">
      <style:paragraph-properties/>
      <style:text-properties/>
    </style:style>
    <style:style style:family="text" style:name="T14">
      <style:text-properties fo:color="#000000" style:text-line-through-type="none" fo:font-family="Times New Roman" style:font-family-complex="Times New Roman" fo:language="fr" fo:country="FR"/>
    </style:style>
    <style:style style:family="table-cell" style:name="ce3">
      <style:table-cell-properties fo:padding-top="0.2834pt" fo:padding-bottom="0.2834pt" fo:padding-left="0.2834pt" fo:padding-right="0.2834pt"/>
      <loext:graphic-properties draw:fill-color="#EEECE1" draw:fill="solid" draw:auto-grow-height="false" draw:auto-grow-width="false" draw:stroke="solid" svg:stroke-color="#000000" svg:stroke-width="0.03493cm"/>
      <style:paragraph-properties fo:border="0.99pt solid #000000"/>
    </style:style>
    <style:style style:family="paragraph" style:name="P46">
      <style:paragraph-properties/>
      <style:text-properties/>
    </style:style>
    <style:style style:family="text" style:name="T15">
      <style:text-properties fo:color="#000000" style:text-line-through-type="none" fo:font-family="Times New Roman" style:font-family-complex="Times New Roman" fo:language="fr" fo:country="FR"/>
    </style:style>
    <style:style style:family="table-row" style:name="ro2">
      <style:graphic-properties/>
      <style:table-row-properties style:row-height="27.95pt"/>
    </style:style>
    <style:style style:family="table-cell" style:name="ce4">
      <style:table-cell-properties fo:padding-top="0.2834pt" fo:padding-bottom="0.2834pt" fo:padding-left="0.2834pt" fo:padding-right="0.2834pt"/>
      <loext:graphic-properties draw:fill-color="#EEECE1" draw:fill="solid" draw:auto-grow-height="false" draw:auto-grow-width="false" draw:stroke="solid" svg:stroke-color="#000000" svg:stroke-width="0.03493cm"/>
      <style:paragraph-properties fo:border="0.99pt solid #000000"/>
    </style:style>
    <style:style style:family="paragraph" style:name="P47">
      <style:paragraph-properties/>
      <style:text-properties/>
    </style:style>
    <style:style style:family="text" style:name="T16">
      <style:text-properties fo:color="#000000" style:text-line-through-type="none" fo:font-family="Times New Roman" style:font-family-complex="Times New Roman" fo:language="fr" fo:country="FR"/>
    </style:style>
    <style:style style:family="table-cell" style:name="ce5">
      <style:table-cell-properties fo:padding-top="0.2834pt" fo:padding-bottom="0.2834pt" fo:padding-left="0.2834pt" fo:padding-right="0.2834pt"/>
      <loext:graphic-properties draw:fill-color="#EEECE1" draw:fill="solid" draw:auto-grow-height="false" draw:auto-grow-width="false" draw:stroke="solid" svg:stroke-color="#000000" svg:stroke-width="0.03493cm"/>
      <style:paragraph-properties fo:border="0.99pt solid #000000"/>
    </style:style>
    <style:style style:family="paragraph" style:name="P48">
      <style:paragraph-properties/>
      <style:text-properties/>
    </style:style>
    <style:style style:family="text" style:name="T17">
      <style:text-properties fo:color="#000000" style:text-line-through-type="none" fo:font-family="Times New Roman" style:font-family-complex="Times New Roman" fo:language="fr" fo:country="FR"/>
    </style:style>
    <style:style style:family="table-row" style:name="ro3">
      <style:graphic-properties/>
      <style:table-row-properties style:row-height="27.95pt"/>
    </style:style>
    <style:style style:family="table-cell" style:name="ce6">
      <style:table-cell-properties fo:padding-top="0.2834pt" fo:padding-bottom="0.2834pt" fo:padding-left="0.2834pt" fo:padding-right="0.2834pt"/>
      <loext:graphic-properties draw:fill-color="#EEECE1" draw:fill="solid" draw:auto-grow-height="false" draw:auto-grow-width="false" draw:stroke="solid" svg:stroke-color="#000000" svg:stroke-width="0.03493cm"/>
      <style:paragraph-properties fo:border="0.99pt solid #000000"/>
    </style:style>
    <style:style style:family="paragraph" style:name="P49">
      <style:paragraph-properties/>
      <style:text-properties/>
    </style:style>
    <style:style style:family="text" style:name="T18">
      <style:text-properties fo:color="#000000" style:text-line-through-type="none" fo:font-family="Times New Roman" style:font-family-complex="Times New Roman" fo:language="fr" fo:country="FR"/>
    </style:style>
    <style:style style:family="table-cell" style:name="ce7">
      <style:table-cell-properties fo:padding-top="0.2834pt" fo:padding-bottom="0.2834pt" fo:padding-left="0.2834pt" fo:padding-right="0.2834pt"/>
      <loext:graphic-properties draw:fill-color="#EEECE1" draw:fill="solid" draw:auto-grow-height="false" draw:auto-grow-width="false" draw:stroke="solid" svg:stroke-color="#000000" svg:stroke-width="0.03493cm"/>
      <style:paragraph-properties fo:border="0.99pt solid #000000"/>
    </style:style>
    <style:style style:family="paragraph" style:name="P50">
      <style:paragraph-properties/>
      <style:text-properties/>
    </style:style>
    <style:style style:family="text" style:name="T19">
      <style:text-properties fo:color="#000000" style:text-line-through-type="none" fo:font-family="Times New Roman" style:font-family-complex="Times New Roman" fo:language="fr" fo:country="FR"/>
    </style:style>
    <style:style style:family="table-row" style:name="ro4">
      <style:graphic-properties/>
      <style:table-row-properties style:row-height="40.45pt"/>
    </style:style>
    <style:style style:family="table-cell" style:name="ce8">
      <style:table-cell-properties fo:padding-top="0.2834pt" fo:padding-bottom="0.2834pt" fo:padding-left="0.2834pt" fo:padding-right="0.2834pt"/>
      <loext:graphic-properties draw:fill-color="#EEECE1" draw:fill="solid" draw:auto-grow-height="false" draw:auto-grow-width="false" draw:stroke="solid" svg:stroke-color="#000000" svg:stroke-width="0.03493cm"/>
      <style:paragraph-properties fo:border="0.99pt solid #000000"/>
    </style:style>
    <style:style style:family="paragraph" style:name="P51">
      <style:paragraph-properties/>
      <style:text-properties/>
    </style:style>
    <style:style style:family="text" style:name="T20">
      <style:text-properties fo:color="#000000" style:text-line-through-type="none" fo:font-family="Times New Roman" style:font-family-complex="Times New Roman" fo:language="fr" fo:country="FR"/>
    </style:style>
    <style:style style:family="table-cell" style:name="ce9">
      <style:table-cell-properties fo:padding-top="0.2834pt" fo:padding-bottom="0.2834pt" fo:padding-left="0.2834pt" fo:padding-right="0.2834pt"/>
      <loext:graphic-properties draw:fill-color="#EEECE1" draw:fill="solid" draw:auto-grow-height="false" draw:auto-grow-width="false" draw:stroke="solid" svg:stroke-color="#000000" svg:stroke-width="0.03493cm"/>
      <style:paragraph-properties fo:border="0.99pt solid #000000"/>
    </style:style>
    <style:style style:family="paragraph" style:name="P52">
      <style:paragraph-properties/>
      <style:text-properties/>
    </style:style>
    <style:style style:family="text" style:name="T21">
      <style:text-properties fo:color="#000000" style:text-line-through-type="none" fo:font-family="Times New Roman" style:font-family-complex="Times New Roman" fo:language="fr" fo:country="FR"/>
    </style:style>
    <style:style style:family="graphic" style:name="gr2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3">
      <style:paragraph-properties/>
      <style:text-properties/>
    </style:style>
    <style:style style:family="text" style:name="T22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2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4">
      <style:paragraph-properties/>
      <style:text-properties/>
    </style:style>
    <style:style style:family="text" style:name="T23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family="text" style:name="T24">
      <style:text-properties style:text-line-through-type="none" fo:font-family="Times New Roman" style:font-family-complex="Times New Roman" fo:font-size="18pt" style:font-size-asian="18pt" style:font-size-complex="18pt" fo:language="fr" fo:country="FR" fo:font-weight="bold"/>
    </style:style>
    <style:style style:family="text" style:name="T25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24">
      <style:graphic-properties style:repeat="stretch" style:wrap="run-through" fo:background-color="transparent"/>
    </style:style>
    <style:style style:parent-style-name="Graphics" style:family="graphic" style:name="gr25">
      <style:graphic-properties style:repeat="stretch" style:wrap="run-through" fo:background-color="transparent"/>
    </style:style>
    <style:style style:family="drawing-page" style:name="dp14">
      <style:drawing-page-properties/>
    </style:style>
    <style:style style:family="presentation" style:name="pr12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55">
      <style:paragraph-properties/>
      <style:text-properties/>
    </style:style>
    <style:style style:family="paragraph" style:name="P56">
      <style:paragraph-properties/>
      <style:text-properties/>
    </style:style>
    <style:style style:family="presentation" style:name="pr13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57">
      <style:paragraph-properties/>
      <style:text-properties/>
    </style:style>
    <style:style style:family="paragraph" style:name="P58">
      <style:paragraph-properties/>
      <style:text-properties/>
    </style:style>
    <style:style style:family="presentation" style:name="pr14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59">
      <style:paragraph-properties/>
      <style:text-properties/>
    </style:style>
    <style:style style:family="paragraph" style:name="P60">
      <style:paragraph-properties fo:text-align="right"/>
      <style:text-properties/>
    </style:style>
    <style:style style:family="text" style:name="T26">
      <style:text-properties/>
    </style:style>
    <style:style style:family="drawing-page" style:name="dp15">
      <style:drawing-page-properties/>
    </style:style>
    <style:style style:family="graphic" style:name="gr26">
      <style:graphic-properties draw:fill="bitmap" draw:fill-image-name="FillImage7" style:repeat="no-repeat" draw:textarea-vertical-align="middle" draw:auto-grow-height="false" draw:auto-grow-width="false" draw:stroke="solid" svg:stroke-color="#27405E" svg:stroke-width="0.035cm" fo:clip="rect(2.6618cm, 0.184356cm, 8.03475cm, 2.58371cm)" fo:padding-top="4.025pt" fo:padding-bottom="4.025pt" fo:padding-left="7.568pt" fo:padding-right="7.568pt"/>
    </style:style>
    <style:style style:family="paragraph" style:name="P61">
      <style:paragraph-properties/>
      <style:text-properties/>
    </style:style>
    <style:style style:family="graphic" style:name="gr27">
      <style:graphic-properties draw:fill="bitmap" draw:fill-image-name="FillImage8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62">
      <style:paragraph-properties/>
      <style:text-properties/>
    </style:style>
    <style:style style:family="graphic" style:name="gr28">
      <style:graphic-properties draw:fill="bitmap" draw:fill-image-name="FillImage9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63">
      <style:paragraph-properties/>
      <style:text-properties/>
    </style:style>
    <style:style style:family="graphic" style:name="gr29">
      <style:graphic-properties draw:fill="bitmap" draw:fill-image-name="FillImage10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64">
      <style:paragraph-properties/>
      <style:text-properties/>
    </style:style>
    <style:style style:family="graphic" style:name="gr30">
      <style:graphic-properties draw:fill="bitmap" draw:fill-image-name="FillImage11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65">
      <style:paragraph-properties/>
      <style:text-properties/>
    </style:style>
    <style:style style:family="graphic" style:name="gr31">
      <style:graphic-properties draw:fill="bitmap" draw:fill-image-name="FillImage12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66">
      <style:paragraph-properties/>
      <style:text-properties/>
    </style:style>
    <style:style style:family="graphic" style:name="gr3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7">
      <style:paragraph-properties/>
      <style:text-properties/>
    </style:style>
    <style:style style:family="text" style:name="T27">
      <style:text-properties style:text-line-through-type="none" fo:font-size="28pt" style:font-size-asian="28pt" style:font-size-complex="28pt" fo:language="fr" fo:country="FR" fo:font-weight="bold"/>
    </style:style>
    <style:style style:family="text" style:name="T28">
      <style:text-properties style:text-line-through-type="none" fo:font-size="28pt" style:font-size-asian="28pt" style:font-size-complex="28pt" fo:language="fr" fo:country="FR" fo:font-weight="bold"/>
    </style:style>
    <style:style style:parent-style-name="Graphics" style:family="graphic" style:name="gr33">
      <style:graphic-properties style:repeat="stretch" style:wrap="run-through" fo:background-color="transparent"/>
    </style:style>
    <style:style style:family="drawing-page" style:name="dp16">
      <style:drawing-page-properties/>
    </style:style>
    <style:style style:family="presentation" style:name="pr15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68">
      <style:paragraph-properties/>
      <style:text-properties/>
    </style:style>
    <style:style style:family="paragraph" style:name="P69">
      <style:paragraph-properties/>
      <style:text-properties/>
    </style:style>
    <style:style style:family="presentation" style:name="pr16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70">
      <style:paragraph-properties/>
      <style:text-properties/>
    </style:style>
    <style:style style:family="paragraph" style:name="P71">
      <style:paragraph-properties/>
      <style:text-properties/>
    </style:style>
    <style:style style:family="presentation" style:name="pr17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72">
      <style:paragraph-properties/>
      <style:text-properties/>
    </style:style>
    <style:style style:family="paragraph" style:name="P73">
      <style:paragraph-properties fo:text-align="right"/>
      <style:text-properties/>
    </style:style>
    <style:style style:family="text" style:name="T29">
      <style:text-properties/>
    </style:style>
    <style:style style:family="drawing-page" style:name="dp17">
      <style:drawing-page-properties/>
    </style:style>
    <style:style style:family="graphic" style:name="gr3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4">
      <style:paragraph-properties/>
      <style:text-properties/>
    </style:style>
    <style:style style:family="text" style:name="T30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parent-style-name="Graphics" style:family="graphic" style:name="gr35">
      <style:graphic-properties style:repeat="stretch" draw:stroke="none" style:wrap="run-through" fo:background-color="transparent"/>
    </style:style>
    <style:style style:family="graphic" style:name="gr3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5">
      <style:paragraph-properties fo:text-align="justify" fo:margin-left="22.4pt" fo:margin-right="0pt" fo:text-indent="-15.42pt"/>
      <style:text-properties/>
    </style:style>
    <style:style style:family="text" style:name="T31">
      <style:text-properties style:text-line-through-type="none" fo:font-family="Times New Roman" style:font-family-complex="Times New Roman" fo:font-size="22pt" style:font-size-asian="22pt" style:font-size-complex="22pt" fo:language="fr" fo:country="FR" fo:font-weight="bold"/>
    </style:style>
    <style:style style:family="graphic" style:name="gr3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6">
      <style:paragraph-properties fo:margin-left="29.35pt" fo:margin-right="0pt" fo:text-indent="-22.34pt"/>
      <style:text-properties/>
    </style:style>
    <style:style style:family="text" style:name="T32">
      <style:text-properties fo:color="#000000" fo:font-family="Times New Roman" style:font-family-complex="Times New Roman" fo:font-size="18pt" style:font-size-asian="18pt" style:font-size-complex="18pt" fo:language="fr" fo:country="FR" style:text-underline-type="none"/>
    </style:style>
    <style:style style:family="graphic" style:name="gr3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7">
      <style:paragraph-properties fo:text-align="justify" fo:margin-left="27.82pt" fo:text-indent="-25.82pt"/>
      <style:text-properties/>
    </style:style>
    <style:style style:family="text" style:name="T33">
      <style:text-properties style:text-line-through-type="none" fo:font-family="Times New Roman" style:font-family-complex="Times New Roman" fo:font-size="22pt" style:font-size-asian="22pt" style:font-size-complex="22pt" fo:language="fr" fo:country="FR" fo:font-weight="bold"/>
    </style:style>
    <style:style style:family="graphic" style:name="gr3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8">
      <style:paragraph-properties fo:text-align="justify" fo:margin-left="27.82pt" fo:text-indent="-25.82pt"/>
      <style:text-properties/>
    </style:style>
    <style:style style:family="text" style:name="T34">
      <style:text-properties style:text-line-through-type="none" fo:font-family="Times New Roman" style:font-family-complex="Times New Roman" fo:font-size="22pt" style:font-size-asian="22pt" style:font-size-complex="22pt" fo:language="fr" fo:country="FR" fo:font-weight="bold"/>
    </style:style>
    <style:style style:parent-style-name="Graphics" style:family="graphic" style:name="gr40">
      <style:graphic-properties style:repeat="stretch" style:wrap="run-through" fo:background-color="transparent"/>
    </style:style>
    <style:style style:family="drawing-page" style:name="dp18">
      <style:drawing-page-properties/>
    </style:style>
    <style:style style:family="presentation" style:name="pr18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79">
      <style:paragraph-properties/>
      <style:text-properties/>
    </style:style>
    <style:style style:family="paragraph" style:name="P80">
      <style:paragraph-properties/>
      <style:text-properties/>
    </style:style>
    <style:style style:family="presentation" style:name="pr19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81">
      <style:paragraph-properties/>
      <style:text-properties/>
    </style:style>
    <style:style style:family="paragraph" style:name="P82">
      <style:paragraph-properties/>
      <style:text-properties/>
    </style:style>
    <style:style style:family="presentation" style:name="pr20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83">
      <style:paragraph-properties/>
      <style:text-properties/>
    </style:style>
    <style:style style:family="paragraph" style:name="P84">
      <style:paragraph-properties fo:text-align="right"/>
      <style:text-properties/>
    </style:style>
    <style:style style:family="text" style:name="T35">
      <style:text-properties/>
    </style:style>
    <style:style style:family="drawing-page" style:name="dp19">
      <style:drawing-page-properties/>
    </style:style>
    <style:style style:family="graphic" style:name="gr4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5">
      <style:paragraph-properties/>
      <style:text-properties/>
    </style:style>
    <style:style style:family="text" style:name="T36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4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6">
      <style:paragraph-properties fo:margin-left="29.35pt" fo:margin-right="0pt" fo:text-indent="-22.34pt"/>
      <style:text-properties/>
    </style:style>
    <style:style style:family="text" style:name="T37">
      <style:text-properties fo:color="#000000" fo:font-family="Times New Roman" style:font-family-complex="Times New Roman" fo:font-size="18pt" style:font-size-asian="18pt" style:font-size-complex="18pt" fo:language="fr" fo:country="FR" style:text-underline-type="none"/>
    </style:style>
    <style:style style:parent-style-name="Graphics" style:family="graphic" style:name="gr43">
      <style:graphic-properties style:repeat="stretch" draw:stroke="none" style:wrap="run-through" fo:background-color="transparent"/>
    </style:style>
    <style:style style:parent-style-name="Graphics" style:family="graphic" style:name="gr44">
      <style:graphic-properties style:repeat="stretch" style:wrap="run-through" fo:background-color="transparent"/>
    </style:style>
    <style:style style:family="drawing-page" style:name="dp20">
      <style:drawing-page-properties/>
    </style:style>
    <style:style style:family="presentation" style:name="pr21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87">
      <style:paragraph-properties/>
      <style:text-properties/>
    </style:style>
    <style:style style:family="paragraph" style:name="P88">
      <style:paragraph-properties/>
      <style:text-properties/>
    </style:style>
    <style:style style:family="presentation" style:name="pr22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89">
      <style:paragraph-properties/>
      <style:text-properties/>
    </style:style>
    <style:style style:family="paragraph" style:name="P90">
      <style:paragraph-properties/>
      <style:text-properties/>
    </style:style>
    <style:style style:family="presentation" style:name="pr23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91">
      <style:paragraph-properties/>
      <style:text-properties/>
    </style:style>
    <style:style style:family="paragraph" style:name="P92">
      <style:paragraph-properties fo:text-align="right"/>
      <style:text-properties/>
    </style:style>
    <style:style style:family="text" style:name="T38">
      <style:text-properties/>
    </style:style>
    <style:style style:family="drawing-page" style:name="dp21">
      <style:drawing-page-properties/>
    </style:style>
    <style:style style:family="graphic" style:name="gr4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3">
      <style:paragraph-properties/>
      <style:text-properties/>
    </style:style>
    <style:style style:family="text" style:name="T39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4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4">
      <style:paragraph-properties fo:margin-left="29.35pt" fo:margin-right="0pt" fo:text-indent="-22.34pt"/>
      <style:text-properties/>
    </style:style>
    <style:style style:family="text" style:name="T40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47">
      <style:graphic-properties style:repeat="stretch" draw:stroke="none" style:wrap="run-through" fo:background-color="transparent"/>
    </style:style>
    <style:style style:parent-style-name="Graphics" style:family="graphic" style:name="gr48">
      <style:graphic-properties style:repeat="stretch" style:wrap="run-through" fo:background-color="transparent"/>
    </style:style>
    <style:style style:family="drawing-page" style:name="dp22">
      <style:drawing-page-properties/>
    </style:style>
    <style:style style:family="presentation" style:name="pr24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95">
      <style:paragraph-properties/>
      <style:text-properties/>
    </style:style>
    <style:style style:family="paragraph" style:name="P96">
      <style:paragraph-properties/>
      <style:text-properties/>
    </style:style>
    <style:style style:family="presentation" style:name="pr25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97">
      <style:paragraph-properties/>
      <style:text-properties/>
    </style:style>
    <style:style style:family="paragraph" style:name="P98">
      <style:paragraph-properties/>
      <style:text-properties/>
    </style:style>
    <style:style style:family="presentation" style:name="pr26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99">
      <style:paragraph-properties/>
      <style:text-properties/>
    </style:style>
    <style:style style:family="paragraph" style:name="P100">
      <style:paragraph-properties fo:text-align="right"/>
      <style:text-properties/>
    </style:style>
    <style:style style:family="text" style:name="T41">
      <style:text-properties/>
    </style:style>
    <style:style style:family="drawing-page" style:name="dp23">
      <style:drawing-page-properties/>
    </style:style>
    <style:style style:family="graphic" style:name="gr4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1">
      <style:paragraph-properties/>
      <style:text-properties/>
    </style:style>
    <style:style style:family="text" style:name="T42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5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2">
      <style:paragraph-properties fo:margin-left="29.35pt" fo:margin-right="0pt" fo:text-indent="-22.34pt"/>
      <style:text-properties/>
    </style:style>
    <style:style style:family="text" style:name="T43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51">
      <style:graphic-properties style:repeat="stretch" draw:stroke="none" style:wrap="run-through" fo:background-color="transparent"/>
    </style:style>
    <style:style style:parent-style-name="Graphics" style:family="graphic" style:name="gr52">
      <style:graphic-properties style:repeat="stretch" style:wrap="run-through" fo:background-color="transparent"/>
    </style:style>
    <style:style style:family="drawing-page" style:name="dp24">
      <style:drawing-page-properties/>
    </style:style>
    <style:style style:family="presentation" style:name="pr27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03">
      <style:paragraph-properties/>
      <style:text-properties/>
    </style:style>
    <style:style style:family="paragraph" style:name="P104">
      <style:paragraph-properties/>
      <style:text-properties/>
    </style:style>
    <style:style style:family="presentation" style:name="pr28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05">
      <style:paragraph-properties/>
      <style:text-properties/>
    </style:style>
    <style:style style:family="paragraph" style:name="P106">
      <style:paragraph-properties/>
      <style:text-properties/>
    </style:style>
    <style:style style:family="presentation" style:name="pr29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07">
      <style:paragraph-properties/>
      <style:text-properties/>
    </style:style>
    <style:style style:family="paragraph" style:name="P108">
      <style:paragraph-properties fo:text-align="right"/>
      <style:text-properties/>
    </style:style>
    <style:style style:family="text" style:name="T44">
      <style:text-properties/>
    </style:style>
    <style:style style:family="drawing-page" style:name="dp25">
      <style:drawing-page-properties/>
    </style:style>
    <style:style style:family="graphic" style:name="gr5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9">
      <style:paragraph-properties/>
      <style:text-properties/>
    </style:style>
    <style:style style:family="text" style:name="T45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5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0">
      <style:paragraph-properties fo:margin-left="29.35pt" fo:margin-right="0pt" fo:text-indent="-22.34pt"/>
      <style:text-properties/>
    </style:style>
    <style:style style:family="text" style:name="T46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55">
      <style:graphic-properties style:repeat="stretch" draw:stroke="none" style:wrap="run-through" fo:background-color="transparent"/>
    </style:style>
    <style:style style:parent-style-name="Graphics" style:family="graphic" style:name="gr56">
      <style:graphic-properties style:repeat="stretch" style:wrap="run-through" fo:background-color="transparent"/>
    </style:style>
    <style:style style:family="drawing-page" style:name="dp26">
      <style:drawing-page-properties/>
    </style:style>
    <style:style style:family="presentation" style:name="pr30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11">
      <style:paragraph-properties/>
      <style:text-properties/>
    </style:style>
    <style:style style:family="paragraph" style:name="P112">
      <style:paragraph-properties/>
      <style:text-properties/>
    </style:style>
    <style:style style:family="presentation" style:name="pr31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13">
      <style:paragraph-properties/>
      <style:text-properties/>
    </style:style>
    <style:style style:family="paragraph" style:name="P114">
      <style:paragraph-properties/>
      <style:text-properties/>
    </style:style>
    <style:style style:family="presentation" style:name="pr32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15">
      <style:paragraph-properties/>
      <style:text-properties/>
    </style:style>
    <style:style style:family="paragraph" style:name="P116">
      <style:paragraph-properties fo:text-align="right"/>
      <style:text-properties/>
    </style:style>
    <style:style style:family="text" style:name="T47">
      <style:text-properties/>
    </style:style>
    <style:style style:family="drawing-page" style:name="dp27">
      <style:drawing-page-properties/>
    </style:style>
    <style:style style:family="graphic" style:name="gr5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7">
      <style:paragraph-properties/>
      <style:text-properties/>
    </style:style>
    <style:style style:family="text" style:name="T48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5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8">
      <style:paragraph-properties fo:margin-left="29.35pt" fo:margin-right="0pt" fo:text-indent="-22.34pt"/>
      <style:text-properties/>
    </style:style>
    <style:style style:family="text" style:name="T49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59">
      <style:graphic-properties style:repeat="stretch" draw:stroke="none" style:wrap="run-through" fo:background-color="transparent"/>
    </style:style>
    <style:style style:parent-style-name="Graphics" style:family="graphic" style:name="gr60">
      <style:graphic-properties style:repeat="stretch" style:wrap="run-through" fo:background-color="transparent"/>
    </style:style>
    <style:style style:family="drawing-page" style:name="dp28">
      <style:drawing-page-properties/>
    </style:style>
    <style:style style:family="presentation" style:name="pr33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19">
      <style:paragraph-properties/>
      <style:text-properties/>
    </style:style>
    <style:style style:family="paragraph" style:name="P120">
      <style:paragraph-properties/>
      <style:text-properties/>
    </style:style>
    <style:style style:family="presentation" style:name="pr34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21">
      <style:paragraph-properties/>
      <style:text-properties/>
    </style:style>
    <style:style style:family="paragraph" style:name="P122">
      <style:paragraph-properties/>
      <style:text-properties/>
    </style:style>
    <style:style style:family="presentation" style:name="pr35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23">
      <style:paragraph-properties/>
      <style:text-properties/>
    </style:style>
    <style:style style:family="paragraph" style:name="P124">
      <style:paragraph-properties fo:text-align="right"/>
      <style:text-properties/>
    </style:style>
    <style:style style:family="text" style:name="T50">
      <style:text-properties/>
    </style:style>
    <style:style style:family="drawing-page" style:name="dp29">
      <style:drawing-page-properties/>
    </style:style>
    <style:style style:family="graphic" style:name="gr61">
      <style:graphic-properties draw:fill="bitmap" draw:fill-image-name="FillImage13" style:repeat="no-repeat" draw:textarea-vertical-align="middle" draw:auto-grow-height="false" draw:auto-grow-width="false" draw:stroke="solid" svg:stroke-color="#27405E" svg:stroke-width="0.035cm" fo:clip="rect(2.03379cm, -0.106324cm, 10.7384cm, -0.0948351cm)" fo:padding-top="4.025pt" fo:padding-bottom="4.025pt" fo:padding-left="7.568pt" fo:padding-right="7.568pt"/>
    </style:style>
    <style:style style:family="paragraph" style:name="P125">
      <style:paragraph-properties/>
      <style:text-properties/>
    </style:style>
    <style:style style:family="graphic" style:name="gr62">
      <style:graphic-properties draw:fill="bitmap" draw:fill-image-name="FillImage14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126">
      <style:paragraph-properties/>
      <style:text-properties/>
    </style:style>
    <style:style style:family="graphic" style:name="gr63">
      <style:graphic-properties draw:fill="bitmap" draw:fill-image-name="FillImage15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127">
      <style:paragraph-properties/>
      <style:text-properties/>
    </style:style>
    <style:style style:family="graphic" style:name="gr64">
      <style:graphic-properties draw:fill="bitmap" draw:fill-image-name="FillImage16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128">
      <style:paragraph-properties/>
      <style:text-properties/>
    </style:style>
    <style:style style:family="graphic" style:name="gr65">
      <style:graphic-properties draw:fill="bitmap" draw:fill-image-name="FillImage17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129">
      <style:paragraph-properties/>
      <style:text-properties/>
    </style:style>
    <style:style style:family="graphic" style:name="gr66">
      <style:graphic-properties draw:fill="bitmap" draw:fill-image-name="FillImage18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130">
      <style:paragraph-properties/>
      <style:text-properties/>
    </style:style>
    <style:style style:family="graphic" style:name="gr6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1">
      <style:paragraph-properties/>
      <style:text-properties/>
    </style:style>
    <style:style style:family="text" style:name="T51">
      <style:text-properties style:text-line-through-type="none" fo:font-size="28pt" style:font-size-asian="28pt" style:font-size-complex="28pt" fo:language="fr" fo:country="FR" fo:font-weight="bold"/>
    </style:style>
    <style:style style:parent-style-name="Graphics" style:family="graphic" style:name="gr68">
      <style:graphic-properties style:repeat="stretch" style:wrap="run-through" fo:background-color="transparent"/>
    </style:style>
    <style:style style:family="drawing-page" style:name="dp30">
      <style:drawing-page-properties/>
    </style:style>
    <style:style style:family="presentation" style:name="pr36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32">
      <style:paragraph-properties/>
      <style:text-properties/>
    </style:style>
    <style:style style:family="paragraph" style:name="P133">
      <style:paragraph-properties/>
      <style:text-properties/>
    </style:style>
    <style:style style:family="presentation" style:name="pr37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34">
      <style:paragraph-properties/>
      <style:text-properties/>
    </style:style>
    <style:style style:family="paragraph" style:name="P135">
      <style:paragraph-properties/>
      <style:text-properties/>
    </style:style>
    <style:style style:family="presentation" style:name="pr38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36">
      <style:paragraph-properties/>
      <style:text-properties/>
    </style:style>
    <style:style style:family="paragraph" style:name="P137">
      <style:paragraph-properties fo:text-align="right"/>
      <style:text-properties/>
    </style:style>
    <style:style style:family="text" style:name="T52">
      <style:text-properties/>
    </style:style>
    <style:style style:family="drawing-page" style:name="dp31">
      <style:drawing-page-properties/>
    </style:style>
    <style:style style:family="graphic" style:name="gr6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8">
      <style:paragraph-properties/>
      <style:text-properties/>
    </style:style>
    <style:style style:family="text" style:name="T53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parent-style-name="Graphics" style:family="graphic" style:name="gr70">
      <style:graphic-properties style:repeat="stretch" draw:stroke="none" style:wrap="run-through" fo:background-color="transparent"/>
    </style:style>
    <style:style style:family="graphic" style:name="gr7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9">
      <style:paragraph-properties fo:margin-left="29.35pt" fo:margin-right="0pt" fo:text-indent="-22.34pt"/>
      <style:text-properties/>
    </style:style>
    <style:style style:family="text" style:name="T54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family="graphic" style:name="gr7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0">
      <style:paragraph-properties fo:margin-left="22.4pt" fo:margin-right="0pt" fo:text-indent="-15.42pt"/>
      <style:text-properties/>
    </style:style>
    <style:style style:family="text" style:name="T55">
      <style:text-properties style:text-line-through-type="none" fo:font-family="Times New Roman" style:font-family-complex="Times New Roman" fo:font-size="16pt" style:font-size-asian="16pt" style:font-size-complex="16pt" fo:language="fr" fo:country="FR"/>
    </style:style>
    <style:style style:family="paragraph" style:name="P141">
      <style:paragraph-properties fo:margin-left="6.984pt" fo:margin-right="0pt" fo:text-indent="15.42pt"/>
      <style:text-properties/>
    </style:style>
    <style:style style:family="paragraph" style:name="P142">
      <style:paragraph-properties fo:margin-left="22.4pt" fo:margin-right="0pt" fo:text-indent="-15.42pt"/>
      <style:text-properties/>
    </style:style>
    <style:style style:family="text" style:name="T56">
      <style:text-properties style:text-line-through-type="none" fo:font-family="Times New Roman" style:font-family-complex="Times New Roman" fo:font-size="16pt" style:font-size-asian="16pt" style:font-size-complex="16pt" fo:language="fr" fo:country="FR"/>
    </style:style>
    <style:style style:family="paragraph" style:name="P143">
      <style:paragraph-properties fo:margin-left="15.42pt" fo:margin-right="0pt" fo:text-indent="-15.42pt"/>
      <style:text-properties/>
    </style:style>
    <style:style style:family="paragraph" style:name="P144">
      <style:paragraph-properties fo:margin-left="46.91pt" fo:margin-right="0pt" fo:text-indent="-15.42pt"/>
      <style:text-properties/>
    </style:style>
    <style:style style:family="text" style:name="T57">
      <style:text-properties style:text-line-through-type="none" fo:font-family="Times New Roman" style:font-family-complex="Times New Roman" fo:font-size="16pt" style:font-size-asian="16pt" style:font-size-complex="16pt" fo:language="fr" fo:country="FR"/>
    </style:style>
    <style:style style:family="paragraph" style:name="P145">
      <style:paragraph-properties fo:margin-left="46.91pt" fo:margin-right="0pt" fo:text-indent="-15.42pt"/>
      <style:text-properties/>
    </style:style>
    <style:style style:family="text" style:name="T58">
      <style:text-properties style:text-line-through-type="none" fo:font-family="Times New Roman" style:font-family-complex="Times New Roman" fo:font-size="16pt" style:font-size-asian="16pt" style:font-size-complex="16pt" fo:language="fr" fo:country="FR"/>
    </style:style>
    <style:style style:family="paragraph" style:name="P146">
      <style:paragraph-properties fo:margin-left="46.91pt" fo:margin-right="0pt" fo:text-indent="-15.42pt"/>
      <style:text-properties/>
    </style:style>
    <style:style style:family="text" style:name="T59">
      <style:text-properties style:text-line-through-type="none" fo:font-family="Times New Roman" style:font-family-complex="Times New Roman" fo:font-size="16pt" style:font-size-asian="16pt" style:font-size-complex="16pt" fo:language="fr" fo:country="FR"/>
    </style:style>
    <style:style style:family="paragraph" style:name="P147">
      <style:paragraph-properties fo:margin-left="46.91pt" fo:margin-right="0pt" fo:text-indent="-15.42pt"/>
      <style:text-properties/>
    </style:style>
    <style:style style:family="text" style:name="T60">
      <style:text-properties style:text-line-through-type="none" fo:font-family="Times New Roman" style:font-family-complex="Times New Roman" fo:font-size="16pt" style:font-size-asian="16pt" style:font-size-complex="16pt" fo:language="fr" fo:country="FR"/>
    </style:style>
    <style:style style:family="paragraph" style:name="P148">
      <style:paragraph-properties fo:margin-left="46.91pt" fo:margin-right="0pt" fo:text-indent="-15.42pt"/>
      <style:text-properties/>
    </style:style>
    <style:style style:family="text" style:name="T61">
      <style:text-properties style:text-line-through-type="none" fo:font-family="Times New Roman" style:font-family-complex="Times New Roman" fo:font-size="16pt" style:font-size-asian="16pt" style:font-size-complex="16pt" fo:language="fr" fo:country="FR"/>
    </style:style>
    <style:style style:family="paragraph" style:name="P149">
      <style:paragraph-properties fo:margin-left="46.91pt" fo:margin-right="0pt" fo:text-indent="-15.42pt"/>
      <style:text-properties/>
    </style:style>
    <style:style style:family="text" style:name="T62">
      <style:text-properties style:text-line-through-type="none" fo:font-family="Times New Roman" style:font-family-complex="Times New Roman" fo:font-size="16pt" style:font-size-asian="16pt" style:font-size-complex="16pt" fo:language="fr" fo:country="FR"/>
    </style:style>
    <style:style style:family="paragraph" style:name="P150">
      <style:paragraph-properties fo:margin-left="6.984pt" fo:margin-right="0pt" fo:text-indent="15.42pt"/>
      <style:text-properties/>
    </style:style>
    <style:style style:family="paragraph" style:name="P151">
      <style:paragraph-properties fo:margin-left="22.4pt" fo:margin-right="0pt" fo:text-indent="-15.42pt"/>
      <style:text-properties/>
    </style:style>
    <style:style style:family="text" style:name="T63">
      <style:text-properties style:text-line-through-type="none" fo:font-family="Times New Roman" style:font-family-complex="Times New Roman" fo:font-size="16pt" style:font-size-asian="16pt" style:font-size-complex="16pt" fo:language="fr" fo:country="FR"/>
    </style:style>
    <style:style style:parent-style-name="Graphics" style:family="graphic" style:name="gr73">
      <style:graphic-properties style:repeat="stretch" style:wrap="run-through" fo:background-color="transparent"/>
    </style:style>
    <style:style style:family="drawing-page" style:name="dp32">
      <style:drawing-page-properties/>
    </style:style>
    <style:style style:family="presentation" style:name="pr39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52">
      <style:paragraph-properties/>
      <style:text-properties/>
    </style:style>
    <style:style style:family="paragraph" style:name="P153">
      <style:paragraph-properties/>
      <style:text-properties/>
    </style:style>
    <style:style style:family="presentation" style:name="pr40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54">
      <style:paragraph-properties/>
      <style:text-properties/>
    </style:style>
    <style:style style:family="paragraph" style:name="P155">
      <style:paragraph-properties/>
      <style:text-properties/>
    </style:style>
    <style:style style:family="presentation" style:name="pr41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56">
      <style:paragraph-properties/>
      <style:text-properties/>
    </style:style>
    <style:style style:family="paragraph" style:name="P157">
      <style:paragraph-properties fo:text-align="right"/>
      <style:text-properties/>
    </style:style>
    <style:style style:family="text" style:name="T64">
      <style:text-properties/>
    </style:style>
    <style:style style:family="drawing-page" style:name="dp33">
      <style:drawing-page-properties/>
    </style:style>
    <style:style style:family="graphic" style:name="gr7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8">
      <style:paragraph-properties/>
      <style:text-properties/>
    </style:style>
    <style:style style:family="text" style:name="T65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7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9">
      <style:paragraph-properties fo:margin-left="29.35pt" fo:margin-right="0pt" fo:text-indent="-22.34pt"/>
      <style:text-properties/>
    </style:style>
    <style:style style:family="text" style:name="T66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76">
      <style:graphic-properties style:repeat="stretch" draw:stroke="none" style:wrap="run-through" fo:background-color="transparent"/>
    </style:style>
    <style:style style:family="graphic" style:name="gr7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0">
      <style:paragraph-properties fo:margin-left="22.4pt" fo:margin-right="0pt" fo:text-indent="-15.42pt"/>
      <style:text-properties/>
    </style:style>
    <style:style style:family="text" style:name="T67">
      <style:text-properties style:text-line-through-type="none" fo:font-family="Times New Roman" style:font-family-complex="Times New Roman" fo:font-size="16pt" style:font-size-asian="16pt" style:font-size-complex="16pt" fo:language="fr" fo:country="FR"/>
    </style:style>
    <style:style style:family="paragraph" style:name="P161">
      <style:paragraph-properties fo:margin-left="6.984pt" fo:margin-right="0pt" fo:text-indent="15.42pt"/>
      <style:text-properties/>
    </style:style>
    <style:style style:family="paragraph" style:name="P162">
      <style:paragraph-properties fo:margin-left="22.4pt" fo:margin-right="0pt" fo:text-indent="-15.42pt"/>
      <style:text-properties/>
    </style:style>
    <style:style style:family="text" style:name="T68">
      <style:text-properties style:text-line-through-type="none" fo:font-family="Times New Roman" style:font-family-complex="Times New Roman" fo:font-size="16pt" style:font-size-asian="16pt" style:font-size-complex="16pt" fo:language="fr" fo:country="FR"/>
    </style:style>
    <style:style style:parent-style-name="Graphics" style:family="graphic" style:name="gr78">
      <style:graphic-properties style:repeat="stretch" style:wrap="run-through" fo:background-color="transparent"/>
    </style:style>
    <style:style style:family="drawing-page" style:name="dp34">
      <style:drawing-page-properties/>
    </style:style>
    <style:style style:family="presentation" style:name="pr42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63">
      <style:paragraph-properties/>
      <style:text-properties/>
    </style:style>
    <style:style style:family="paragraph" style:name="P164">
      <style:paragraph-properties/>
      <style:text-properties/>
    </style:style>
    <style:style style:family="presentation" style:name="pr43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65">
      <style:paragraph-properties/>
      <style:text-properties/>
    </style:style>
    <style:style style:family="paragraph" style:name="P166">
      <style:paragraph-properties/>
      <style:text-properties/>
    </style:style>
    <style:style style:family="presentation" style:name="pr44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67">
      <style:paragraph-properties/>
      <style:text-properties/>
    </style:style>
    <style:style style:family="paragraph" style:name="P168">
      <style:paragraph-properties fo:text-align="right"/>
      <style:text-properties/>
    </style:style>
    <style:style style:family="text" style:name="T69">
      <style:text-properties/>
    </style:style>
    <style:style style:family="drawing-page" style:name="dp35">
      <style:drawing-page-properties/>
    </style:style>
    <style:style style:family="graphic" style:name="gr7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9">
      <style:paragraph-properties/>
      <style:text-properties/>
    </style:style>
    <style:style style:family="text" style:name="T70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8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0">
      <style:paragraph-properties fo:margin-left="29.35pt" fo:margin-right="0pt" fo:text-indent="-22.34pt"/>
      <style:text-properties/>
    </style:style>
    <style:style style:family="text" style:name="T71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81">
      <style:graphic-properties style:repeat="stretch" draw:stroke="none" style:wrap="run-through" fo:background-color="transparent"/>
    </style:style>
    <style:style style:family="graphic" style:name="gr8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1">
      <style:paragraph-properties fo:margin-left="22.4pt" fo:margin-right="0pt" fo:text-indent="-15.42pt"/>
      <style:text-properties/>
    </style:style>
    <style:style style:family="text" style:name="T72">
      <style:text-properties style:text-line-through-type="none" fo:font-family="Times New Roman" style:font-family-complex="Times New Roman" fo:font-size="16pt" style:font-size-asian="16pt" style:font-size-complex="16pt" fo:language="fr" fo:country="FR"/>
    </style:style>
    <style:style style:family="paragraph" style:name="P172">
      <style:paragraph-properties fo:margin-left="6.984pt" fo:margin-right="0pt" fo:text-indent="15.42pt"/>
      <style:text-properties/>
    </style:style>
    <style:style style:family="paragraph" style:name="P173">
      <style:paragraph-properties fo:margin-left="22.4pt" fo:margin-right="0pt" fo:text-indent="-15.42pt"/>
      <style:text-properties/>
    </style:style>
    <style:style style:family="text" style:name="T73">
      <style:text-properties style:text-line-through-type="none" fo:font-family="Times New Roman" style:font-family-complex="Times New Roman" fo:font-size="16pt" style:font-size-asian="16pt" style:font-size-complex="16pt" fo:language="fr" fo:country="FR"/>
    </style:style>
    <style:style style:parent-style-name="Graphics" style:family="graphic" style:name="gr83">
      <style:graphic-properties style:repeat="stretch" style:wrap="run-through" fo:background-color="transparent"/>
    </style:style>
    <style:style style:family="drawing-page" style:name="dp36">
      <style:drawing-page-properties/>
    </style:style>
    <style:style style:family="presentation" style:name="pr45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74">
      <style:paragraph-properties/>
      <style:text-properties/>
    </style:style>
    <style:style style:family="paragraph" style:name="P175">
      <style:paragraph-properties/>
      <style:text-properties/>
    </style:style>
    <style:style style:family="presentation" style:name="pr46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76">
      <style:paragraph-properties/>
      <style:text-properties/>
    </style:style>
    <style:style style:family="paragraph" style:name="P177">
      <style:paragraph-properties/>
      <style:text-properties/>
    </style:style>
    <style:style style:family="presentation" style:name="pr47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78">
      <style:paragraph-properties/>
      <style:text-properties/>
    </style:style>
    <style:style style:family="paragraph" style:name="P179">
      <style:paragraph-properties fo:text-align="right"/>
      <style:text-properties/>
    </style:style>
    <style:style style:family="text" style:name="T74">
      <style:text-properties/>
    </style:style>
    <style:style style:family="drawing-page" style:name="dp37">
      <style:drawing-page-properties/>
    </style:style>
    <style:style style:family="graphic" style:name="gr8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0">
      <style:paragraph-properties/>
      <style:text-properties/>
    </style:style>
    <style:style style:family="text" style:name="T75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8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1">
      <style:paragraph-properties fo:margin-left="29.35pt" fo:margin-right="0pt" fo:text-indent="-22.34pt"/>
      <style:text-properties/>
    </style:style>
    <style:style style:family="text" style:name="T76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86">
      <style:graphic-properties style:repeat="stretch" draw:stroke="none" style:wrap="run-through" fo:background-color="transparent"/>
    </style:style>
    <style:style style:family="graphic" style:name="gr8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2">
      <style:paragraph-properties fo:margin-left="22.4pt" fo:margin-right="0pt" fo:text-indent="-15.42pt"/>
      <style:text-properties/>
    </style:style>
    <style:style style:family="text" style:name="T77">
      <style:text-properties style:text-line-through-type="none" fo:font-family="Times New Roman" style:font-family-complex="Times New Roman" fo:font-size="16pt" style:font-size-asian="16pt" style:font-size-complex="16pt" fo:language="fr" fo:country="FR"/>
    </style:style>
    <style:style style:family="paragraph" style:name="P183">
      <style:paragraph-properties fo:margin-left="15.42pt" fo:margin-right="0pt" fo:text-indent="-15.42pt"/>
      <style:text-properties/>
    </style:style>
    <style:style style:parent-style-name="Graphics" style:family="graphic" style:name="gr88">
      <style:graphic-properties style:repeat="stretch" style:wrap="run-through" fo:background-color="transparent"/>
    </style:style>
    <style:style style:family="drawing-page" style:name="dp38">
      <style:drawing-page-properties/>
    </style:style>
    <style:style style:family="presentation" style:name="pr48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84">
      <style:paragraph-properties/>
      <style:text-properties/>
    </style:style>
    <style:style style:family="paragraph" style:name="P185">
      <style:paragraph-properties/>
      <style:text-properties/>
    </style:style>
    <style:style style:family="presentation" style:name="pr49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86">
      <style:paragraph-properties/>
      <style:text-properties/>
    </style:style>
    <style:style style:family="paragraph" style:name="P187">
      <style:paragraph-properties/>
      <style:text-properties/>
    </style:style>
    <style:style style:family="presentation" style:name="pr50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88">
      <style:paragraph-properties/>
      <style:text-properties/>
    </style:style>
    <style:style style:family="paragraph" style:name="P189">
      <style:paragraph-properties fo:text-align="right"/>
      <style:text-properties/>
    </style:style>
    <style:style style:family="text" style:name="T78">
      <style:text-properties/>
    </style:style>
    <style:style style:family="drawing-page" style:name="dp39">
      <style:drawing-page-properties/>
    </style:style>
    <style:style style:family="graphic" style:name="gr8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0">
      <style:paragraph-properties/>
      <style:text-properties/>
    </style:style>
    <style:style style:family="text" style:name="T79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9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1">
      <style:paragraph-properties fo:margin-left="29.35pt" fo:margin-right="0pt" fo:text-indent="-22.34pt"/>
      <style:text-properties/>
    </style:style>
    <style:style style:family="text" style:name="T80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91">
      <style:graphic-properties style:repeat="stretch" draw:stroke="none" style:wrap="run-through" fo:background-color="transparent"/>
    </style:style>
    <style:style style:family="graphic" style:name="gr9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2">
      <style:paragraph-properties fo:margin-left="22.4pt" fo:margin-right="0pt" fo:text-indent="-15.42pt"/>
      <style:text-properties/>
    </style:style>
    <style:style style:family="text" style:name="T81">
      <style:text-properties style:text-line-through-type="none" fo:font-family="Times New Roman" style:font-family-complex="Times New Roman" fo:font-size="16pt" style:font-size-asian="16pt" style:font-size-complex="16pt" fo:language="fr" fo:country="FR"/>
    </style:style>
    <style:style style:family="paragraph" style:name="P193">
      <style:paragraph-properties fo:margin-left="6.984pt" fo:margin-right="0pt" fo:text-indent="15.42pt"/>
      <style:text-properties/>
    </style:style>
    <style:style style:family="paragraph" style:name="P194">
      <style:paragraph-properties fo:margin-left="22.4pt" fo:margin-right="0pt" fo:text-indent="-15.42pt"/>
      <style:text-properties/>
    </style:style>
    <style:style style:family="text" style:name="T82">
      <style:text-properties style:text-line-through-type="none" fo:font-family="Times New Roman" style:font-family-complex="Times New Roman" fo:font-size="16pt" style:font-size-asian="16pt" style:font-size-complex="16pt" fo:language="fr" fo:country="FR"/>
    </style:style>
    <style:style style:family="paragraph" style:name="P195">
      <style:paragraph-properties fo:margin-left="22.4pt" fo:margin-right="0pt" fo:text-indent="-15.42pt"/>
      <style:text-properties/>
    </style:style>
    <style:style style:family="paragraph" style:name="P196">
      <style:paragraph-properties fo:margin-left="22.4pt" fo:margin-right="0pt" fo:text-indent="-15.42pt"/>
      <style:text-properties/>
    </style:style>
    <style:style style:family="text" style:name="T83">
      <style:text-properties style:text-line-through-type="none" fo:font-family="Times New Roman" style:font-family-complex="Times New Roman" fo:font-size="16pt" style:font-size-asian="16pt" style:font-size-complex="16pt" fo:language="fr" fo:country="FR"/>
    </style:style>
    <style:style style:parent-style-name="Graphics" style:family="graphic" style:name="gr93">
      <style:graphic-properties style:repeat="stretch" style:wrap="run-through" fo:background-color="transparent"/>
    </style:style>
    <style:style style:family="drawing-page" style:name="dp40">
      <style:drawing-page-properties/>
    </style:style>
    <style:style style:family="presentation" style:name="pr51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97">
      <style:paragraph-properties/>
      <style:text-properties/>
    </style:style>
    <style:style style:family="paragraph" style:name="P198">
      <style:paragraph-properties/>
      <style:text-properties/>
    </style:style>
    <style:style style:family="presentation" style:name="pr52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199">
      <style:paragraph-properties/>
      <style:text-properties/>
    </style:style>
    <style:style style:family="paragraph" style:name="P200">
      <style:paragraph-properties/>
      <style:text-properties/>
    </style:style>
    <style:style style:family="presentation" style:name="pr53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01">
      <style:paragraph-properties/>
      <style:text-properties/>
    </style:style>
    <style:style style:family="paragraph" style:name="P202">
      <style:paragraph-properties fo:text-align="right"/>
      <style:text-properties/>
    </style:style>
    <style:style style:family="text" style:name="T84">
      <style:text-properties/>
    </style:style>
    <style:style style:family="drawing-page" style:name="dp41">
      <style:drawing-page-properties/>
    </style:style>
    <style:style style:family="graphic" style:name="gr94">
      <style:graphic-properties draw:fill="bitmap" draw:fill-image-name="FillImage19" style:repeat="repeat" draw:fill-image-ref-point="center" draw:fill-image-ref-point-y="0%" draw:fill-image-ref-point-x="0%" draw:fill-image-width="0inch" draw:fill-image-height="0inch" draw:textarea-vertical-align="middle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203">
      <style:paragraph-properties/>
      <style:text-properties/>
    </style:style>
    <style:style style:family="graphic" style:name="gr95">
      <style:graphic-properties draw:fill="bitmap" draw:fill-image-name="FillImage20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204">
      <style:paragraph-properties/>
      <style:text-properties/>
    </style:style>
    <style:style style:family="graphic" style:name="gr96">
      <style:graphic-properties draw:fill="bitmap" draw:fill-image-name="FillImage21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205">
      <style:paragraph-properties/>
      <style:text-properties/>
    </style:style>
    <style:style style:family="graphic" style:name="gr97">
      <style:graphic-properties draw:fill="bitmap" draw:fill-image-name="FillImage22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206">
      <style:paragraph-properties/>
      <style:text-properties/>
    </style:style>
    <style:style style:family="graphic" style:name="gr98">
      <style:graphic-properties draw:fill="bitmap" draw:fill-image-name="FillImage23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207">
      <style:paragraph-properties/>
      <style:text-properties/>
    </style:style>
    <style:style style:family="graphic" style:name="gr99">
      <style:graphic-properties draw:fill="bitmap" draw:fill-image-name="FillImage24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fo:padding-top="4.025pt" fo:padding-bottom="4.025pt" fo:padding-left="7.568pt" fo:padding-right="7.568pt"/>
    </style:style>
    <style:style style:family="paragraph" style:name="P208">
      <style:paragraph-properties/>
      <style:text-properties/>
    </style:style>
    <style:style style:family="graphic" style:name="gr10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9">
      <style:paragraph-properties/>
      <style:text-properties/>
    </style:style>
    <style:style style:family="text" style:name="T85">
      <style:text-properties style:text-line-through-type="none" fo:font-size="28pt" style:font-size-asian="28pt" style:font-size-complex="28pt" fo:language="fr" fo:country="FR" fo:font-weight="bold"/>
    </style:style>
    <style:style style:parent-style-name="Graphics" style:family="graphic" style:name="gr101">
      <style:graphic-properties style:repeat="stretch" draw:stroke="none" style:wrap="run-through" fo:background-color="transparent"/>
    </style:style>
    <style:style style:parent-style-name="Graphics" style:family="graphic" style:name="gr102">
      <style:graphic-properties style:repeat="stretch" style:wrap="run-through" fo:background-color="transparent"/>
    </style:style>
    <style:style style:family="drawing-page" style:name="dp42">
      <style:drawing-page-properties/>
    </style:style>
    <style:style style:family="presentation" style:name="pr54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10">
      <style:paragraph-properties/>
      <style:text-properties/>
    </style:style>
    <style:style style:family="paragraph" style:name="P211">
      <style:paragraph-properties/>
      <style:text-properties/>
    </style:style>
    <style:style style:family="presentation" style:name="pr55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12">
      <style:paragraph-properties/>
      <style:text-properties/>
    </style:style>
    <style:style style:family="paragraph" style:name="P213">
      <style:paragraph-properties/>
      <style:text-properties/>
    </style:style>
    <style:style style:family="presentation" style:name="pr56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14">
      <style:paragraph-properties/>
      <style:text-properties/>
    </style:style>
    <style:style style:family="paragraph" style:name="P215">
      <style:paragraph-properties fo:text-align="right"/>
      <style:text-properties/>
    </style:style>
    <style:style style:family="text" style:name="T86">
      <style:text-properties/>
    </style:style>
    <style:style style:family="drawing-page" style:name="dp43">
      <style:drawing-page-properties/>
    </style:style>
    <style:style style:family="graphic" style:name="gr10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6">
      <style:paragraph-properties/>
      <style:text-properties/>
    </style:style>
    <style:style style:family="text" style:name="T87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10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7">
      <style:paragraph-properties/>
      <style:text-properties/>
    </style:style>
    <style:style style:family="text" style:name="T88">
      <style:text-properties style:text-line-through-type="none" fo:font-size="28pt" style:font-size-asian="28pt" style:font-size-complex="28pt" fo:language="fr" fo:country="FR" fo:font-weight="bold"/>
    </style:style>
    <style:style style:family="graphic" style:name="gr10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8">
      <style:paragraph-properties/>
      <style:text-properties/>
    </style:style>
    <style:style style:family="text" style:name="T89">
      <style:text-properties style:text-line-through-type="none" fo:font-size="28pt" style:font-size-asian="28pt" style:font-size-complex="28pt" fo:language="fr" fo:country="FR" fo:font-weight="bold"/>
    </style:style>
    <style:style style:parent-style-name="Graphics" style:family="graphic" style:name="gr106">
      <style:graphic-properties style:repeat="stretch" draw:stroke="none" style:wrap="run-through" fo:background-color="transparent"/>
    </style:style>
    <style:style style:parent-style-name="Graphics" style:family="graphic" style:name="gr107">
      <style:graphic-properties style:repeat="stretch" style:wrap="run-through" fo:background-color="transparent"/>
    </style:style>
    <style:style style:family="drawing-page" style:name="dp44">
      <style:drawing-page-properties/>
    </style:style>
    <style:style style:family="presentation" style:name="pr57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19">
      <style:paragraph-properties/>
      <style:text-properties/>
    </style:style>
    <style:style style:family="paragraph" style:name="P220">
      <style:paragraph-properties/>
      <style:text-properties/>
    </style:style>
    <style:style style:family="presentation" style:name="pr58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21">
      <style:paragraph-properties/>
      <style:text-properties/>
    </style:style>
    <style:style style:family="paragraph" style:name="P222">
      <style:paragraph-properties/>
      <style:text-properties/>
    </style:style>
    <style:style style:family="presentation" style:name="pr59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23">
      <style:paragraph-properties/>
      <style:text-properties/>
    </style:style>
    <style:style style:family="paragraph" style:name="P224">
      <style:paragraph-properties fo:text-align="right"/>
      <style:text-properties/>
    </style:style>
    <style:style style:family="text" style:name="T90">
      <style:text-properties/>
    </style:style>
    <style:style style:family="drawing-page" style:name="dp45">
      <style:drawing-page-properties/>
    </style:style>
    <style:style style:family="graphic" style:name="gr10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5">
      <style:paragraph-properties/>
      <style:text-properties/>
    </style:style>
    <style:style style:family="text" style:name="T91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10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6">
      <style:paragraph-properties fo:margin-left="29.35pt" fo:margin-right="0pt" fo:text-indent="-22.34pt"/>
      <style:text-properties/>
    </style:style>
    <style:style style:family="text" style:name="T92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110">
      <style:graphic-properties style:repeat="stretch" draw:stroke="none" style:wrap="run-through" fo:background-color="transparent"/>
    </style:style>
    <style:style style:parent-style-name="Graphics" style:family="graphic" style:name="gr111">
      <style:graphic-properties style:repeat="stretch" draw:stroke="none" style:wrap="run-through" fo:background-color="transparent"/>
    </style:style>
    <style:style style:parent-style-name="Graphics" style:family="graphic" style:name="gr112">
      <style:graphic-properties style:repeat="stretch" draw:stroke="none" style:wrap="run-through" fo:background-color="transparent"/>
    </style:style>
    <style:style style:parent-style-name="Graphics" style:family="graphic" style:name="gr113">
      <style:graphic-properties style:repeat="stretch" style:wrap="run-through" fo:background-color="transparent"/>
    </style:style>
    <style:style style:family="drawing-page" style:name="dp46">
      <style:drawing-page-properties/>
    </style:style>
    <style:style style:family="presentation" style:name="pr60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27">
      <style:paragraph-properties/>
      <style:text-properties/>
    </style:style>
    <style:style style:family="paragraph" style:name="P228">
      <style:paragraph-properties/>
      <style:text-properties/>
    </style:style>
    <style:style style:family="presentation" style:name="pr61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29">
      <style:paragraph-properties/>
      <style:text-properties/>
    </style:style>
    <style:style style:family="paragraph" style:name="P230">
      <style:paragraph-properties/>
      <style:text-properties/>
    </style:style>
    <style:style style:family="presentation" style:name="pr62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31">
      <style:paragraph-properties/>
      <style:text-properties/>
    </style:style>
    <style:style style:family="paragraph" style:name="P232">
      <style:paragraph-properties fo:text-align="right"/>
      <style:text-properties/>
    </style:style>
    <style:style style:family="text" style:name="T93">
      <style:text-properties/>
    </style:style>
    <style:style style:family="drawing-page" style:name="dp47">
      <style:drawing-page-properties/>
    </style:style>
    <style:style style:family="graphic" style:name="gr1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3">
      <style:paragraph-properties/>
      <style:text-properties/>
    </style:style>
    <style:style style:family="text" style:name="T94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1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4">
      <style:paragraph-properties fo:margin-left="29.35pt" fo:margin-right="0pt" fo:text-indent="-22.34pt"/>
      <style:text-properties/>
    </style:style>
    <style:style style:family="text" style:name="T95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116">
      <style:graphic-properties style:repeat="stretch" draw:stroke="none" style:wrap="run-through" fo:background-color="transparent"/>
    </style:style>
    <style:style style:parent-style-name="Graphics" style:family="graphic" style:name="gr117">
      <style:graphic-properties style:repeat="stretch" draw:stroke="none" style:wrap="run-through" fo:background-color="transparent"/>
    </style:style>
    <style:style style:parent-style-name="Graphics" style:family="graphic" style:name="gr118">
      <style:graphic-properties style:repeat="stretch" style:wrap="run-through" fo:background-color="transparent"/>
    </style:style>
    <style:style style:family="drawing-page" style:name="dp48">
      <style:drawing-page-properties/>
    </style:style>
    <style:style style:family="presentation" style:name="pr63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35">
      <style:paragraph-properties/>
      <style:text-properties/>
    </style:style>
    <style:style style:family="paragraph" style:name="P236">
      <style:paragraph-properties/>
      <style:text-properties/>
    </style:style>
    <style:style style:family="presentation" style:name="pr64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37">
      <style:paragraph-properties/>
      <style:text-properties/>
    </style:style>
    <style:style style:family="paragraph" style:name="P238">
      <style:paragraph-properties/>
      <style:text-properties/>
    </style:style>
    <style:style style:family="presentation" style:name="pr65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39">
      <style:paragraph-properties/>
      <style:text-properties/>
    </style:style>
    <style:style style:family="paragraph" style:name="P240">
      <style:paragraph-properties fo:text-align="right"/>
      <style:text-properties/>
    </style:style>
    <style:style style:family="text" style:name="T96">
      <style:text-properties/>
    </style:style>
    <style:style style:family="drawing-page" style:name="dp49">
      <style:drawing-page-properties/>
    </style:style>
    <style:style style:family="graphic" style:name="gr11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1">
      <style:paragraph-properties/>
      <style:text-properties/>
    </style:style>
    <style:style style:family="text" style:name="T97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12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2">
      <style:paragraph-properties fo:margin-left="29.35pt" fo:margin-right="0pt" fo:text-indent="-22.34pt"/>
      <style:text-properties/>
    </style:style>
    <style:style style:family="text" style:name="T98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121">
      <style:graphic-properties style:repeat="stretch" draw:stroke="none" style:wrap="run-through" fo:background-color="transparent"/>
    </style:style>
    <style:style style:parent-style-name="Graphics" style:family="graphic" style:name="gr122">
      <style:graphic-properties style:repeat="stretch" style:wrap="run-through" fo:background-color="transparent"/>
    </style:style>
    <style:style style:family="drawing-page" style:name="dp50">
      <style:drawing-page-properties/>
    </style:style>
    <style:style style:family="presentation" style:name="pr66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43">
      <style:paragraph-properties/>
      <style:text-properties/>
    </style:style>
    <style:style style:family="paragraph" style:name="P244">
      <style:paragraph-properties/>
      <style:text-properties/>
    </style:style>
    <style:style style:family="presentation" style:name="pr67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45">
      <style:paragraph-properties/>
      <style:text-properties/>
    </style:style>
    <style:style style:family="paragraph" style:name="P246">
      <style:paragraph-properties/>
      <style:text-properties/>
    </style:style>
    <style:style style:family="presentation" style:name="pr68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47">
      <style:paragraph-properties/>
      <style:text-properties/>
    </style:style>
    <style:style style:family="paragraph" style:name="P248">
      <style:paragraph-properties fo:text-align="right"/>
      <style:text-properties/>
    </style:style>
    <style:style style:family="text" style:name="T99">
      <style:text-properties/>
    </style:style>
    <style:style style:family="drawing-page" style:name="dp51">
      <style:drawing-page-properties/>
    </style:style>
    <style:style style:family="graphic" style:name="gr12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9">
      <style:paragraph-properties/>
      <style:text-properties/>
    </style:style>
    <style:style style:family="text" style:name="T100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12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0">
      <style:paragraph-properties fo:margin-left="29.35pt" fo:margin-right="0pt" fo:text-indent="-22.34pt"/>
      <style:text-properties/>
    </style:style>
    <style:style style:family="text" style:name="T101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125">
      <style:graphic-properties style:repeat="stretch" draw:stroke="none" style:wrap="run-through" fo:background-color="transparent"/>
    </style:style>
    <style:style style:parent-style-name="Graphics" style:family="graphic" style:name="gr126">
      <style:graphic-properties style:repeat="stretch" style:wrap="run-through" fo:background-color="transparent"/>
    </style:style>
    <style:style style:family="drawing-page" style:name="dp52">
      <style:drawing-page-properties/>
    </style:style>
    <style:style style:family="presentation" style:name="pr69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51">
      <style:paragraph-properties/>
      <style:text-properties/>
    </style:style>
    <style:style style:family="paragraph" style:name="P252">
      <style:paragraph-properties/>
      <style:text-properties/>
    </style:style>
    <style:style style:family="presentation" style:name="pr70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53">
      <style:paragraph-properties/>
      <style:text-properties/>
    </style:style>
    <style:style style:family="paragraph" style:name="P254">
      <style:paragraph-properties/>
      <style:text-properties/>
    </style:style>
    <style:style style:family="presentation" style:name="pr71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55">
      <style:paragraph-properties/>
      <style:text-properties/>
    </style:style>
    <style:style style:family="paragraph" style:name="P256">
      <style:paragraph-properties fo:text-align="right"/>
      <style:text-properties/>
    </style:style>
    <style:style style:family="text" style:name="T102">
      <style:text-properties/>
    </style:style>
    <style:style style:family="drawing-page" style:name="dp53">
      <style:drawing-page-properties/>
    </style:style>
    <style:style style:family="graphic" style:name="gr12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7">
      <style:paragraph-properties/>
      <style:text-properties/>
    </style:style>
    <style:style style:family="text" style:name="T103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12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8">
      <style:paragraph-properties fo:margin-left="29.35pt" fo:margin-right="0pt" fo:text-indent="-22.34pt"/>
      <style:text-properties/>
    </style:style>
    <style:style style:family="text" style:name="T104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129">
      <style:graphic-properties style:repeat="stretch" draw:stroke="none" style:wrap="run-through" fo:background-color="transparent"/>
    </style:style>
    <style:style style:parent-style-name="Graphics" style:family="graphic" style:name="gr130">
      <style:graphic-properties style:repeat="stretch" style:wrap="run-through" fo:background-color="transparent"/>
    </style:style>
    <style:style style:family="drawing-page" style:name="dp54">
      <style:drawing-page-properties/>
    </style:style>
    <style:style style:family="presentation" style:name="pr72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59">
      <style:paragraph-properties/>
      <style:text-properties/>
    </style:style>
    <style:style style:family="paragraph" style:name="P260">
      <style:paragraph-properties/>
      <style:text-properties/>
    </style:style>
    <style:style style:family="presentation" style:name="pr73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61">
      <style:paragraph-properties/>
      <style:text-properties/>
    </style:style>
    <style:style style:family="paragraph" style:name="P262">
      <style:paragraph-properties/>
      <style:text-properties/>
    </style:style>
    <style:style style:family="presentation" style:name="pr74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63">
      <style:paragraph-properties/>
      <style:text-properties/>
    </style:style>
    <style:style style:family="paragraph" style:name="P264">
      <style:paragraph-properties fo:text-align="right"/>
      <style:text-properties/>
    </style:style>
    <style:style style:family="text" style:name="T105">
      <style:text-properties/>
    </style:style>
    <style:style style:family="drawing-page" style:name="dp55">
      <style:drawing-page-properties/>
    </style:style>
    <style:style style:family="graphic" style:name="gr13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5">
      <style:paragraph-properties/>
      <style:text-properties/>
    </style:style>
    <style:style style:family="text" style:name="T106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13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6">
      <style:paragraph-properties fo:margin-left="29.35pt" fo:margin-right="0pt" fo:text-indent="-22.34pt"/>
      <style:text-properties/>
    </style:style>
    <style:style style:family="text" style:name="T107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133">
      <style:graphic-properties style:repeat="stretch" draw:stroke="none" style:wrap="run-through" fo:background-color="transparent"/>
    </style:style>
    <style:style style:parent-style-name="Graphics" style:family="graphic" style:name="gr134">
      <style:graphic-properties style:repeat="stretch" style:wrap="run-through" fo:background-color="transparent"/>
    </style:style>
    <style:style style:family="graphic" style:name="gr135">
      <style:graphic-properties draw:fill="none" draw:auto-grow-height="false" draw:auto-grow-width="false" draw:stroke="dash" svg:stroke-color="#FF0000" svg:stroke-width="0.1058cm" style:wrap="run-through"/>
    </style:style>
    <style:style style:family="paragraph" style:name="P267">
      <style:paragraph-properties/>
      <style:text-properties/>
    </style:style>
    <style:style style:parent-style-name="Graphics" style:family="graphic" style:name="gr136">
      <style:graphic-properties style:repeat="stretch" style:wrap="run-through" fo:background-color="transparent"/>
    </style:style>
    <style:style style:parent-style-name="Graphics" style:family="graphic" style:name="gr137">
      <style:graphic-properties style:repeat="stretch" style:wrap="run-through" fo:background-color="transparent"/>
    </style:style>
    <style:style style:family="drawing-page" style:name="dp56">
      <style:drawing-page-properties/>
    </style:style>
    <style:style style:family="presentation" style:name="pr75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68">
      <style:paragraph-properties/>
      <style:text-properties/>
    </style:style>
    <style:style style:family="paragraph" style:name="P269">
      <style:paragraph-properties/>
      <style:text-properties/>
    </style:style>
    <style:style style:family="presentation" style:name="pr76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70">
      <style:paragraph-properties/>
      <style:text-properties/>
    </style:style>
    <style:style style:family="paragraph" style:name="P271">
      <style:paragraph-properties/>
      <style:text-properties/>
    </style:style>
    <style:style style:family="presentation" style:name="pr77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72">
      <style:paragraph-properties/>
      <style:text-properties/>
    </style:style>
    <style:style style:family="paragraph" style:name="P273">
      <style:paragraph-properties fo:text-align="right"/>
      <style:text-properties/>
    </style:style>
    <style:style style:family="text" style:name="T108">
      <style:text-properties/>
    </style:style>
    <style:style style:family="drawing-page" style:name="dp57">
      <style:drawing-page-properties/>
    </style:style>
    <style:style style:family="graphic" style:name="gr138">
      <style:graphic-properties draw:fill="bitmap" draw:fill-image-name="FillImage25" style:repeat="repeat" draw:fill-image-ref-point="center" draw:fill-image-ref-point-y="0%" draw:fill-image-ref-point-x="0%" draw:fill-image-width="0inch" draw:fill-image-height="0inch" draw:textarea-vertical-align="middle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274">
      <style:paragraph-properties/>
      <style:text-properties/>
    </style:style>
    <style:style style:family="graphic" style:name="gr139">
      <style:graphic-properties draw:fill="bitmap" draw:fill-image-name="FillImage26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275">
      <style:paragraph-properties/>
      <style:text-properties/>
    </style:style>
    <style:style style:family="graphic" style:name="gr140">
      <style:graphic-properties draw:fill="bitmap" draw:fill-image-name="FillImage27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276">
      <style:paragraph-properties/>
      <style:text-properties/>
    </style:style>
    <style:style style:family="graphic" style:name="gr141">
      <style:graphic-properties draw:fill="bitmap" draw:fill-image-name="FillImage28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277">
      <style:paragraph-properties/>
      <style:text-properties/>
    </style:style>
    <style:style style:family="graphic" style:name="gr142">
      <style:graphic-properties draw:fill="bitmap" draw:fill-image-name="FillImage29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278">
      <style:paragraph-properties/>
      <style:text-properties/>
    </style:style>
    <style:style style:family="graphic" style:name="gr143">
      <style:graphic-properties draw:fill="bitmap" draw:fill-image-name="FillImage30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279">
      <style:paragraph-properties/>
      <style:text-properties/>
    </style:style>
    <style:style style:family="graphic" style:name="gr14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0">
      <style:paragraph-properties/>
      <style:text-properties/>
    </style:style>
    <style:style style:family="text" style:name="T109">
      <style:text-properties style:text-line-through-type="none" fo:font-size="28pt" style:font-size-asian="28pt" style:font-size-complex="28pt" fo:language="fr" fo:country="FR" fo:font-weight="bold"/>
    </style:style>
    <style:style style:parent-style-name="Graphics" style:family="graphic" style:name="gr145">
      <style:graphic-properties style:repeat="stretch" style:wrap="run-through" fo:background-color="transparent"/>
    </style:style>
    <style:style style:family="drawing-page" style:name="dp58">
      <style:drawing-page-properties/>
    </style:style>
    <style:style style:family="presentation" style:name="pr78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81">
      <style:paragraph-properties/>
      <style:text-properties/>
    </style:style>
    <style:style style:family="paragraph" style:name="P282">
      <style:paragraph-properties/>
      <style:text-properties/>
    </style:style>
    <style:style style:family="presentation" style:name="pr79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83">
      <style:paragraph-properties/>
      <style:text-properties/>
    </style:style>
    <style:style style:family="paragraph" style:name="P284">
      <style:paragraph-properties/>
      <style:text-properties/>
    </style:style>
    <style:style style:family="presentation" style:name="pr80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85">
      <style:paragraph-properties/>
      <style:text-properties/>
    </style:style>
    <style:style style:family="paragraph" style:name="P286">
      <style:paragraph-properties fo:text-align="right"/>
      <style:text-properties/>
    </style:style>
    <style:style style:family="text" style:name="T110">
      <style:text-properties/>
    </style:style>
    <style:style style:family="drawing-page" style:name="dp59">
      <style:drawing-page-properties/>
    </style:style>
    <style:style style:family="graphic" style:name="gr14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7">
      <style:paragraph-properties/>
      <style:text-properties/>
    </style:style>
    <style:style style:family="text" style:name="T111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14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8">
      <style:paragraph-properties fo:margin-left="29.35pt" fo:margin-right="0pt" fo:text-indent="-22.34pt"/>
      <style:text-properties/>
    </style:style>
    <style:style style:family="text" style:name="T112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148">
      <style:graphic-properties style:repeat="stretch" draw:stroke="none" style:wrap="run-through" fo:background-color="transparent"/>
    </style:style>
    <style:style style:parent-style-name="Graphics" style:family="graphic" style:name="gr149">
      <style:graphic-properties style:repeat="stretch" style:wrap="run-through" fo:background-color="transparent"/>
    </style:style>
    <style:style style:family="drawing-page" style:name="dp60">
      <style:drawing-page-properties/>
    </style:style>
    <style:style style:family="presentation" style:name="pr81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89">
      <style:paragraph-properties/>
      <style:text-properties/>
    </style:style>
    <style:style style:family="paragraph" style:name="P290">
      <style:paragraph-properties/>
      <style:text-properties/>
    </style:style>
    <style:style style:family="presentation" style:name="pr82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91">
      <style:paragraph-properties/>
      <style:text-properties/>
    </style:style>
    <style:style style:family="paragraph" style:name="P292">
      <style:paragraph-properties/>
      <style:text-properties/>
    </style:style>
    <style:style style:family="presentation" style:name="pr83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293">
      <style:paragraph-properties/>
      <style:text-properties/>
    </style:style>
    <style:style style:family="paragraph" style:name="P294">
      <style:paragraph-properties fo:text-align="right"/>
      <style:text-properties/>
    </style:style>
    <style:style style:family="text" style:name="T113">
      <style:text-properties/>
    </style:style>
    <style:style style:family="drawing-page" style:name="dp61">
      <style:drawing-page-properties/>
    </style:style>
    <style:style style:family="graphic" style:name="gr15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5">
      <style:paragraph-properties/>
      <style:text-properties/>
    </style:style>
    <style:style style:family="text" style:name="T114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15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6">
      <style:paragraph-properties fo:margin-left="29.35pt" fo:margin-right="0pt" fo:text-indent="-22.34pt"/>
      <style:text-properties/>
    </style:style>
    <style:style style:family="text" style:name="T115">
      <style:text-properties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152">
      <style:graphic-properties style:repeat="stretch" draw:stroke="none" style:wrap="run-through" fo:background-color="transparent"/>
    </style:style>
    <style:style style:parent-style-name="Graphics" style:family="graphic" style:name="gr153">
      <style:graphic-properties style:repeat="stretch" draw:stroke="none" style:wrap="run-through" fo:background-color="transparent"/>
    </style:style>
    <style:style style:family="graphic" style:name="gr154">
      <style:graphic-properties draw:fill="none" draw:textarea-vertical-align="top" draw:auto-grow-height="true" draw:fit-to-size="false" style:shrink-to-fit="false" draw:stroke="none" fo:wrap-option="no-wrap" style:wrap="run-through" fo:padding-top="3.6pt" fo:padding-bottom="3.6pt" fo:padding-left="7.2pt" fo:padding-right="7.2pt" fo:background-color="transparent"/>
    </style:style>
    <style:style style:family="paragraph" style:name="P297">
      <style:paragraph-properties/>
      <style:text-properties/>
    </style:style>
    <style:style style:family="text" style:name="T116">
      <style:text-properties fo:font-family="Times New Roman" style:font-family-complex="Times New Roman" fo:font-size="16pt" style:font-size-asian="16pt" style:font-size-complex="16pt" fo:language="fr" fo:country="FR"/>
    </style:style>
    <style:style style:family="graphic" style:name="gr155">
      <style:graphic-properties draw:fill="none" draw:textarea-vertical-align="top" draw:auto-grow-height="true" draw:fit-to-size="false" style:shrink-to-fit="false" draw:stroke="none" fo:wrap-option="no-wrap" style:wrap="run-through" fo:padding-top="3.6pt" fo:padding-bottom="3.6pt" fo:padding-left="7.2pt" fo:padding-right="7.2pt" fo:background-color="transparent"/>
    </style:style>
    <style:style style:family="paragraph" style:name="P298">
      <style:paragraph-properties/>
      <style:text-properties/>
    </style:style>
    <style:style style:family="text" style:name="T117">
      <style:text-properties fo:font-family="Times New Roman" style:font-family-complex="Times New Roman" fo:font-size="16pt" style:font-size-asian="16pt" style:font-size-complex="16pt" fo:language="fr" fo:country="FR"/>
    </style:style>
    <style:style style:parent-style-name="Graphics" style:family="graphic" style:name="gr156">
      <style:graphic-properties style:repeat="stretch" draw:stroke="none" style:wrap="run-through" fo:background-color="transparent"/>
    </style:style>
    <style:style style:family="graphic" style:name="gr157">
      <style:graphic-properties draw:fill="none" draw:textarea-vertical-align="top" draw:auto-grow-height="true" draw:fit-to-size="false" style:shrink-to-fit="false" draw:stroke="none" fo:wrap-option="no-wrap" style:wrap="run-through" fo:padding-top="3.6pt" fo:padding-bottom="3.6pt" fo:padding-left="7.2pt" fo:padding-right="7.2pt" fo:background-color="transparent"/>
    </style:style>
    <style:style style:family="paragraph" style:name="P299">
      <style:paragraph-properties/>
      <style:text-properties/>
    </style:style>
    <style:style style:family="text" style:name="T118">
      <style:text-properties fo:font-family="Times New Roman" style:font-family-complex="Times New Roman" fo:font-size="16pt" style:font-size-asian="16pt" style:font-size-complex="16pt" fo:language="fr" fo:country="FR"/>
    </style:style>
    <style:style style:parent-style-name="Graphics" style:family="graphic" style:name="gr158">
      <style:graphic-properties style:repeat="stretch" style:wrap="run-through" fo:background-color="transparent"/>
    </style:style>
    <style:style style:family="drawing-page" style:name="dp62">
      <style:drawing-page-properties/>
    </style:style>
    <style:style style:family="presentation" style:name="pr84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00">
      <style:paragraph-properties/>
      <style:text-properties/>
    </style:style>
    <style:style style:family="paragraph" style:name="P301">
      <style:paragraph-properties/>
      <style:text-properties/>
    </style:style>
    <style:style style:family="presentation" style:name="pr85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02">
      <style:paragraph-properties/>
      <style:text-properties/>
    </style:style>
    <style:style style:family="paragraph" style:name="P303">
      <style:paragraph-properties/>
      <style:text-properties/>
    </style:style>
    <style:style style:family="presentation" style:name="pr86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04">
      <style:paragraph-properties/>
      <style:text-properties/>
    </style:style>
    <style:style style:family="paragraph" style:name="P305">
      <style:paragraph-properties fo:text-align="right"/>
      <style:text-properties/>
    </style:style>
    <style:style style:family="text" style:name="T119">
      <style:text-properties/>
    </style:style>
    <style:style style:family="drawing-page" style:name="dp63">
      <style:drawing-page-properties/>
    </style:style>
    <style:style style:parent-style-name="Graphics" style:family="graphic" style:name="gr159">
      <style:graphic-properties style:repeat="stretch" draw:stroke="none" style:wrap="run-through" fo:background-color="transparent"/>
    </style:style>
    <style:style style:family="graphic" style:name="gr16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6">
      <style:paragraph-properties/>
      <style:text-properties/>
    </style:style>
    <style:style style:family="text" style:name="T120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16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7">
      <style:paragraph-properties fo:margin-left="29.35pt" fo:margin-right="0pt" fo:text-indent="-22.34pt"/>
      <style:text-properties/>
    </style:style>
    <style:style style:family="text" style:name="T121">
      <style:text-properties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162">
      <style:graphic-properties style:repeat="stretch" style:wrap="run-through" fo:background-color="transparent"/>
    </style:style>
    <style:style style:family="graphic" style:name="gr163">
      <style:graphic-properties draw:fill="none" draw:auto-grow-height="false" draw:auto-grow-width="false" draw:stroke="dash" svg:stroke-color="#FF0000" svg:stroke-width="0.1058cm" style:wrap="run-through"/>
    </style:style>
    <style:style style:family="paragraph" style:name="P308">
      <style:paragraph-properties/>
      <style:text-properties/>
    </style:style>
    <style:style style:parent-style-name="Graphics" style:family="graphic" style:name="gr164">
      <style:graphic-properties style:repeat="stretch" style:wrap="run-through" fo:background-color="transparent"/>
    </style:style>
    <style:style style:family="drawing-page" style:name="dp64">
      <style:drawing-page-properties/>
    </style:style>
    <style:style style:family="presentation" style:name="pr87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09">
      <style:paragraph-properties/>
      <style:text-properties/>
    </style:style>
    <style:style style:family="paragraph" style:name="P310">
      <style:paragraph-properties/>
      <style:text-properties/>
    </style:style>
    <style:style style:family="presentation" style:name="pr88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11">
      <style:paragraph-properties/>
      <style:text-properties/>
    </style:style>
    <style:style style:family="paragraph" style:name="P312">
      <style:paragraph-properties/>
      <style:text-properties/>
    </style:style>
    <style:style style:family="presentation" style:name="pr89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13">
      <style:paragraph-properties/>
      <style:text-properties/>
    </style:style>
    <style:style style:family="paragraph" style:name="P314">
      <style:paragraph-properties fo:text-align="right"/>
      <style:text-properties/>
    </style:style>
    <style:style style:family="text" style:name="T122">
      <style:text-properties/>
    </style:style>
    <style:style style:family="drawing-page" style:name="dp65">
      <style:drawing-page-properties/>
    </style:style>
    <style:style style:family="graphic" style:name="gr16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5">
      <style:paragraph-properties/>
      <style:text-properties/>
    </style:style>
    <style:style style:family="text" style:name="T123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16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6">
      <style:paragraph-properties fo:margin-left="29.35pt" fo:margin-right="0pt" fo:text-indent="-22.34pt"/>
      <style:text-properties/>
    </style:style>
    <style:style style:family="text" style:name="T124">
      <style:text-properties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167">
      <style:graphic-properties style:repeat="stretch" style:wrap="run-through" fo:background-color="transparent"/>
    </style:style>
    <style:style style:parent-style-name="Graphics" style:family="graphic" style:name="gr168">
      <style:graphic-properties style:repeat="stretch" style:wrap="run-through" fo:background-color="transparent"/>
    </style:style>
    <style:style style:family="graphic" style:name="gr169">
      <style:graphic-properties draw:fill="none" draw:auto-grow-height="false" draw:auto-grow-width="false" draw:stroke="dash" svg:stroke-color="#FF0000" svg:stroke-width="0.1058cm" style:wrap="run-through"/>
    </style:style>
    <style:style style:family="paragraph" style:name="P317">
      <style:paragraph-properties/>
      <style:text-properties/>
    </style:style>
    <style:style style:parent-style-name="Graphics" style:family="graphic" style:name="gr170">
      <style:graphic-properties style:repeat="stretch" style:wrap="run-through" fo:background-color="transparent"/>
    </style:style>
    <style:style style:family="drawing-page" style:name="dp66">
      <style:drawing-page-properties/>
    </style:style>
    <style:style style:family="presentation" style:name="pr90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18">
      <style:paragraph-properties/>
      <style:text-properties/>
    </style:style>
    <style:style style:family="paragraph" style:name="P319">
      <style:paragraph-properties/>
      <style:text-properties/>
    </style:style>
    <style:style style:family="presentation" style:name="pr91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20">
      <style:paragraph-properties/>
      <style:text-properties/>
    </style:style>
    <style:style style:family="paragraph" style:name="P321">
      <style:paragraph-properties/>
      <style:text-properties/>
    </style:style>
    <style:style style:family="presentation" style:name="pr92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22">
      <style:paragraph-properties/>
      <style:text-properties/>
    </style:style>
    <style:style style:family="paragraph" style:name="P323">
      <style:paragraph-properties fo:text-align="right"/>
      <style:text-properties/>
    </style:style>
    <style:style style:family="text" style:name="T125">
      <style:text-properties/>
    </style:style>
    <style:style style:family="drawing-page" style:name="dp67">
      <style:drawing-page-properties/>
    </style:style>
    <style:style style:family="graphic" style:name="gr17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4">
      <style:paragraph-properties/>
      <style:text-properties/>
    </style:style>
    <style:style style:family="text" style:name="T126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17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5">
      <style:paragraph-properties fo:margin-left="29.35pt" fo:margin-right="0pt" fo:text-indent="-22.34pt"/>
      <style:text-properties/>
    </style:style>
    <style:style style:family="text" style:name="T127">
      <style:text-properties fo:font-family="Times New Roman" style:font-family-complex="Times New Roman" fo:font-size="18pt" style:font-size-asian="18pt" style:font-size-complex="18pt" fo:language="fr" fo:country="FR"/>
    </style:style>
    <style:style style:parent-style-name="Graphics" style:family="graphic" style:name="gr173">
      <style:graphic-properties style:repeat="stretch" style:wrap="run-through" fo:background-color="transparent"/>
    </style:style>
    <style:style style:parent-style-name="Graphics" style:family="graphic" style:name="gr174">
      <style:graphic-properties style:repeat="stretch" style:wrap="run-through" fo:background-color="transparent"/>
    </style:style>
    <style:style style:family="graphic" style:name="gr175">
      <style:graphic-properties draw:fill="none" draw:textarea-vertical-align="middle" draw:auto-grow-height="false" draw:auto-grow-width="false" draw:stroke="dash" svg:stroke-color="#FF0000" svg:stroke-width="0.1058cm" style:wrap="run-through"/>
    </style:style>
    <style:style style:family="paragraph" style:name="P326">
      <style:paragraph-properties fo:text-align="center"/>
      <style:text-properties/>
    </style:style>
    <style:style style:parent-style-name="Graphics" style:family="graphic" style:name="gr176">
      <style:graphic-properties style:repeat="stretch" style:wrap="run-through" fo:background-color="transparent"/>
    </style:style>
    <style:style style:family="drawing-page" style:name="dp68">
      <style:drawing-page-properties/>
    </style:style>
    <style:style style:family="presentation" style:name="pr93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27">
      <style:paragraph-properties/>
      <style:text-properties/>
    </style:style>
    <style:style style:family="paragraph" style:name="P328">
      <style:paragraph-properties/>
      <style:text-properties/>
    </style:style>
    <style:style style:family="presentation" style:name="pr94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29">
      <style:paragraph-properties/>
      <style:text-properties/>
    </style:style>
    <style:style style:family="paragraph" style:name="P330">
      <style:paragraph-properties/>
      <style:text-properties/>
    </style:style>
    <style:style style:family="presentation" style:name="pr95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31">
      <style:paragraph-properties/>
      <style:text-properties/>
    </style:style>
    <style:style style:family="paragraph" style:name="P332">
      <style:paragraph-properties fo:text-align="right"/>
      <style:text-properties/>
    </style:style>
    <style:style style:family="text" style:name="T128">
      <style:text-properties/>
    </style:style>
    <style:style style:family="drawing-page" style:name="dp69">
      <style:drawing-page-properties/>
    </style:style>
    <style:style style:family="graphic" style:name="gr177">
      <style:graphic-properties draw:fill="bitmap" draw:fill-image-name="FillImage31" style:repeat="repeat" draw:fill-image-ref-point="center" draw:fill-image-ref-point-y="0%" draw:fill-image-ref-point-x="0%" draw:fill-image-width="0inch" draw:fill-image-height="0inch" draw:textarea-vertical-align="middle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333">
      <style:paragraph-properties/>
      <style:text-properties/>
    </style:style>
    <style:style style:family="graphic" style:name="gr178">
      <style:graphic-properties draw:fill="bitmap" draw:fill-image-name="FillImage32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334">
      <style:paragraph-properties/>
      <style:text-properties/>
    </style:style>
    <style:style style:family="graphic" style:name="gr179">
      <style:graphic-properties draw:fill="bitmap" draw:fill-image-name="FillImage33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335">
      <style:paragraph-properties/>
      <style:text-properties/>
    </style:style>
    <style:style style:family="graphic" style:name="gr180">
      <style:graphic-properties draw:fill="bitmap" draw:fill-image-name="FillImage34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336">
      <style:paragraph-properties/>
      <style:text-properties/>
    </style:style>
    <style:style style:family="graphic" style:name="gr181">
      <style:graphic-properties draw:fill="bitmap" draw:fill-image-name="FillImage35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337">
      <style:paragraph-properties/>
      <style:text-properties/>
    </style:style>
    <style:style style:family="graphic" style:name="gr182">
      <style:graphic-properties draw:fill="bitmap" draw:fill-image-name="FillImage36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338">
      <style:paragraph-properties/>
      <style:text-properties/>
    </style:style>
    <style:style style:family="graphic" style:name="gr18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9">
      <style:paragraph-properties/>
      <style:text-properties/>
    </style:style>
    <style:style style:family="text" style:name="T129">
      <style:text-properties style:text-line-through-type="none" fo:font-size="28pt" style:font-size-asian="28pt" style:font-size-complex="28pt" fo:language="fr" fo:country="FR" fo:font-weight="bold"/>
    </style:style>
    <style:style style:parent-style-name="Graphics" style:family="graphic" style:name="gr184">
      <style:graphic-properties style:repeat="stretch" style:wrap="run-through" fo:background-color="transparent"/>
    </style:style>
    <style:style style:family="drawing-page" style:name="dp70">
      <style:drawing-page-properties/>
    </style:style>
    <style:style style:family="presentation" style:name="pr96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40">
      <style:paragraph-properties/>
      <style:text-properties/>
    </style:style>
    <style:style style:family="paragraph" style:name="P341">
      <style:paragraph-properties/>
      <style:text-properties/>
    </style:style>
    <style:style style:family="presentation" style:name="pr97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42">
      <style:paragraph-properties/>
      <style:text-properties/>
    </style:style>
    <style:style style:family="paragraph" style:name="P343">
      <style:paragraph-properties/>
      <style:text-properties/>
    </style:style>
    <style:style style:family="presentation" style:name="pr98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44">
      <style:paragraph-properties/>
      <style:text-properties/>
    </style:style>
    <style:style style:family="paragraph" style:name="P345">
      <style:paragraph-properties fo:text-align="right"/>
      <style:text-properties/>
    </style:style>
    <style:style style:family="text" style:name="T130">
      <style:text-properties/>
    </style:style>
    <style:style style:family="drawing-page" style:name="dp71">
      <style:drawing-page-properties/>
    </style:style>
    <style:style style:family="graphic" style:name="gr18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6">
      <style:paragraph-properties/>
      <style:text-properties/>
    </style:style>
    <style:style style:family="text" style:name="T131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18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7">
      <style:paragraph-properties fo:margin-left="29.35pt" fo:margin-right="0pt" fo:text-indent="-22.34pt"/>
      <style:text-properties/>
    </style:style>
    <style:style style:family="text" style:name="T132">
      <style:text-properties fo:font-family="Times New Roman" style:font-family-complex="Times New Roman" fo:font-size="18pt" style:font-size-asian="18pt" style:font-size-complex="18pt" fo:language="fr" fo:country="FR"/>
    </style:style>
    <style:style style:family="graphic" style:name="gr187">
      <style:graphic-properties draw:fill="none" draw:textarea-vertical-align="top" draw:auto-grow-height="true" draw:fit-to-size="false" style:shrink-to-fit="false" draw:stroke="none" fo:wrap-option="no-wrap" style:wrap="run-through" fo:padding-top="3.6pt" fo:padding-bottom="3.6pt" fo:padding-left="7.2pt" fo:padding-right="7.2pt" fo:background-color="transparent"/>
    </style:style>
    <style:style style:family="paragraph" style:name="P348">
      <style:paragraph-properties fo:margin-left="21.41pt" fo:margin-right="0pt" fo:text-indent="-15.42pt"/>
      <style:text-properties/>
    </style:style>
    <style:style style:family="text" style:name="T133">
      <style:text-properties fo:font-family="Times New Roman" style:font-family-complex="Times New Roman" fo:font-size="16pt" style:font-size-asian="16pt" style:font-size-complex="16pt" fo:language="fr" fo:country="FR"/>
    </style:style>
    <style:style style:family="paragraph" style:name="P349">
      <style:paragraph-properties fo:margin-left="15.42pt" fo:margin-right="0pt" fo:text-indent="-15.42pt"/>
      <style:text-properties/>
    </style:style>
    <style:style style:family="paragraph" style:name="P350">
      <style:paragraph-properties fo:margin-left="17.41pt" fo:margin-right="0pt" fo:text-indent="-15.42pt"/>
      <style:text-properties/>
    </style:style>
    <style:style style:family="paragraph" style:name="P351">
      <style:paragraph-properties fo:margin-left="16.41pt" fo:margin-right="0pt" fo:text-indent="-15.42pt"/>
      <style:text-properties/>
    </style:style>
    <style:style style:family="paragraph" style:name="P352">
      <style:paragraph-properties fo:margin-left="53.12pt" fo:margin-right="0pt" fo:text-indent="-20.61pt"/>
      <style:text-properties/>
    </style:style>
    <style:style style:family="text" style:name="T134">
      <style:text-properties fo:font-family="Times New Roman" style:font-family-complex="Times New Roman" fo:font-size="16pt" style:font-size-asian="16pt" style:font-size-complex="16pt" fo:language="fr" fo:country="FR"/>
    </style:style>
    <style:style style:family="paragraph" style:name="P353">
      <style:paragraph-properties fo:margin-left="53.12pt" fo:margin-right="0pt" fo:text-indent="-20.61pt"/>
      <style:text-properties/>
    </style:style>
    <style:style style:family="text" style:name="T135">
      <style:text-properties fo:font-family="Times New Roman" style:font-family-complex="Times New Roman" fo:font-size="16pt" style:font-size-asian="16pt" style:font-size-complex="16pt" fo:language="fr" fo:country="FR"/>
    </style:style>
    <style:style style:family="paragraph" style:name="P354">
      <style:paragraph-properties fo:margin-left="53.12pt" fo:margin-right="0pt" fo:text-indent="-20.61pt"/>
      <style:text-properties/>
    </style:style>
    <style:style style:family="text" style:name="T136">
      <style:text-properties fo:font-family="Times New Roman" style:font-family-complex="Times New Roman" fo:font-size="16pt" style:font-size-asian="16pt" style:font-size-complex="16pt" fo:language="fr" fo:country="FR"/>
    </style:style>
    <style:style style:parent-style-name="Graphics" style:family="graphic" style:name="gr188">
      <style:graphic-properties style:repeat="stretch" draw:stroke="none" style:wrap="run-through" fo:background-color="transparent"/>
    </style:style>
    <style:style style:parent-style-name="Graphics" style:family="graphic" style:name="gr189">
      <style:graphic-properties style:repeat="stretch" style:wrap="run-through" fo:background-color="transparent"/>
    </style:style>
    <style:style style:family="drawing-page" style:name="dp72">
      <style:drawing-page-properties/>
    </style:style>
    <style:style style:family="presentation" style:name="pr99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55">
      <style:paragraph-properties/>
      <style:text-properties/>
    </style:style>
    <style:style style:family="paragraph" style:name="P356">
      <style:paragraph-properties/>
      <style:text-properties/>
    </style:style>
    <style:style style:family="presentation" style:name="pr100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57">
      <style:paragraph-properties/>
      <style:text-properties/>
    </style:style>
    <style:style style:family="paragraph" style:name="P358">
      <style:paragraph-properties/>
      <style:text-properties/>
    </style:style>
    <style:style style:family="presentation" style:name="pr101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59">
      <style:paragraph-properties/>
      <style:text-properties/>
    </style:style>
    <style:style style:family="paragraph" style:name="P360">
      <style:paragraph-properties fo:text-align="right"/>
      <style:text-properties/>
    </style:style>
    <style:style style:family="text" style:name="T137">
      <style:text-properties/>
    </style:style>
    <style:style style:family="drawing-page" style:name="dp73">
      <style:drawing-page-properties/>
    </style:style>
    <style:style style:family="graphic" style:name="gr19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1">
      <style:paragraph-properties/>
      <style:text-properties/>
    </style:style>
    <style:style style:family="text" style:name="T138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19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2">
      <style:paragraph-properties fo:margin-left="29.35pt" fo:margin-right="0pt" fo:text-indent="-22.34pt"/>
      <style:text-properties/>
    </style:style>
    <style:style style:family="text" style:name="T139">
      <style:text-properties fo:font-family="Times New Roman" style:font-family-complex="Times New Roman" fo:font-size="18pt" style:font-size-asian="18pt" style:font-size-complex="18pt" fo:language="fr" fo:country="FR"/>
    </style:style>
    <style:style style:family="graphic" style:name="gr192">
      <style:graphic-properties draw:fill="none" draw:textarea-vertical-align="top" draw:auto-grow-height="true" draw:fit-to-size="false" style:shrink-to-fit="false" draw:stroke="none" fo:wrap-option="no-wrap" style:wrap="run-through" fo:padding-top="3.6pt" fo:padding-bottom="3.6pt" fo:padding-left="7.2pt" fo:padding-right="7.2pt" fo:background-color="transparent"/>
    </style:style>
    <style:style style:family="paragraph" style:name="P363">
      <style:paragraph-properties fo:margin-left="21.41pt" fo:margin-right="0pt" fo:text-indent="-15.42pt"/>
      <style:text-properties/>
    </style:style>
    <style:style style:family="text" style:name="T140">
      <style:text-properties fo:font-family="Times New Roman" style:font-family-complex="Times New Roman" fo:font-size="16pt" style:font-size-asian="16pt" style:font-size-complex="16pt" fo:language="fr" fo:country="FR"/>
    </style:style>
    <style:style style:family="paragraph" style:name="P364">
      <style:paragraph-properties fo:margin-left="21.41pt" fo:margin-right="0pt" fo:text-indent="-15.42pt"/>
      <style:text-properties/>
    </style:style>
    <style:style style:family="paragraph" style:name="P365">
      <style:paragraph-properties fo:margin-left="21.41pt" fo:margin-right="0pt" fo:text-indent="-15.42pt"/>
      <style:text-properties/>
    </style:style>
    <style:style style:family="text" style:name="T141">
      <style:text-properties fo:font-family="Times New Roman" style:font-family-complex="Times New Roman" fo:font-size="16pt" style:font-size-asian="16pt" style:font-size-complex="16pt" fo:language="fr" fo:country="FR"/>
    </style:style>
    <style:style style:parent-style-name="Graphics" style:family="graphic" style:name="gr193">
      <style:graphic-properties style:repeat="stretch" draw:stroke="none" style:wrap="run-through" fo:background-color="transparent"/>
    </style:style>
    <style:style style:parent-style-name="Graphics" style:family="graphic" style:name="gr194">
      <style:graphic-properties style:repeat="stretch" style:wrap="run-through" fo:background-color="transparent"/>
    </style:style>
    <style:style style:family="drawing-page" style:name="dp74">
      <style:drawing-page-properties/>
    </style:style>
    <style:style style:family="presentation" style:name="pr102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66">
      <style:paragraph-properties/>
      <style:text-properties/>
    </style:style>
    <style:style style:family="paragraph" style:name="P367">
      <style:paragraph-properties/>
      <style:text-properties/>
    </style:style>
    <style:style style:family="presentation" style:name="pr103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68">
      <style:paragraph-properties/>
      <style:text-properties/>
    </style:style>
    <style:style style:family="paragraph" style:name="P369">
      <style:paragraph-properties/>
      <style:text-properties/>
    </style:style>
    <style:style style:family="presentation" style:name="pr104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70">
      <style:paragraph-properties/>
      <style:text-properties/>
    </style:style>
    <style:style style:family="paragraph" style:name="P371">
      <style:paragraph-properties fo:text-align="right"/>
      <style:text-properties/>
    </style:style>
    <style:style style:family="text" style:name="T142">
      <style:text-properties/>
    </style:style>
    <style:style style:family="drawing-page" style:name="dp75">
      <style:drawing-page-properties/>
    </style:style>
    <style:style style:family="graphic" style:name="gr195">
      <style:graphic-properties draw:fill="bitmap" draw:fill-image-name="FillImage37" style:repeat="repeat" draw:fill-image-ref-point="center" draw:fill-image-ref-point-y="0%" draw:fill-image-ref-point-x="0%" draw:fill-image-width="0inch" draw:fill-image-height="0inch" draw:textarea-vertical-align="middle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372">
      <style:paragraph-properties/>
      <style:text-properties/>
    </style:style>
    <style:style style:family="graphic" style:name="gr196">
      <style:graphic-properties draw:fill="bitmap" draw:fill-image-name="FillImage38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373">
      <style:paragraph-properties/>
      <style:text-properties/>
    </style:style>
    <style:style style:family="graphic" style:name="gr197">
      <style:graphic-properties draw:fill="bitmap" draw:fill-image-name="FillImage39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374">
      <style:paragraph-properties/>
      <style:text-properties/>
    </style:style>
    <style:style style:family="graphic" style:name="gr198">
      <style:graphic-properties draw:fill="bitmap" draw:fill-image-name="FillImage40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375">
      <style:paragraph-properties/>
      <style:text-properties/>
    </style:style>
    <style:style style:family="graphic" style:name="gr199">
      <style:graphic-properties draw:fill="bitmap" draw:fill-image-name="FillImage41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376">
      <style:paragraph-properties/>
      <style:text-properties/>
    </style:style>
    <style:style style:family="graphic" style:name="gr200">
      <style:graphic-properties draw:fill="bitmap" draw:fill-image-name="FillImage42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377">
      <style:paragraph-properties/>
      <style:text-properties/>
    </style:style>
    <style:style style:family="graphic" style:name="gr20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8">
      <style:paragraph-properties/>
      <style:text-properties/>
    </style:style>
    <style:style style:family="text" style:name="T143">
      <style:text-properties style:text-line-through-type="none" fo:font-size="28pt" style:font-size-asian="28pt" style:font-size-complex="28pt" fo:language="fr" fo:country="FR" fo:font-weight="bold"/>
    </style:style>
    <style:style style:family="paragraph" style:name="P379">
      <style:paragraph-properties/>
      <style:text-properties/>
    </style:style>
    <style:style style:family="text" style:name="T144">
      <style:text-properties style:text-line-through-type="none" fo:font-size="28pt" style:font-size-asian="28pt" style:font-size-complex="28pt" fo:language="fr" fo:country="FR" fo:font-weight="bold"/>
    </style:style>
    <style:style style:family="paragraph" style:name="P380">
      <style:paragraph-properties/>
      <style:text-properties/>
    </style:style>
    <style:style style:family="text" style:name="T145">
      <style:text-properties style:text-line-through-type="none" fo:font-size="28pt" style:font-size-asian="28pt" style:font-size-complex="28pt" fo:language="fr" fo:country="FR" fo:font-weight="bold"/>
    </style:style>
    <style:style style:parent-style-name="Graphics" style:family="graphic" style:name="gr202">
      <style:graphic-properties style:repeat="stretch" style:wrap="run-through" fo:background-color="transparent"/>
    </style:style>
    <style:style style:family="drawing-page" style:name="dp76">
      <style:drawing-page-properties/>
    </style:style>
    <style:style style:family="presentation" style:name="pr105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81">
      <style:paragraph-properties/>
      <style:text-properties/>
    </style:style>
    <style:style style:family="paragraph" style:name="P382">
      <style:paragraph-properties/>
      <style:text-properties/>
    </style:style>
    <style:style style:family="presentation" style:name="pr106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83">
      <style:paragraph-properties/>
      <style:text-properties/>
    </style:style>
    <style:style style:family="paragraph" style:name="P384">
      <style:paragraph-properties/>
      <style:text-properties/>
    </style:style>
    <style:style style:family="presentation" style:name="pr107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85">
      <style:paragraph-properties/>
      <style:text-properties/>
    </style:style>
    <style:style style:family="paragraph" style:name="P386">
      <style:paragraph-properties fo:text-align="right"/>
      <style:text-properties/>
    </style:style>
    <style:style style:family="text" style:name="T146">
      <style:text-properties/>
    </style:style>
    <style:style style:family="drawing-page" style:name="dp77">
      <style:drawing-page-properties/>
    </style:style>
    <style:style style:family="graphic" style:name="gr20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7">
      <style:paragraph-properties/>
      <style:text-properties/>
    </style:style>
    <style:style style:family="text" style:name="T147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20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8">
      <style:paragraph-properties fo:margin-left="29.35pt" fo:margin-right="0pt" fo:text-indent="-22.34pt"/>
      <style:text-properties/>
    </style:style>
    <style:style style:family="text" style:name="T148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family="graphic" style:name="gr205">
      <style:graphic-properties draw:fill="none" draw:textarea-vertical-align="top" draw:auto-grow-height="true" draw:fit-to-size="false" style:shrink-to-fit="false" draw:stroke="none" fo:wrap-option="no-wrap" style:wrap="run-through" fo:padding-top="3.6pt" fo:padding-bottom="3.6pt" fo:padding-left="7.2pt" fo:padding-right="7.2pt" fo:background-color="transparent"/>
    </style:style>
    <style:style style:family="paragraph" style:name="P389">
      <style:paragraph-properties fo:margin-left="21.41pt" fo:margin-right="0pt" fo:text-indent="-15.42pt"/>
      <style:text-properties/>
    </style:style>
    <style:style style:family="text" style:name="T149">
      <style:text-properties fo:font-family="Times New Roman" style:font-family-complex="Times New Roman" fo:font-size="16pt" style:font-size-asian="16pt" style:font-size-complex="16pt" fo:language="fr" fo:country="FR"/>
    </style:style>
    <style:style style:family="paragraph" style:name="P390">
      <style:paragraph-properties fo:margin-left="21.41pt" fo:margin-right="0pt" fo:text-indent="-15.42pt"/>
      <style:text-properties/>
    </style:style>
    <style:style style:family="text" style:name="T150">
      <style:text-properties fo:font-family="Times New Roman" style:font-family-complex="Times New Roman" fo:font-size="16pt" style:font-size-asian="16pt" style:font-size-complex="16pt" fo:language="fr" fo:country="FR"/>
    </style:style>
    <style:style style:family="paragraph" style:name="P391">
      <style:paragraph-properties fo:margin-left="21.41pt" fo:margin-right="0pt" fo:text-indent="-15.42pt"/>
      <style:text-properties/>
    </style:style>
    <style:style style:family="text" style:name="T151">
      <style:text-properties fo:font-family="Times New Roman" style:font-family-complex="Times New Roman" fo:font-size="16pt" style:font-size-asian="16pt" style:font-size-complex="16pt" fo:language="fr" fo:country="FR"/>
    </style:style>
    <style:style style:family="paragraph" style:name="P392">
      <style:paragraph-properties fo:margin-left="21.41pt" fo:margin-right="0pt" fo:text-indent="-15.42pt"/>
      <style:text-properties/>
    </style:style>
    <style:style style:family="paragraph" style:name="P393">
      <style:paragraph-properties fo:margin-left="21.41pt" fo:margin-right="0pt" fo:text-indent="-15.42pt"/>
      <style:text-properties/>
    </style:style>
    <style:style style:family="text" style:name="T152">
      <style:text-properties fo:font-family="Times New Roman" style:font-family-complex="Times New Roman" fo:font-size="16pt" style:font-size-asian="16pt" style:font-size-complex="16pt" fo:language="fr" fo:country="FR"/>
    </style:style>
    <style:style style:parent-style-name="Graphics" style:family="graphic" style:name="gr206">
      <style:graphic-properties style:repeat="stretch" style:wrap="run-through" fo:background-color="transparent"/>
    </style:style>
    <style:style style:family="drawing-page" style:name="dp78">
      <style:drawing-page-properties/>
    </style:style>
    <style:style style:family="presentation" style:name="pr108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94">
      <style:paragraph-properties/>
      <style:text-properties/>
    </style:style>
    <style:style style:family="paragraph" style:name="P395">
      <style:paragraph-properties/>
      <style:text-properties/>
    </style:style>
    <style:style style:family="presentation" style:name="pr109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96">
      <style:paragraph-properties/>
      <style:text-properties/>
    </style:style>
    <style:style style:family="paragraph" style:name="P397">
      <style:paragraph-properties/>
      <style:text-properties/>
    </style:style>
    <style:style style:family="presentation" style:name="pr110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398">
      <style:paragraph-properties/>
      <style:text-properties/>
    </style:style>
    <style:style style:family="paragraph" style:name="P399">
      <style:paragraph-properties fo:text-align="right"/>
      <style:text-properties/>
    </style:style>
    <style:style style:family="text" style:name="T153">
      <style:text-properties/>
    </style:style>
    <style:style style:family="drawing-page" style:name="dp79">
      <style:drawing-page-properties/>
    </style:style>
    <style:style style:family="graphic" style:name="gr20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0">
      <style:paragraph-properties/>
      <style:text-properties/>
    </style:style>
    <style:style style:family="text" style:name="T154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20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1">
      <style:paragraph-properties fo:margin-left="29.35pt" fo:margin-right="0pt" fo:text-indent="-22.34pt"/>
      <style:text-properties/>
    </style:style>
    <style:style style:family="text" style:name="T155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family="graphic" style:name="gr20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2">
      <style:paragraph-properties/>
      <style:text-properties/>
    </style:style>
    <style:style style:family="text" style:name="T156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parent-style-name="Graphics" style:family="graphic" style:name="gr210">
      <style:graphic-properties style:repeat="stretch" draw:stroke="none" style:wrap="run-through" fo:background-color="transparent"/>
    </style:style>
    <style:style style:parent-style-name="Graphics" style:family="graphic" style:name="gr211">
      <style:graphic-properties style:repeat="stretch" style:wrap="run-through" fo:background-color="transparent"/>
    </style:style>
    <style:style style:parent-style-name="Graphics" style:family="graphic" style:name="gr212">
      <style:graphic-properties style:repeat="stretch" style:wrap="run-through" fo:background-color="transparent"/>
    </style:style>
    <style:style style:family="drawing-page" style:name="dp80">
      <style:drawing-page-properties/>
    </style:style>
    <style:style style:family="presentation" style:name="pr111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403">
      <style:paragraph-properties/>
      <style:text-properties/>
    </style:style>
    <style:style style:family="paragraph" style:name="P404">
      <style:paragraph-properties/>
      <style:text-properties/>
    </style:style>
    <style:style style:family="presentation" style:name="pr112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405">
      <style:paragraph-properties/>
      <style:text-properties/>
    </style:style>
    <style:style style:family="paragraph" style:name="P406">
      <style:paragraph-properties/>
      <style:text-properties/>
    </style:style>
    <style:style style:family="presentation" style:name="pr113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407">
      <style:paragraph-properties/>
      <style:text-properties/>
    </style:style>
    <style:style style:family="paragraph" style:name="P408">
      <style:paragraph-properties fo:text-align="right"/>
      <style:text-properties/>
    </style:style>
    <style:style style:family="text" style:name="T157">
      <style:text-properties/>
    </style:style>
    <style:style style:family="drawing-page" style:name="dp81">
      <style:drawing-page-properties/>
    </style:style>
    <style:style style:family="graphic" style:name="gr21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9">
      <style:paragraph-properties/>
      <style:text-properties/>
    </style:style>
    <style:style style:family="text" style:name="T158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family="graphic" style:name="gr2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0">
      <style:paragraph-properties fo:margin-left="29.35pt" fo:margin-right="0pt" fo:text-indent="-22.34pt"/>
      <style:text-properties/>
    </style:style>
    <style:style style:family="text" style:name="T159">
      <style:text-properties style:text-line-through-type="none" fo:font-family="Times New Roman" style:font-family-complex="Times New Roman" fo:font-size="18pt" style:font-size-asian="18pt" style:font-size-complex="18pt" fo:language="fr" fo:country="FR"/>
    </style:style>
    <style:style style:family="graphic" style:name="gr2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1">
      <style:paragraph-properties fo:line-height="100%" fo:text-align="left" fo:margin-left="26.6pt" fo:margin-right="0pt" fo:text-indent="-20.61pt" fo:margin-top="0pt" fo:margin-bottom="0pt"/>
      <style:text-properties/>
    </style:style>
    <style:style style:family="text" style:name="T160">
      <style:text-properties fo:color="#000000" style:text-line-through-type="none" fo:font-family="Times New Roman" style:font-family-complex="Times New Roman" fo:font-size="16pt" style:font-size-asian="16pt" style:font-size-complex="16pt" fo:language="fr" fo:country="FR" style:text-underline-type="none"/>
    </style:style>
    <style:style style:family="paragraph" style:name="P412">
      <style:paragraph-properties fo:line-height="100%" fo:text-align="left" fo:margin-left="5.992pt" fo:text-indent="20.61pt" fo:margin-top="0pt" fo:margin-bottom="0pt"/>
      <style:text-properties/>
    </style:style>
    <style:style style:family="paragraph" style:name="P413">
      <style:paragraph-properties fo:line-height="100%" fo:text-align="left" fo:margin-left="26.6pt" fo:margin-right="0pt" fo:text-indent="-20.61pt" fo:margin-top="0pt" fo:margin-bottom="0pt"/>
      <style:text-properties/>
    </style:style>
    <style:style style:family="text" style:name="T161">
      <style:text-properties fo:color="#000000" style:text-line-through-type="none" fo:font-family="Times New Roman" style:font-family-complex="Times New Roman" fo:font-size="16pt" style:font-size-asian="16pt" style:font-size-complex="16pt" fo:language="fr" fo:country="FR" style:text-underline-type="none"/>
    </style:style>
    <style:style style:family="paragraph" style:name="P414">
      <style:paragraph-properties fo:line-height="100%" fo:text-align="left" fo:margin-left="5.992pt" fo:text-indent="20.61pt" fo:margin-top="0pt" fo:margin-bottom="0pt"/>
      <style:text-properties/>
    </style:style>
    <style:style style:family="paragraph" style:name="P415">
      <style:paragraph-properties fo:line-height="100%" fo:text-align="left" fo:margin-left="26.6pt" fo:margin-right="0pt" fo:text-indent="-20.61pt" fo:margin-top="0pt" fo:margin-bottom="0pt"/>
      <style:text-properties/>
    </style:style>
    <style:style style:family="text" style:name="T162">
      <style:text-properties fo:color="#000000" style:text-line-through-type="none" fo:font-family="Times New Roman" style:font-family-complex="Times New Roman" fo:font-size="16pt" style:font-size-asian="16pt" style:font-size-complex="16pt" fo:language="fr" fo:country="FR" style:text-underline-type="none"/>
    </style:style>
    <style:style style:parent-style-name="Graphics" style:family="graphic" style:name="gr216">
      <style:graphic-properties style:repeat="stretch" draw:stroke="none" style:wrap="run-through" fo:background-color="transparent"/>
    </style:style>
    <style:style style:parent-style-name="Graphics" style:family="graphic" style:name="gr217">
      <style:graphic-properties style:repeat="stretch" style:wrap="run-through" fo:background-color="transparent"/>
    </style:style>
    <style:style style:family="drawing-page" style:name="dp82">
      <style:drawing-page-properties/>
    </style:style>
    <style:style style:family="presentation" style:name="pr114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416">
      <style:paragraph-properties/>
      <style:text-properties/>
    </style:style>
    <style:style style:family="paragraph" style:name="P417">
      <style:paragraph-properties/>
      <style:text-properties/>
    </style:style>
    <style:style style:family="presentation" style:name="pr115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418">
      <style:paragraph-properties/>
      <style:text-properties/>
    </style:style>
    <style:style style:family="paragraph" style:name="P419">
      <style:paragraph-properties/>
      <style:text-properties/>
    </style:style>
    <style:style style:family="presentation" style:name="pr116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420">
      <style:paragraph-properties/>
      <style:text-properties/>
    </style:style>
    <style:style style:family="paragraph" style:name="P421">
      <style:paragraph-properties fo:text-align="right"/>
      <style:text-properties/>
    </style:style>
    <style:style style:family="text" style:name="T163">
      <style:text-properties/>
    </style:style>
    <style:style style:family="drawing-page" style:name="dp83">
      <style:drawing-page-properties/>
    </style:style>
    <style:style style:family="graphic" style:name="gr218">
      <style:graphic-properties draw:fill="bitmap" draw:fill-image-name="FillImage43" style:repeat="repeat" draw:fill-image-ref-point="center" draw:fill-image-ref-point-y="0%" draw:fill-image-ref-point-x="0%" draw:fill-image-width="0inch" draw:fill-image-height="0inch" draw:textarea-vertical-align="middle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422">
      <style:paragraph-properties/>
      <style:text-properties/>
    </style:style>
    <style:style style:family="graphic" style:name="gr219">
      <style:graphic-properties draw:fill="bitmap" draw:fill-image-name="FillImage44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423">
      <style:paragraph-properties/>
      <style:text-properties/>
    </style:style>
    <style:style style:family="graphic" style:name="gr220">
      <style:graphic-properties draw:fill="bitmap" draw:fill-image-name="FillImage45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424">
      <style:paragraph-properties/>
      <style:text-properties/>
    </style:style>
    <style:style style:family="graphic" style:name="gr221">
      <style:graphic-properties draw:fill="bitmap" draw:fill-image-name="FillImage46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425">
      <style:paragraph-properties/>
      <style:text-properties/>
    </style:style>
    <style:style style:family="graphic" style:name="gr222">
      <style:graphic-properties draw:fill="bitmap" draw:fill-image-name="FillImage47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426">
      <style:paragraph-properties/>
      <style:text-properties/>
    </style:style>
    <style:style style:family="graphic" style:name="gr223">
      <style:graphic-properties draw:fill="bitmap" draw:fill-image-name="FillImage48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427">
      <style:paragraph-properties/>
      <style:text-properties/>
    </style:style>
    <style:style style:family="graphic" style:name="gr22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8">
      <style:paragraph-properties/>
      <style:text-properties/>
    </style:style>
    <style:style style:family="text" style:name="T164">
      <style:text-properties style:text-line-through-type="none" fo:font-size="28pt" style:font-size-asian="28pt" style:font-size-complex="28pt" fo:language="fr" fo:country="FR" fo:font-weight="bold"/>
    </style:style>
    <style:style style:parent-style-name="Graphics" style:family="graphic" style:name="gr225">
      <style:graphic-properties style:repeat="stretch" style:wrap="run-through" fo:background-color="transparent"/>
    </style:style>
    <style:style style:family="drawing-page" style:name="dp84">
      <style:drawing-page-properties/>
    </style:style>
    <style:style style:family="presentation" style:name="pr117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429">
      <style:paragraph-properties/>
      <style:text-properties/>
    </style:style>
    <style:style style:family="paragraph" style:name="P430">
      <style:paragraph-properties/>
      <style:text-properties/>
    </style:style>
    <style:style style:family="presentation" style:name="pr118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431">
      <style:paragraph-properties/>
      <style:text-properties/>
    </style:style>
    <style:style style:family="paragraph" style:name="P432">
      <style:paragraph-properties/>
      <style:text-properties/>
    </style:style>
    <style:style style:family="presentation" style:name="pr119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433">
      <style:paragraph-properties/>
      <style:text-properties/>
    </style:style>
    <style:style style:family="paragraph" style:name="P434">
      <style:paragraph-properties fo:text-align="right"/>
      <style:text-properties/>
    </style:style>
    <style:style style:family="text" style:name="T165">
      <style:text-properties/>
    </style:style>
    <style:style style:family="drawing-page" style:name="dp85">
      <style:drawing-page-properties/>
    </style:style>
    <style:style style:family="graphic" style:name="gr22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5">
      <style:paragraph-properties/>
      <style:text-properties/>
    </style:style>
    <style:style style:family="text" style:name="T166">
      <style:text-properties fo:color="#000000" fo:font-family="Times New Roman" style:font-family-complex="Times New Roman" fo:font-size="18pt" style:font-size-asian="18pt" style:font-size-complex="18pt" fo:language="fr" fo:country="FR" style:text-underline-type="none" fo:font-weight="bold"/>
    </style:style>
    <style:style style:parent-style-name="Graphics" style:family="graphic" style:name="gr227">
      <style:graphic-properties style:repeat="stretch" draw:stroke="none" style:wrap="run-through" fo:background-color="transparent"/>
    </style:style>
    <style:style style:family="graphic" style:name="gr22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6">
      <style:paragraph-properties fo:line-height="100%" fo:text-align="left" fo:margin-left="26.6pt" fo:margin-right="0pt" fo:text-indent="-20.61pt" fo:margin-top="0pt" fo:margin-bottom="0pt"/>
      <style:text-properties/>
    </style:style>
    <style:style style:family="text" style:name="T167">
      <style:text-properties fo:color="#000000" style:text-line-through-type="none" fo:font-family="Times New Roman" style:font-family-complex="Times New Roman" fo:font-size="16pt" style:font-size-asian="16pt" style:font-size-complex="16pt" fo:language="fr" fo:country="FR" style:text-underline-type="none"/>
    </style:style>
    <style:style style:family="paragraph" style:name="P437">
      <style:paragraph-properties fo:line-height="100%" fo:text-align="left" fo:margin-left="5.992pt" fo:text-indent="20.61pt" fo:margin-top="0pt" fo:margin-bottom="0pt"/>
      <style:text-properties/>
    </style:style>
    <style:style style:family="paragraph" style:name="P438">
      <style:paragraph-properties fo:line-height="100%" fo:text-align="left" fo:margin-left="26.6pt" fo:margin-right="0pt" fo:text-indent="-20.61pt" fo:margin-top="0pt" fo:margin-bottom="0pt"/>
      <style:text-properties/>
    </style:style>
    <style:style style:family="text" style:name="T168">
      <style:text-properties fo:color="#000000" style:text-line-through-type="none" fo:font-family="Times New Roman" style:font-family-complex="Times New Roman" fo:font-size="16pt" style:font-size-asian="16pt" style:font-size-complex="16pt" fo:language="fr" fo:country="FR" style:text-underline-type="none"/>
    </style:style>
    <style:style style:family="paragraph" style:name="P439">
      <style:paragraph-properties fo:line-height="100%" fo:text-align="left" fo:margin-left="5.992pt" fo:text-indent="20.61pt" fo:margin-top="0pt" fo:margin-bottom="0pt"/>
      <style:text-properties/>
    </style:style>
    <style:style style:family="paragraph" style:name="P440">
      <style:paragraph-properties fo:line-height="100%" fo:text-align="left" fo:margin-left="26.6pt" fo:margin-right="0pt" fo:text-indent="-20.61pt" fo:margin-top="0pt" fo:margin-bottom="0pt"/>
      <style:text-properties/>
    </style:style>
    <style:style style:family="text" style:name="T169">
      <style:text-properties fo:font-family="Times New Roman" style:font-family-complex="Times New Roman" fo:font-size="18pt" style:font-size-asian="18pt" style:font-size-complex="18pt" fo:language="fr" fo:country="FR"/>
    </style:style>
    <style:style style:family="paragraph" style:name="P441">
      <style:paragraph-properties fo:line-height="100%" fo:text-align="left" fo:margin-left="26.6pt" fo:margin-right="0pt" fo:text-indent="-20.61pt" fo:margin-top="0pt" fo:margin-bottom="0pt"/>
      <style:text-properties/>
    </style:style>
    <style:style style:family="paragraph" style:name="P442">
      <style:paragraph-properties fo:line-height="100%" fo:text-align="left" fo:margin-left="26.6pt" fo:margin-right="0pt" fo:text-indent="-20.61pt" fo:margin-top="0pt" fo:margin-bottom="0pt"/>
      <style:text-properties/>
    </style:style>
    <style:style style:family="text" style:name="T170">
      <style:text-properties fo:font-family="Times New Roman" style:font-family-complex="Times New Roman" fo:font-size="18pt" style:font-size-asian="18pt" style:font-size-complex="18pt" fo:language="fr" fo:country="FR"/>
    </style:style>
    <style:style style:family="paragraph" style:name="P443">
      <style:paragraph-properties fo:line-height="100%" fo:text-align="left" fo:margin-left="5.992pt" fo:text-indent="20.61pt" fo:margin-top="0pt" fo:margin-bottom="0pt"/>
      <style:text-properties/>
    </style:style>
    <style:style style:family="paragraph" style:name="P444">
      <style:paragraph-properties fo:line-height="100%" fo:text-align="left" fo:margin-left="26.6pt" fo:margin-right="0pt" fo:text-indent="-20.61pt" fo:margin-top="0pt" fo:margin-bottom="0pt"/>
      <style:text-properties/>
    </style:style>
    <style:style style:family="text" style:name="T171">
      <style:text-properties fo:color="#000000" style:text-line-through-type="none" fo:font-family="Times New Roman" style:font-family-complex="Times New Roman" fo:font-size="18pt" style:font-size-asian="18pt" style:font-size-complex="18pt" fo:language="fr" fo:country="FR" style:text-underline-type="none"/>
    </style:style>
    <style:style style:family="paragraph" style:name="P445">
      <style:paragraph-properties fo:line-height="100%" fo:text-align="left" fo:margin-top="0pt" fo:margin-bottom="0pt"/>
      <style:text-properties/>
    </style:style>
    <style:style style:parent-style-name="Graphics" style:family="graphic" style:name="gr229">
      <style:graphic-properties style:repeat="stretch" style:wrap="run-through" fo:background-color="transparent"/>
    </style:style>
    <style:style style:family="drawing-page" style:name="dp86">
      <style:drawing-page-properties/>
    </style:style>
    <style:style style:family="presentation" style:name="pr120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446">
      <style:paragraph-properties/>
      <style:text-properties/>
    </style:style>
    <style:style style:family="paragraph" style:name="P447">
      <style:paragraph-properties/>
      <style:text-properties/>
    </style:style>
    <style:style style:family="presentation" style:name="pr121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448">
      <style:paragraph-properties/>
      <style:text-properties/>
    </style:style>
    <style:style style:family="paragraph" style:name="P449">
      <style:paragraph-properties/>
      <style:text-properties/>
    </style:style>
    <style:style style:family="presentation" style:name="pr122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450">
      <style:paragraph-properties/>
      <style:text-properties/>
    </style:style>
    <style:style style:family="paragraph" style:name="P451">
      <style:paragraph-properties fo:text-align="right"/>
      <style:text-properties/>
    </style:style>
    <style:style style:family="text" style:name="T172">
      <style:text-properties/>
    </style:style>
    <style:style style:family="drawing-page" style:name="dp87">
      <style:drawing-page-properties/>
    </style:style>
    <style:style style:family="graphic" style:name="gr230">
      <style:graphic-properties draw:fill="bitmap" draw:fill-image-name="FillImage49" style:repeat="repeat" draw:fill-image-ref-point="center" draw:fill-image-ref-point-y="0%" draw:fill-image-ref-point-x="0%" draw:fill-image-width="0inch" draw:fill-image-height="0inch" draw:textarea-vertical-align="middle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452">
      <style:paragraph-properties/>
      <style:text-properties/>
    </style:style>
    <style:style style:family="graphic" style:name="gr231">
      <style:graphic-properties draw:fill="bitmap" draw:fill-image-name="FillImage50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453">
      <style:paragraph-properties/>
      <style:text-properties/>
    </style:style>
    <style:style style:family="graphic" style:name="gr232">
      <style:graphic-properties draw:fill="bitmap" draw:fill-image-name="FillImage51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454">
      <style:paragraph-properties/>
      <style:text-properties/>
    </style:style>
    <style:style style:family="graphic" style:name="gr233">
      <style:graphic-properties draw:fill="bitmap" draw:fill-image-name="FillImage52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455">
      <style:paragraph-properties/>
      <style:text-properties/>
    </style:style>
    <style:style style:family="graphic" style:name="gr234">
      <style:graphic-properties draw:fill="bitmap" draw:fill-image-name="FillImage53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456">
      <style:paragraph-properties/>
      <style:text-properties/>
    </style:style>
    <style:style style:family="graphic" style:name="gr235">
      <style:graphic-properties draw:fill="bitmap" draw:fill-image-name="FillImage54" style:repeat="repeat" draw:fill-image-ref-point="center" draw:fill-image-ref-point-y="0%" draw:fill-image-ref-point-x="0%" draw:fill-image-width="0inch" draw:fill-image-height="0inch" draw:auto-grow-height="false" draw:auto-grow-width="false" draw:stroke="solid" svg:stroke-color="#27405E" svg:stroke-width="0.035cm" svg:stroke-opacity="96.8627%" fo:padding-top="4.025pt" fo:padding-bottom="4.025pt" fo:padding-left="7.568pt" fo:padding-right="7.568pt"/>
    </style:style>
    <style:style style:family="paragraph" style:name="P457">
      <style:paragraph-properties/>
      <style:text-properties/>
    </style:style>
    <style:style style:family="graphic" style:name="gr23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8">
      <style:paragraph-properties/>
      <style:text-properties/>
    </style:style>
    <style:style style:family="text" style:name="T173">
      <style:text-properties style:text-line-through-type="none" fo:font-size="28pt" style:font-size-asian="28pt" style:font-size-complex="28pt" fo:language="fr" fo:country="FR" fo:font-weight="bold"/>
    </style:style>
    <style:style style:parent-style-name="Graphics" style:family="graphic" style:name="gr237">
      <style:graphic-properties draw:image-opacity="100%" style:repeat="stretch" draw:stroke="none" style:wrap="run-through" fo:background-color="transparent"/>
    </style:style>
    <style:style style:parent-style-name="Graphics" style:family="graphic" style:name="gr238">
      <style:graphic-properties style:repeat="stretch" style:wrap="run-through" fo:background-color="transparent"/>
    </style:style>
    <style:style style:family="drawing-page" style:name="dp88">
      <style:drawing-page-properties/>
    </style:style>
    <style:style style:family="presentation" style:name="pr123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459">
      <style:paragraph-properties/>
      <style:text-properties/>
    </style:style>
    <style:style style:family="paragraph" style:name="P460">
      <style:paragraph-properties/>
      <style:text-properties/>
    </style:style>
    <style:style style:family="presentation" style:name="pr124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461">
      <style:paragraph-properties/>
      <style:text-properties/>
    </style:style>
    <style:style style:family="paragraph" style:name="P462">
      <style:paragraph-properties/>
      <style:text-properties/>
    </style:style>
    <style:style style:family="presentation" style:name="pr125">
      <style:graphic-properties draw:fill="none" draw:textarea-vertical-align="top" draw:auto-grow-height="true" draw:fit-to-size="false" style:shrink-to-fit="false" draw:stroke="none" fo:wrap-option="no-wrap" style:wrap="run-through" fo:background-color="transparent"/>
    </style:style>
    <style:style style:family="paragraph" style:name="P463">
      <style:paragraph-properties/>
      <style:text-properties/>
    </style:style>
    <style:style style:family="paragraph" style:name="P464">
      <style:paragraph-properties fo:text-align="right"/>
      <style:text-properties/>
    </style:style>
    <style:style style:family="text" style:name="T174"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  <text:list-style style:name="L11"/>
    <text:list-style style:name="L12"/>
    <text:list-style style:name="L13"/>
    <text:list-style style:name="L14"/>
    <text:list-style style:name="L15"/>
    <text:list-style style:name="L16"/>
    <text:list-style style:name="L17"/>
    <text:list-style style:name="L18"/>
    <text:list-style style:name="L19"/>
    <text:list-style style:name="L20"/>
    <text:list-style style:name="L21"/>
    <text:list-style style:name="L22"/>
    <text:list-style style:name="L23"/>
    <text:list-style style:name="L24"/>
    <text:list-style style:name="L25"/>
    <text:list-style style:name="L26"/>
    <text:list-style style:name="L27"/>
    <text:list-style style:name="L28"/>
    <text:list-style style:name="L29"/>
    <text:list-style style:name="L30"/>
    <text:list-style style:name="L31"/>
    <text:list-style style:name="L32"/>
    <text:list-style style:name="L33"/>
    <text:list-style style:name="L34"/>
    <text:list-style style:name="L35"/>
    <text:list-style style:name="L36"/>
    <text:list-style style:name="L37"/>
    <text:list-style style:name="L38"/>
    <text:list-style style:name="L39">
      <text:list-level-style-bullet text:level="1" text:bullet-char="•">
        <style:list-level-properties text:space-before="1pt" text:min-label-width="15.42pt"/>
        <style:text-properties fo:font-family="Arial" fo:font-size="100%"/>
      </text:list-level-style-bullet>
    </text:list-style>
    <text:list-style style:name="L40"/>
    <text:list-style style:name="L41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42"/>
    <text:list-style style:name="L43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44"/>
    <text:list-style style:name="L45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46"/>
    <text:list-style style:name="L47"/>
    <text:list-style style:name="L48"/>
    <text:list-style style:name="L49"/>
    <text:list-style style:name="L50"/>
    <text:list-style style:name="L51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52"/>
    <text:list-style style:name="L53"/>
    <text:list-style style:name="L54"/>
    <text:list-style style:name="L55"/>
    <text:list-style style:name="L56"/>
    <text:list-style style:name="L57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58"/>
    <text:list-style style:name="L59"/>
    <text:list-style style:name="L60"/>
    <text:list-style style:name="L61"/>
    <text:list-style style:name="L62"/>
    <text:list-style style:name="L63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64"/>
    <text:list-style style:name="L65"/>
    <text:list-style style:name="L66"/>
    <text:list-style style:name="L67"/>
    <text:list-style style:name="L68"/>
    <text:list-style style:name="L69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70"/>
    <text:list-style style:name="L71"/>
    <text:list-style style:name="L72"/>
    <text:list-style style:name="L73"/>
    <text:list-style style:name="L74"/>
    <text:list-style style:name="L75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76"/>
    <text:list-style style:name="L77"/>
    <text:list-style style:name="L78"/>
    <text:list-style style:name="L79"/>
    <text:list-style style:name="L80"/>
    <text:list-style style:name="L81"/>
    <text:list-style style:name="L82"/>
    <text:list-style style:name="L83"/>
    <text:list-style style:name="L84"/>
    <text:list-style style:name="L85"/>
    <text:list-style style:name="L86"/>
    <text:list-style style:name="L87"/>
    <text:list-style style:name="L88"/>
    <text:list-style style:name="L89"/>
    <text:list-style style:name="L90"/>
    <text:list-style style:name="L91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92"/>
    <text:list-style style:name="L93">
      <text:list-level-style-bullet text:level="1" text:bullet-char="•">
        <style:list-level-properties text:space-before="1pt" text:min-label-width="15.42pt"/>
        <style:text-properties fo:font-family="Arial" fo:font-size="100%"/>
      </text:list-level-style-bullet>
    </text:list-style>
    <text:list-style style:name="L94">
      <text:list-level-style-bullet text:level="1" text:bullet-char="•">
        <style:list-level-properties text:space-before="1pt" text:min-label-width="15.42pt"/>
        <style:text-properties fo:font-family="Arial" fo:font-size="100%"/>
      </text:list-level-style-bullet>
    </text:list-style>
    <text:list-style style:name="L95">
      <text:list-level-style-bullet text:level="1" text:bullet-char="•">
        <style:list-level-properties text:space-before="1pt" text:min-label-width="15.42pt"/>
        <style:text-properties fo:font-family="Arial" fo:font-size="100%"/>
      </text:list-level-style-bullet>
    </text:list-style>
    <text:list-style style:name="L96"/>
    <text:list-style style:name="L97"/>
    <text:list-style style:name="L98"/>
    <text:list-style style:name="L99"/>
    <text:list-style style:name="L100"/>
    <text:list-style style:name="L101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102"/>
    <text:list-style style:name="L103">
      <text:list-level-style-bullet text:level="1" text:bullet-char="•">
        <style:list-level-properties text:space-before="1pt" text:min-label-width="15.42pt"/>
        <style:text-properties fo:font-family="Arial" fo:font-size="100%"/>
      </text:list-level-style-bullet>
    </text:list-style>
    <text:list-style style:name="L104">
      <text:list-level-style-bullet text:level="1" text:bullet-char="•">
        <style:list-level-properties text:space-before="1pt" text:min-label-width="15.42pt"/>
        <style:text-properties fo:font-family="Arial" fo:font-size="100%"/>
      </text:list-level-style-bullet>
    </text:list-style>
    <text:list-style style:name="L105"/>
    <text:list-style style:name="L106"/>
    <text:list-style style:name="L107"/>
    <text:list-style style:name="L108"/>
    <text:list-style style:name="L109"/>
    <text:list-style style:name="L110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111"/>
    <text:list-style style:name="L112">
      <text:list-level-style-bullet text:level="1" text:bullet-char="•">
        <style:list-level-properties text:space-before="1pt" text:min-label-width="15.42pt"/>
        <style:text-properties fo:font-family="Arial" fo:font-size="100%"/>
      </text:list-level-style-bullet>
    </text:list-style>
    <text:list-style style:name="L113">
      <text:list-level-style-bullet text:level="1" text:bullet-char="•">
        <style:list-level-properties text:space-before="1pt" text:min-label-width="15.42pt"/>
        <style:text-properties fo:font-family="Arial" fo:font-size="100%"/>
      </text:list-level-style-bullet>
    </text:list-style>
    <text:list-style style:name="L114"/>
    <text:list-style style:name="L115"/>
    <text:list-style style:name="L116"/>
    <text:list-style style:name="L117"/>
    <text:list-style style:name="L118"/>
    <text:list-style style:name="L119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120"/>
    <text:list-style style:name="L121">
      <text:list-level-style-bullet text:level="1" text:bullet-char="•">
        <style:list-level-properties text:space-before="1pt" text:min-label-width="15.42pt"/>
        <style:text-properties fo:font-family="Arial" fo:font-size="100%"/>
      </text:list-level-style-bullet>
    </text:list-style>
    <text:list-style style:name="L122"/>
    <text:list-style style:name="L123"/>
    <text:list-style style:name="L124"/>
    <text:list-style style:name="L125"/>
    <text:list-style style:name="L126"/>
    <text:list-style style:name="L127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128"/>
    <text:list-style style:name="L129">
      <text:list-level-style-bullet text:level="1" text:bullet-char="•">
        <style:list-level-properties text:space-before="1pt" text:min-label-width="15.42pt"/>
        <style:text-properties fo:font-family="Arial" fo:font-size="100%"/>
      </text:list-level-style-bullet>
    </text:list-style>
    <text:list-style style:name="L130">
      <text:list-level-style-bullet text:level="1" text:bullet-char="•">
        <style:list-level-properties text:space-before="1pt" text:min-label-width="15.42pt"/>
        <style:text-properties fo:font-family="Arial" fo:font-size="100%"/>
      </text:list-level-style-bullet>
    </text:list-style>
    <text:list-style style:name="L131">
      <text:list-level-style-bullet text:level="1" text:bullet-char="•">
        <style:list-level-properties text:space-before="1pt" text:min-label-width="15.42pt"/>
        <style:text-properties fo:font-family="Arial" fo:font-size="100%"/>
      </text:list-level-style-bullet>
    </text:list-style>
    <text:list-style style:name="L132"/>
    <text:list-style style:name="L133"/>
    <text:list-style style:name="L134"/>
    <text:list-style style:name="L135"/>
    <text:list-style style:name="L136"/>
    <text:list-style style:name="L137"/>
    <text:list-style style:name="L138"/>
    <text:list-style style:name="L139"/>
    <text:list-style style:name="L140"/>
    <text:list-style style:name="L141"/>
    <text:list-style style:name="L142"/>
    <text:list-style style:name="L143"/>
    <text:list-style style:name="L144"/>
    <text:list-style style:name="L145"/>
    <text:list-style style:name="L146"/>
    <text:list-style style:name="L147"/>
    <text:list-style style:name="L148"/>
    <text:list-style style:name="L149"/>
    <text:list-style style:name="L150"/>
    <text:list-style style:name="L151"/>
    <text:list-style style:name="L152"/>
    <text:list-style style:name="L153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154"/>
    <text:list-style style:name="L155"/>
    <text:list-style style:name="L156"/>
    <text:list-style style:name="L157"/>
    <text:list-style style:name="L158"/>
    <text:list-style style:name="L159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160"/>
    <text:list-style style:name="L161"/>
    <text:list-style style:name="L162"/>
    <text:list-style style:name="L163"/>
    <text:list-style style:name="L164"/>
    <text:list-style style:name="L165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166"/>
    <text:list-style style:name="L167"/>
    <text:list-style style:name="L168"/>
    <text:list-style style:name="L169"/>
    <text:list-style style:name="L170"/>
    <text:list-style style:name="L171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172"/>
    <text:list-style style:name="L173"/>
    <text:list-style style:name="L174"/>
    <text:list-style style:name="L175"/>
    <text:list-style style:name="L176"/>
    <text:list-style style:name="L177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178"/>
    <text:list-style style:name="L179"/>
    <text:list-style style:name="L180"/>
    <text:list-style style:name="L181"/>
    <text:list-style style:name="L182"/>
    <text:list-style style:name="L183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184"/>
    <text:list-style style:name="L185"/>
    <text:list-style style:name="L186"/>
    <text:list-style style:name="L187"/>
    <text:list-style style:name="L188"/>
    <text:list-style style:name="L189"/>
    <text:list-style style:name="L190"/>
    <text:list-style style:name="L191"/>
    <text:list-style style:name="L192"/>
    <text:list-style style:name="L193"/>
    <text:list-style style:name="L194"/>
    <text:list-style style:name="L195"/>
    <text:list-style style:name="L196"/>
    <text:list-style style:name="L197"/>
    <text:list-style style:name="L198"/>
    <text:list-style style:name="L199"/>
    <text:list-style style:name="L200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201"/>
    <text:list-style style:name="L202"/>
    <text:list-style style:name="L203"/>
    <text:list-style style:name="L204"/>
    <text:list-style style:name="L205"/>
    <text:list-style style:name="L206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207"/>
    <text:list-style style:name="L208"/>
    <text:list-style style:name="L209"/>
    <text:list-style style:name="L210"/>
    <text:list-style style:name="L211"/>
    <text:list-style style:name="L212"/>
    <text:list-style style:name="L213"/>
    <text:list-style style:name="L214"/>
    <text:list-style style:name="L215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216"/>
    <text:list-style style:name="L217"/>
    <text:list-style style:name="L218"/>
    <text:list-style style:name="L219"/>
    <text:list-style style:name="L220"/>
    <text:list-style style:name="L221"/>
    <text:list-style style:name="L222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223"/>
    <text:list-style style:name="L224"/>
    <text:list-style style:name="L225"/>
    <text:list-style style:name="L226"/>
    <text:list-style style:name="L227"/>
    <text:list-style style:name="L228"/>
    <text:list-style style:name="L229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230"/>
    <text:list-style style:name="L231"/>
    <text:list-style style:name="L232"/>
    <text:list-style style:name="L233"/>
    <text:list-style style:name="L234"/>
    <text:list-style style:name="L235"/>
    <text:list-style style:name="L236"/>
    <text:list-style style:name="L237"/>
    <text:list-style style:name="L238"/>
    <text:list-style style:name="L239"/>
    <text:list-style style:name="L240"/>
    <text:list-style style:name="L241"/>
    <text:list-style style:name="L242"/>
    <text:list-style style:name="L243"/>
    <text:list-style style:name="L244"/>
    <text:list-style style:name="L245"/>
    <text:list-style style:name="L246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247"/>
    <text:list-style style:name="L248">
      <text:list-level-style-bullet text:level="1" text:bullet-char="Ø">
        <style:list-level-properties text:space-before="1pt" text:min-label-width="15.42pt"/>
        <style:text-properties fo:font-family="Wingdings" fo:font-size="100%"/>
      </text:list-level-style-bullet>
    </text:list-style>
    <text:list-style style:name="L249"/>
    <text:list-style style:name="L250"/>
    <text:list-style style:name="L251"/>
    <text:list-style style:name="L252"/>
    <text:list-style style:name="L253"/>
    <text:list-style style:name="L254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255"/>
    <text:list-style style:name="L256">
      <text:list-level-style-bullet text:level="1" text:bullet-char="Ø">
        <style:list-level-properties text:space-before="1pt" text:min-label-width="15.42pt"/>
        <style:text-properties fo:font-family="Wingdings" fo:font-size="100%"/>
      </text:list-level-style-bullet>
    </text:list-style>
    <text:list-style style:name="L257">
      <text:list-level-style-bullet text:level="1" text:bullet-char="Ø">
        <style:list-level-properties text:space-before="1pt" text:min-label-width="15.42pt"/>
        <style:text-properties fo:font-family="Wingdings" fo:font-size="100%"/>
      </text:list-level-style-bullet>
    </text:list-style>
    <text:list-style style:name="L258"/>
    <text:list-style style:name="L259"/>
    <text:list-style style:name="L260"/>
    <text:list-style style:name="L261"/>
    <text:list-style style:name="L262"/>
    <text:list-style style:name="L263"/>
    <text:list-style style:name="L264"/>
    <text:list-style style:name="L265"/>
    <text:list-style style:name="L266"/>
    <text:list-style style:name="L267"/>
    <text:list-style style:name="L268"/>
    <text:list-style style:name="L269"/>
    <text:list-style style:name="L270"/>
    <text:list-style style:name="L271"/>
    <text:list-style style:name="L272"/>
    <text:list-style style:name="L273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274"/>
    <text:list-style style:name="L275">
      <text:list-level-style-bullet text:level="1" text:bullet-char="Ø">
        <style:list-level-properties text:space-before="1pt" text:min-label-width="15.42pt"/>
        <style:text-properties fo:font-family="Wingdings" fo:font-size="100%"/>
      </text:list-level-style-bullet>
    </text:list-style>
    <text:list-style style:name="L276">
      <text:list-level-style-bullet text:level="1" text:bullet-char="Ø">
        <style:list-level-properties text:space-before="1pt" text:min-label-width="15.42pt"/>
        <style:text-properties fo:font-family="Wingdings" fo:font-size="100%"/>
      </text:list-level-style-bullet>
    </text:list-style>
    <text:list-style style:name="L277">
      <text:list-level-style-bullet text:level="1" text:bullet-char="Ø">
        <style:list-level-properties text:space-before="1pt" text:min-label-width="15.42pt"/>
        <style:text-properties fo:font-family="Wingdings" fo:font-size="100%"/>
      </text:list-level-style-bullet>
    </text:list-style>
    <text:list-style style:name="L278">
      <text:list-level-style-bullet text:level="1" text:bullet-char="Ø">
        <style:list-level-properties text:space-before="1pt" text:min-label-width="15.42pt"/>
        <style:text-properties fo:font-family="Wingdings" fo:font-size="100%"/>
      </text:list-level-style-bullet>
    </text:list-style>
    <text:list-style style:name="L279"/>
    <text:list-style style:name="L280"/>
    <text:list-style style:name="L281"/>
    <text:list-style style:name="L282"/>
    <text:list-style style:name="L283"/>
    <text:list-style style:name="L284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285"/>
    <text:list-style style:name="L286"/>
    <text:list-style style:name="L287"/>
    <text:list-style style:name="L288"/>
    <text:list-style style:name="L289"/>
    <text:list-style style:name="L290"/>
    <text:list-style style:name="L291">
      <text:list-level-style-bullet text:level="1" text:bullet-char="•">
        <style:list-level-properties text:space-before="1pt" text:min-label-width="22.34pt"/>
        <style:text-properties fo:font-family="Arial" fo:font-size="100%"/>
      </text:list-level-style-bullet>
    </text:list-style>
    <text:list-style style:name="L292"/>
    <text:list-style style:name="L293">
      <text:list-level-style-bullet text:level="1" text:bullet-char="Ø">
        <style:list-level-properties text:space-before="1pt" text:min-label-width="20.61pt"/>
        <style:text-properties fo:font-family="Wingdings" fo:font-size="100%"/>
      </text:list-level-style-bullet>
    </text:list-style>
    <text:list-style style:name="L294">
      <text:list-level-style-bullet text:level="1" text:bullet-char="Ø">
        <style:list-level-properties text:space-before="1pt" text:min-label-width="20.61pt"/>
        <style:text-properties fo:font-family="Wingdings" fo:font-size="100%"/>
      </text:list-level-style-bullet>
    </text:list-style>
    <text:list-style style:name="L295">
      <text:list-level-style-bullet text:level="1" text:bullet-char="Ø">
        <style:list-level-properties text:space-before="1pt" text:min-label-width="20.61pt"/>
        <style:text-properties fo:font-family="Wingdings" fo:font-size="100%"/>
      </text:list-level-style-bullet>
    </text:list-style>
    <text:list-style style:name="L296"/>
    <text:list-style style:name="L297"/>
    <text:list-style style:name="L298"/>
    <text:list-style style:name="L299"/>
    <text:list-style style:name="L300"/>
    <text:list-style style:name="L301"/>
    <text:list-style style:name="L302"/>
    <text:list-style style:name="L303"/>
    <text:list-style style:name="L304"/>
    <text:list-style style:name="L305"/>
    <text:list-style style:name="L306"/>
    <text:list-style style:name="L307"/>
    <text:list-style style:name="L308"/>
    <text:list-style style:name="L309"/>
    <text:list-style style:name="L310"/>
    <text:list-style style:name="L311">
      <text:list-level-style-bullet text:level="1" text:bullet-char="Ø">
        <style:list-level-properties text:space-before="1pt" text:min-label-width="20.61pt"/>
        <style:text-properties fo:font-family="Wingdings" fo:font-size="100%"/>
      </text:list-level-style-bullet>
    </text:list-style>
    <text:list-style style:name="L312">
      <text:list-level-style-bullet text:level="1" text:bullet-char="Ø">
        <style:list-level-properties text:space-before="1pt" text:min-label-width="20.61pt"/>
        <style:text-properties fo:font-family="Wingdings" fo:font-size="100%"/>
      </text:list-level-style-bullet>
    </text:list-style>
    <text:list-style style:name="L313">
      <text:list-level-style-bullet text:level="1" text:bullet-char="Ø">
        <style:list-level-properties text:space-before="1pt" text:min-label-width="20.61pt"/>
        <style:text-properties fo:font-family="Wingdings" fo:font-size="100%"/>
      </text:list-level-style-bullet>
    </text:list-style>
    <text:list-style style:name="L314">
      <text:list-level-style-bullet text:level="1" text:bullet-char="Ø">
        <style:list-level-properties text:space-before="1pt" text:min-label-width="20.61pt"/>
        <style:text-properties fo:font-family="Wingdings" fo:font-size="100%"/>
      </text:list-level-style-bullet>
    </text:list-style>
    <text:list-style style:name="L315">
      <text:list-level-style-bullet text:level="1" text:bullet-char="Ø">
        <style:list-level-properties text:space-before="1pt" text:min-label-width="20.61pt"/>
        <style:text-properties fo:font-family="Wingdings" fo:font-size="100%"/>
      </text:list-level-style-bullet>
    </text:list-style>
    <text:list-style style:name="L316"/>
    <text:list-style style:name="L317"/>
    <text:list-style style:name="L318"/>
    <text:list-style style:name="L319"/>
    <text:list-style style:name="L320"/>
    <text:list-style style:name="L321"/>
    <text:list-style style:name="L322"/>
    <text:list-style style:name="L323"/>
    <text:list-style style:name="L324"/>
    <text:list-style style:name="L325"/>
    <text:list-style style:name="L326"/>
    <text:list-style style:name="L327"/>
    <text:list-style style:name="L328"/>
  </office:automatic-styles>
  <office:body>
    <office:presentation>
      <draw:page draw:name="page1" draw:style-name="dp5" draw:master-page-name="_______5f__5f__5f_Standard" presentation:presentation-page-layout-name="AL1">
        <draw:frame xml:id="id3" draw:id="id3" draw:style-name="gr2" svg:width="5.1cm" svg:height="4.168cm" svg:x="12.03cm" svg:y="0.083cm">
          <draw:image xlink:href="Pictures/image1.png" xlink:type="simple" xlink:show="embed" xlink:actuate="onLoad"/>
          <draw:image xlink:href="Pictures/image2.svg" xlink:type="simple" xlink:show="embed" xlink:actuate="onLoad" draw:mime-type="image/svg+xml"/>
        </draw:frame>
        <draw:frame xml:id="id4" draw:id="id4" draw:style-name="gr3" svg:width="23.5cm" svg:height="2.918cm" svg:x="3.176cm" svg:y="4.567cm">
          <draw:text-box fo:min-height="2.918cm">
            <text:p text:style-name="P9"><text:span text:style-name="T1">PLATEFORME MLOPS DE PRÉDICTION:DÉTECTION DE FRAUDE AUX TRANSACTIONS PAR IA, PIPELINE MLOPS END-TO-END</text:span></text:p>
          </draw:text-box>
        </draw:frame>
        <draw:frame xml:id="id5" draw:id="id5" draw:style-name="gr4" svg:width="15.5cm" svg:height="3.425cm" svg:x="8cm" svg:y="8.112cm">
          <draw:text-box fo:min-height="3.425cm">
            <text:p text:style-name="P10"><text:span text:style-name="T2">Réalisé par  l’étudiant :</text:span></text:p>
            <text:p text:style-name="P11"><text:span/></text:p>
            <text:p text:style-name="P12"><text:span text:style-name="T3">KONMENECK PESSUE Masewell-Mathurin</text:span></text:p>
          </draw:text-box>
        </draw:frame>
        <draw:frame xml:id="id6" draw:id="id6" draw:style-name="gr5" svg:width="11cm" svg:height="1.013cm" svg:x="3.751cm" svg:y="13cm">
          <draw:text-box fo:min-height="1.013cm">
            <text:p text:style-name="P13"><text:span text:style-name="T4">Superviseur : Ing. TAMKO Clarence</text:span></text:p>
          </draw:text-box>
        </draw:frame>
        <draw:frame xml:id="id7" draw:id="id7" draw:style-name="gr6" svg:width="14cm" svg:height="1.013cm" svg:x="7.751cm" svg:y="11.12cm">
          <draw:text-box fo:min-height="1.013cm">
            <text:p text:style-name="P14"><text:span text:style-name="T5">UE:Cloud, Virtualisation &amp; Data Center</text:span></text:p>
          </draw:text-box>
        </draw:frame>
        <draw:frame xml:id="id8" draw:id="id8" draw:style-name="gr7" svg:width="2.136cm" svg:height="2.851cm" svg:x="0.2158cm" svg:y="13.51cm">
          <draw:image xlink:href="Pictures/image3.png" xlink:type="simple" xlink:show="embed" xlink:actuate="onLoad"/>
        </draw:frame>
        <presentation:notes draw:style-name="dp6">
          <draw:frame xml:id="id9" draw:id="id9" draw:text-style-name="P15" draw:layer="layout" presentation:style-name="pr3" presentation:class="outline" presentation:placeholder="true" svg:width="16.8cm" svg:height="13.36cm" svg:x="2.1cm" svg:y="14.11cm">
            <draw:text-box fo:min-height="13.36cm">
              <text:p text:style-name="P16"><text:span/></text:p>
            </draw:text-box>
          </draw:frame>
        </presentation:notes>
      </draw:page>
      <draw:page draw:name="Slide_2" draw:style-name="dp9" draw:master-page-name="_______5f__5f__5f_Standard2" presentation:presentation-page-layout-name="AL2">
        <draw:custom-shape xml:id="id12" draw:id="id12" draw:style-name="gr8" draw:transform="rotate(-37.037456069205426) translate(13.08cm,4.987cm)" svg:width="14.09cm" svg:height="4.776cm">
          <text:p text:style-name="P21"><text:span/></text:p>
          <draw:enhanced-geometry draw:type="flowchart-terminator"/>
        </draw:custom-shape>
        <draw:custom-shape xml:id="id13" draw:id="id13" draw:style-name="gr9" draw:transform="rotate(-37.037456069205426) translate(20.53cm,5.726cm)" svg:width="12.69cm" svg:height="3.142cm">
          <text:p text:style-name="P22"><text:span/></text:p>
          <draw:enhanced-geometry draw:type="flowchart-terminator"/>
        </draw:custom-shape>
        <draw:custom-shape xml:id="id14" draw:id="id14" draw:style-name="gr10" draw:transform="rotate(-40.153218431642124) translate(21.87cm,7.894cm)" svg:width="3.766cm" svg:height="2.491cm">
          <text:p text:style-name="P23"><text:span/></text:p>
          <draw:enhanced-geometry draw:type="flowchart-terminator"/>
        </draw:custom-shape>
        <draw:custom-shape xml:id="id15" draw:id="id15" draw:style-name="gr11" draw:transform="rotate(-37.037456069205426) translate(22.83cm,8.296cm)" svg:width="12.69cm" svg:height="3.126cm">
          <text:p text:style-name="P24"><text:span/></text:p>
          <draw:enhanced-geometry draw:type="flowchart-terminator"/>
        </draw:custom-shape>
        <draw:custom-shape xml:id="id16" draw:id="id16" draw:style-name="gr12" draw:transform="rotate(-37.037456069205426) translate(8.952cm,4.386cm)" svg:width="12.69cm" svg:height="2.287cm">
          <text:p text:style-name="P25"><text:span/></text:p>
          <draw:enhanced-geometry draw:type="flowchart-terminator"/>
        </draw:custom-shape>
        <draw:custom-shape xml:id="id17" draw:id="id17" draw:style-name="gr13" draw:transform="rotate(-37.201343067744105) translate(20.53cm,10.43cm)" svg:width="3.088cm" svg:height="2.003cm">
          <text:p text:style-name="P26"><text:span/></text:p>
          <draw:enhanced-geometry draw:type="flowchart-connector"/>
        </draw:custom-shape>
        <draw:frame xml:id="id18" draw:id="id18" draw:style-name="gr14" svg:width="14.46cm" svg:height="3.811cm" svg:x="1.495cm" svg:y="6.298cm">
          <draw:text-box fo:min-height="3.811cm">
            <text:p text:style-name="P27"><text:span text:style-name="T6">INTRODUCTION</text:span></text:p>
            <text:p text:style-name="P28"><text:span text:style-name="T7">&amp;</text:span></text:p>
            <text:p text:style-name="P29"><text:span text:style-name="T8">GÉNÉRALITÉ</text:span></text:p>
          </draw:text-box>
        </draw:frame>
        <draw:frame xml:id="id19" draw:id="id19" draw:style-name="gr15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18" smil:attributeName="visibility" smil:fill="hold" smil:to="visible"/>
                  <anim:animate smil:dur="0.8s" smil:targetElement="id18" smil:attributeName="width" smil:values="0;width" smil:keyTimes="0;1"/>
                  <anim:animate smil:dur="0.8s" smil:targetElement="id18" smil:attributeName="height" smil:values="0;height" smil:keyTimes="0;1"/>
                  <anim:animate smil:dur="0.8s" smil:targetElement="id18" smil:attributeName="rotate" smil:values="90;0" smil:keyTimes="0;1"/>
                  <anim:transitionFilter smil:dur="0.8s" smil:targetElement="id18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17" smil:attributeName="visibility" smil:fill="hold" smil:to="visible"/>
                  <anim:animate smil:dur="0.8s" smil:targetElement="id17" smil:attributeName="width" smil:values="0;width" smil:keyTimes="0;1"/>
                  <anim:animate smil:dur="0.8s" smil:targetElement="id17" smil:attributeName="height" smil:values="0;height" smil:keyTimes="0;1"/>
                  <anim:animate smil:dur="0.8s" smil:targetElement="id17" smil:attributeName="rotate" smil:values="90;0" smil:keyTimes="0;1"/>
                  <anim:transitionFilter smil:dur="0.8s" smil:targetElement="id17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16" smil:attributeName="visibility" smil:fill="hold" smil:to="visible"/>
                  <anim:animate smil:dur="0.8s" smil:targetElement="id16" smil:attributeName="width" smil:values="0;width" smil:keyTimes="0;1"/>
                  <anim:animate smil:dur="0.8s" smil:targetElement="id16" smil:attributeName="height" smil:values="0;height" smil:keyTimes="0;1"/>
                  <anim:animate smil:dur="0.8s" smil:targetElement="id16" smil:attributeName="rotate" smil:values="90;0" smil:keyTimes="0;1"/>
                  <anim:transitionFilter smil:dur="0.8s" smil:targetElement="id16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15" smil:attributeName="visibility" smil:fill="hold" smil:to="visible"/>
                  <anim:animate smil:dur="0.8s" smil:targetElement="id15" smil:attributeName="width" smil:values="0;width" smil:keyTimes="0;1"/>
                  <anim:animate smil:dur="0.8s" smil:targetElement="id15" smil:attributeName="height" smil:values="0;height" smil:keyTimes="0;1"/>
                  <anim:animate smil:dur="0.8s" smil:targetElement="id15" smil:attributeName="rotate" smil:values="90;0" smil:keyTimes="0;1"/>
                  <anim:transitionFilter smil:dur="0.8s" smil:targetElement="id15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14" smil:attributeName="visibility" smil:fill="hold" smil:to="visible"/>
                  <anim:animate smil:dur="0.8s" smil:targetElement="id14" smil:attributeName="width" smil:values="0;width" smil:keyTimes="0;1"/>
                  <anim:animate smil:dur="0.8s" smil:targetElement="id14" smil:attributeName="height" smil:values="0;height" smil:keyTimes="0;1"/>
                  <anim:animate smil:dur="0.8s" smil:targetElement="id14" smil:attributeName="rotate" smil:values="90;0" smil:keyTimes="0;1"/>
                  <anim:transitionFilter smil:dur="0.8s" smil:targetElement="id14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13" smil:attributeName="visibility" smil:fill="hold" smil:to="visible"/>
                  <anim:animate smil:dur="0.8s" smil:targetElement="id13" smil:attributeName="width" smil:values="0;width" smil:keyTimes="0;1"/>
                  <anim:animate smil:dur="0.8s" smil:targetElement="id13" smil:attributeName="height" smil:values="0;height" smil:keyTimes="0;1"/>
                  <anim:animate smil:dur="0.8s" smil:targetElement="id13" smil:attributeName="rotate" smil:values="90;0" smil:keyTimes="0;1"/>
                  <anim:transitionFilter smil:dur="0.8s" smil:targetElement="id13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12" smil:attributeName="visibility" smil:fill="hold" smil:to="visible"/>
                  <anim:animate smil:dur="0.8s" smil:targetElement="id12" smil:attributeName="width" smil:values="0;width" smil:keyTimes="0;1"/>
                  <anim:animate smil:dur="0.8s" smil:targetElement="id12" smil:attributeName="height" smil:values="0;height" smil:keyTimes="0;1"/>
                  <anim:animate smil:dur="0.8s" smil:targetElement="id12" smil:attributeName="rotate" smil:values="90;0" smil:keyTimes="0;1"/>
                  <anim:transitionFilter smil:dur="0.8s" smil:targetElement="id12" smil:subtype="crossfade" smil:type="fade" smil:mode="in"/>
                </anim:par>
              </anim:par>
            </anim:par>
          </anim:seq>
        </anim:par>
        <presentation:notes draw:style-name="dp10">
          <draw:frame xml:id="id20" draw:id="id20" draw:name="Slide Image Placeholder 1" draw:text-style-name="P30" draw:layer="layout" presentation:style-name="pr6" presentation:class="title" presentation:placeholder="true" svg:width="0.035cm" svg:height="0.937cm" svg:x="0cm" svg:y="0cm">
            <draw:text-box fo:min-height="0.937cm">
              <text:p text:style-name="P31"><text:span/></text:p>
            </draw:text-box>
          </draw:frame>
          <draw:frame xml:id="id21" draw:id="id21" draw:name="Notes Placeholder 2" draw:text-style-name="P32" draw:layer="layout" presentation:style-name="pr7" presentation:class="outline" presentation:placeholder="true" svg:width="0.035cm" svg:height="0.937cm" svg:x="0cm" svg:y="0cm">
            <draw:text-box fo:min-height="0.937cm">
              <text:p text:style-name="P33"><text:span/></text:p>
            </draw:text-box>
          </draw:frame>
          <draw:frame xml:id="id22" draw:id="id22" draw:name="Slide Number Placeholder 3" draw:text-style-name="P34" draw:layer="layout" presentation:style-name="pr8" presentation:class="page-number" presentation:placeholder="true" svg:width="0.035cm" svg:height="0.543cm" svg:x="0cm" svg:y="0cm">
            <draw:text-box fo:min-height="0.543cm">
              <text:p text:style-name="P35"><text:span text:style-name="T9"><text:page-number>&lt;numéro&gt;</text:page-number></text:span></text:p>
            </draw:text-box>
          </draw:frame>
        </presentation:notes>
      </draw:page>
      <draw:page draw:name="Slide_2" draw:style-name="dp11" draw:master-page-name="_______5f__5f__5f_Standard2" presentation:presentation-page-layout-name="AL2">
        <draw:frame xml:id="id23" draw:id="id23" draw:style-name="gr16" svg:width="13.57cm" svg:height="1.017cm" svg:x="1.01cm" svg:y="0.504cm">
          <draw:text-box fo:min-height="1.017cm">
            <text:p text:style-name="P36"><text:span text:style-name="T10">INTRODUCTION &amp; GÉNÉRALITÉ</text:span></text:p>
          </draw:text-box>
        </draw:frame>
        <draw:frame xml:id="id24" draw:id="id24" draw:style-name="gr17" svg:width="7.072cm" svg:height="7.697cm" svg:x="9.575cm" svg:y="3.274cm">
          <draw:image xlink:href="Pictures/image5.jpg" xlink:type="simple" xlink:show="embed" xlink:actuate="onLoad"/>
        </draw:frame>
        <draw:frame xml:id="id25" draw:id="id25" draw:style-name="gr18" svg:width="3.886cm" svg:height="1.44cm" svg:x="16.17cm" svg:y="4.314cm">
          <draw:text-box fo:min-height="1.44cm">
            <text:p text:style-name="P37"><text:span text:style-name="T11">MLOps </text:span></text:p>
          </draw:text-box>
        </draw:frame>
        <draw:frame xml:id="id26" draw:id="id26" draw:style-name="gr19" svg:width="7.262cm" svg:height="1.44cm" svg:x="20.4cm" svg:y="4.441cm">
          <draw:text-box fo:min-height="1.44cm">
            <text:p text:style-name="P38"><text:span text:style-name="T12">= ML + Ops</text:span></text:p>
          </draw:text-box>
        </draw:frame>
        <draw:frame xml:id="id27" draw:id="id27" draw:style-name="gr20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fade-in" presentation:preset-sub-type="0">
                  <anim:set smil:dur="0.001s" smil:begin="0s" smil:targetElement="id25" smil:attributeName="visibility" smil:fill="hold" smil:to="visible"/>
                  <anim:transitionFilter smil:dur="0.5s" smil:targetElement="id25" smil:subtype="crossfade" smil:type="fade" smil:mode="in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split" presentation:preset-sub-type="vertical-in">
                  <anim:set smil:dur="0.001s" smil:begin="0s" smil:targetElement="id24" smil:attributeName="visibility" smil:fill="hold" smil:to="visible"/>
                  <anim:transitionFilter smil:dur="0.5s" smil:targetElement="id24" smil:subtype="vertical" smil:type="barnDoorWipe" smil:mode="in" smil:direction="reverse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fly-in" presentation:preset-sub-type="from-bottom">
                  <anim:set smil:dur="0.001s" smil:begin="0s" smil:targetElement="id26" smil:attributeName="visibility" smil:fill="hold" smil:to="visible"/>
                  <anim:animate smil:dur="0.5s" smil:targetElement="id26" smil:attributeName="x" smil:values="x;x" smil:keyTimes="0;1"/>
                  <anim:animate smil:dur="0.5s" smil:targetElement="id26" smil:attributeName="y" smil:values="1+height/2;y" smil:keyTimes="0;1"/>
                </anim:par>
              </anim:par>
            </anim:par>
          </anim:seq>
        </anim:par>
        <presentation:notes draw:style-name="dp12">
          <draw:frame xml:id="id28" draw:id="id28" draw:name="Slide Image Placeholder 1" draw:text-style-name="P39" draw:layer="layout" presentation:style-name="pr9" presentation:class="title" presentation:placeholder="true" svg:width="0.035cm" svg:height="0.937cm" svg:x="0cm" svg:y="0cm">
            <draw:text-box fo:min-height="0.937cm">
              <text:p text:style-name="P40"><text:span/></text:p>
            </draw:text-box>
          </draw:frame>
          <draw:frame xml:id="id29" draw:id="id29" draw:name="Notes Placeholder 2" draw:text-style-name="P41" draw:layer="layout" presentation:style-name="pr10" presentation:class="outline" presentation:placeholder="true" svg:width="0.035cm" svg:height="0.937cm" svg:x="0cm" svg:y="0cm">
            <draw:text-box fo:min-height="0.937cm">
              <text:p text:style-name="P42"><text:span/></text:p>
            </draw:text-box>
          </draw:frame>
          <draw:frame xml:id="id30" draw:id="id30" draw:name="Slide Number Placeholder 3" draw:text-style-name="P43" draw:layer="layout" presentation:style-name="pr11" presentation:class="page-number" presentation:placeholder="true" svg:width="0.035cm" svg:height="0.543cm" svg:x="0cm" svg:y="0cm">
            <draw:text-box fo:min-height="0.543cm">
              <text:p text:style-name="P44"><text:span text:style-name="T13"><text:page-number>&lt;numéro&gt;</text:page-number></text:span></text:p>
            </draw:text-box>
          </draw:frame>
        </presentation:notes>
      </draw:page>
      <draw:page draw:name="Slide_2" draw:style-name="dp13" draw:master-page-name="_______5f__5f__5f_Standard2" presentation:presentation-page-layout-name="AL2">
        <draw:frame xml:id="id31" draw:id="id31" draw:name="Object_ce1" draw:style-name="gr21" draw:transform="rotate(-0) translate(3.288cm,4.426cm)" svg:width="21.2cm" svg:height="4.825cm">
          <table:table table:style-name="ta1">
            <table:table-column table:style-name="co1"/>
            <table:table-column table:style-name="co2"/>
            <table:table-row table:style-name="ro1" table:default-cell-style-name="ce1">
              <table:table-cell table:style-name="ce2">
                <text:p text:style-name="P45"><text:span text:style-name="T14">Niveau</text:span></text:p>
              </table:table-cell>
              <table:table-cell table:style-name="ce3">
                <text:p text:style-name="P46"><text:span text:style-name="T15">Description</text:span></text:p>
              </table:table-cell>
            </table:table-row>
            <table:table-row table:style-name="ro2" table:default-cell-style-name="ce1">
              <table:table-cell table:style-name="ce4">
                <text:p text:style-name="P47"><text:span text:style-name="T16">Niveau 0</text:span></text:p>
              </table:table-cell>
              <table:table-cell table:style-name="ce5">
                <text:p text:style-name="P48"><text:span text:style-name="T17">Manuel</text:span></text:p>
              </table:table-cell>
            </table:table-row>
            <table:table-row table:style-name="ro3" table:default-cell-style-name="ce1">
              <table:table-cell table:style-name="ce6">
                <text:p text:style-name="P49"><text:span text:style-name="T18">Niveau 1</text:span></text:p>
              </table:table-cell>
              <table:table-cell table:style-name="ce7">
                <text:p text:style-name="P50"><text:span text:style-name="T19">Pipeline semi-automatisé</text:span></text:p>
              </table:table-cell>
            </table:table-row>
            <table:table-row table:style-name="ro4" table:default-cell-style-name="ce1">
              <table:table-cell table:style-name="ce8">
                <text:p text:style-name="P51"><text:span text:style-name="T20">Niveau 2</text:span></text:p>
              </table:table-cell>
              <table:table-cell table:style-name="ce9">
                <text:p text:style-name="P52"><text:span text:style-name="T21">Pipeline automatisé + Monitoring</text:span></text:p>
              </table:table-cell>
            </table:table-row>
          </table:table>
        </draw:frame>
        <draw:frame xml:id="id32" draw:id="id32" draw:style-name="gr22" svg:width="13.57cm" svg:height="1.017cm" svg:x="1.01cm" svg:y="0.504cm">
          <draw:text-box fo:min-height="1.017cm">
            <text:p text:style-name="P53"><text:span text:style-name="T22">INTRODUCTION &amp; GÉNÉRALITÉ</text:span></text:p>
          </draw:text-box>
        </draw:frame>
        <draw:frame xml:id="id33" draw:id="id33" draw:style-name="gr23" svg:width="13.21cm" svg:height="1.017cm" svg:x="2.753cm" svg:y="2.079cm">
          <draw:text-box fo:min-height="1.017cm">
            <text:p text:style-name="P54"><text:span text:style-name="T23">Niveau de maturité du </text:span><text:span text:style-name="T24">MLOps </text:span><text:span text:style-name="T25">selon Google</text:span></text:p>
          </draw:text-box>
        </draw:frame>
        <draw:frame xml:id="id34" draw:id="id34" draw:style-name="gr24" svg:width="2.136cm" svg:height="2.851cm" svg:x="0.2158cm" svg:y="13.51cm">
          <draw:image xlink:href="Pictures/image3.png" xlink:type="simple" xlink:show="embed" xlink:actuate="onLoad"/>
        </draw:frame>
        <draw:frame xml:id="id35" draw:id="id35" draw:style-name="gr25" svg:width="1.572cm" svg:height="1.711cm" svg:x="15.96cm" svg:y="7.776cm">
          <draw:image xlink:href="Pictures/image6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random-bars" presentation:preset-sub-type="vertical">
                  <anim:set smil:dur="0.001s" smil:begin="0s" smil:targetElement="id33" smil:attributeName="visibility" smil:fill="hold" smil:to="visible"/>
                  <anim:transitionFilter smil:dur="0.5s" smil:targetElement="id33" smil:subtype="horizontal" smil:type="randomBarWipe" smil:mode="in"/>
                </anim:par>
                <anim:par presentation:node-type="with-previous" smil:begin="0s" smil:fill="hold" presentation:preset-class="entrance" presentation:preset-id="ooo-entrance-random-bars" presentation:preset-sub-type="vertical">
                  <anim:set smil:dur="0.001s" smil:begin="0s" smil:targetElement="id31" smil:attributeName="visibility" smil:fill="hold" smil:to="visible"/>
                  <anim:transitionFilter smil:dur="0.5s" smil:targetElement="id31" smil:subtype="horizontal" smil:type="randomBarWipe" smil:mode="in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fade-in-and-zoom" presentation:preset-sub-type="in">
                  <anim:set smil:dur="0.001s" smil:begin="0s" smil:targetElement="id35" smil:attributeName="visibility" smil:fill="hold" smil:to="visible"/>
                  <anim:animate smil:dur="0.5s" smil:targetElement="id35" smil:attributeName="width" smil:values="0;width" smil:keyTimes="0;1"/>
                  <anim:animate smil:dur="0.5s" smil:targetElement="id35" smil:attributeName="height" smil:values="0;height" smil:keyTimes="0;1"/>
                  <anim:transitionFilter smil:dur="0.5s" smil:targetElement="id35" smil:subtype="crossfade" smil:type="fade" smil:mode="in"/>
                </anim:par>
              </anim:par>
            </anim:par>
          </anim:seq>
        </anim:par>
        <presentation:notes draw:style-name="dp14">
          <draw:frame xml:id="id36" draw:id="id36" draw:name="Slide Image Placeholder 1" draw:text-style-name="P55" draw:layer="layout" presentation:style-name="pr12" presentation:class="title" presentation:placeholder="true" svg:width="0.035cm" svg:height="0.937cm" svg:x="0cm" svg:y="0cm">
            <draw:text-box fo:min-height="0.937cm">
              <text:p text:style-name="P56"><text:span/></text:p>
            </draw:text-box>
          </draw:frame>
          <draw:frame xml:id="id37" draw:id="id37" draw:name="Notes Placeholder 2" draw:text-style-name="P57" draw:layer="layout" presentation:style-name="pr13" presentation:class="outline" presentation:placeholder="true" svg:width="0.035cm" svg:height="0.937cm" svg:x="0cm" svg:y="0cm">
            <draw:text-box fo:min-height="0.937cm">
              <text:p text:style-name="P58"><text:span/></text:p>
            </draw:text-box>
          </draw:frame>
          <draw:frame xml:id="id38" draw:id="id38" draw:name="Slide Number Placeholder 3" draw:text-style-name="P59" draw:layer="layout" presentation:style-name="pr14" presentation:class="page-number" presentation:placeholder="true" svg:width="0.035cm" svg:height="0.543cm" svg:x="0cm" svg:y="0cm">
            <draw:text-box fo:min-height="0.543cm">
              <text:p text:style-name="P60"><text:span text:style-name="T26"><text:page-number>&lt;numéro&gt;</text:page-number></text:span></text:p>
            </draw:text-box>
          </draw:frame>
        </presentation:notes>
      </draw:page>
      <draw:page draw:name="Slide_2" draw:style-name="dp15" draw:master-page-name="_______5f__5f__5f_Standard2" presentation:presentation-page-layout-name="AL2">
        <draw:custom-shape xml:id="id39" draw:id="id39" draw:style-name="gr26" draw:transform="rotate(-37.037456069205426) translate(13.08cm,4.987cm)" svg:width="14.09cm" svg:height="4.776cm">
          <text:p text:style-name="P61"><text:span/></text:p>
          <draw:enhanced-geometry draw:type="flowchart-terminator"/>
        </draw:custom-shape>
        <draw:custom-shape xml:id="id40" draw:id="id40" draw:style-name="gr27" draw:transform="rotate(-37.037456069205426) translate(20.53cm,5.726cm)" svg:width="12.69cm" svg:height="3.142cm">
          <text:p text:style-name="P62"><text:span/></text:p>
          <draw:enhanced-geometry draw:type="flowchart-terminator"/>
        </draw:custom-shape>
        <draw:custom-shape xml:id="id41" draw:id="id41" draw:style-name="gr28" draw:transform="rotate(-40.153218431642124) translate(21.87cm,7.894cm)" svg:width="3.766cm" svg:height="2.491cm">
          <text:p text:style-name="P63"><text:span/></text:p>
          <draw:enhanced-geometry draw:type="flowchart-terminator"/>
        </draw:custom-shape>
        <draw:custom-shape xml:id="id42" draw:id="id42" draw:style-name="gr29" draw:transform="rotate(-37.037456069205426) translate(22.83cm,8.296cm)" svg:width="12.69cm" svg:height="3.126cm">
          <text:p text:style-name="P64"><text:span/></text:p>
          <draw:enhanced-geometry draw:type="flowchart-terminator"/>
        </draw:custom-shape>
        <draw:custom-shape xml:id="id43" draw:id="id43" draw:style-name="gr30" draw:transform="rotate(-37.037456069205426) translate(8.952cm,4.386cm)" svg:width="12.69cm" svg:height="2.287cm">
          <text:p text:style-name="P65"><text:span/></text:p>
          <draw:enhanced-geometry draw:type="flowchart-terminator"/>
        </draw:custom-shape>
        <draw:custom-shape xml:id="id44" draw:id="id44" draw:style-name="gr31" draw:transform="rotate(-37.201343067744105) translate(20.53cm,10.43cm)" svg:width="3.088cm" svg:height="2.003cm">
          <text:p text:style-name="P66"><text:span/></text:p>
          <draw:enhanced-geometry draw:type="flowchart-connector"/>
        </draw:custom-shape>
        <draw:frame xml:id="id45" draw:id="id45" draw:style-name="gr32" svg:width="9.072cm" svg:height="3.811cm" svg:x="1.495cm" svg:y="6.298cm">
          <draw:text-box fo:min-height="3.811cm">
            <text:p text:style-name="P67"><text:span text:style-name="T27">ARCHITECTURE DU</text:span><text:line-break/><text:span text:style-name="T28">SYSTÈME</text:span></text:p>
          </draw:text-box>
        </draw:frame>
        <draw:frame xml:id="id46" draw:id="id46" draw:style-name="gr33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45" smil:attributeName="visibility" smil:fill="hold" smil:to="visible"/>
                  <anim:animate smil:dur="0.8s" smil:targetElement="id45" smil:attributeName="width" smil:values="0;width" smil:keyTimes="0;1"/>
                  <anim:animate smil:dur="0.8s" smil:targetElement="id45" smil:attributeName="height" smil:values="0;height" smil:keyTimes="0;1"/>
                  <anim:animate smil:dur="0.8s" smil:targetElement="id45" smil:attributeName="rotate" smil:values="90;0" smil:keyTimes="0;1"/>
                  <anim:transitionFilter smil:dur="0.8s" smil:targetElement="id45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44" smil:attributeName="visibility" smil:fill="hold" smil:to="visible"/>
                  <anim:animate smil:dur="0.8s" smil:targetElement="id44" smil:attributeName="width" smil:values="0;width" smil:keyTimes="0;1"/>
                  <anim:animate smil:dur="0.8s" smil:targetElement="id44" smil:attributeName="height" smil:values="0;height" smil:keyTimes="0;1"/>
                  <anim:animate smil:dur="0.8s" smil:targetElement="id44" smil:attributeName="rotate" smil:values="90;0" smil:keyTimes="0;1"/>
                  <anim:transitionFilter smil:dur="0.8s" smil:targetElement="id44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43" smil:attributeName="visibility" smil:fill="hold" smil:to="visible"/>
                  <anim:animate smil:dur="0.8s" smil:targetElement="id43" smil:attributeName="width" smil:values="0;width" smil:keyTimes="0;1"/>
                  <anim:animate smil:dur="0.8s" smil:targetElement="id43" smil:attributeName="height" smil:values="0;height" smil:keyTimes="0;1"/>
                  <anim:animate smil:dur="0.8s" smil:targetElement="id43" smil:attributeName="rotate" smil:values="90;0" smil:keyTimes="0;1"/>
                  <anim:transitionFilter smil:dur="0.8s" smil:targetElement="id43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42" smil:attributeName="visibility" smil:fill="hold" smil:to="visible"/>
                  <anim:animate smil:dur="0.8s" smil:targetElement="id42" smil:attributeName="width" smil:values="0;width" smil:keyTimes="0;1"/>
                  <anim:animate smil:dur="0.8s" smil:targetElement="id42" smil:attributeName="height" smil:values="0;height" smil:keyTimes="0;1"/>
                  <anim:animate smil:dur="0.8s" smil:targetElement="id42" smil:attributeName="rotate" smil:values="90;0" smil:keyTimes="0;1"/>
                  <anim:transitionFilter smil:dur="0.8s" smil:targetElement="id42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41" smil:attributeName="visibility" smil:fill="hold" smil:to="visible"/>
                  <anim:animate smil:dur="0.8s" smil:targetElement="id41" smil:attributeName="width" smil:values="0;width" smil:keyTimes="0;1"/>
                  <anim:animate smil:dur="0.8s" smil:targetElement="id41" smil:attributeName="height" smil:values="0;height" smil:keyTimes="0;1"/>
                  <anim:animate smil:dur="0.8s" smil:targetElement="id41" smil:attributeName="rotate" smil:values="90;0" smil:keyTimes="0;1"/>
                  <anim:transitionFilter smil:dur="0.8s" smil:targetElement="id41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40" smil:attributeName="visibility" smil:fill="hold" smil:to="visible"/>
                  <anim:animate smil:dur="0.8s" smil:targetElement="id40" smil:attributeName="width" smil:values="0;width" smil:keyTimes="0;1"/>
                  <anim:animate smil:dur="0.8s" smil:targetElement="id40" smil:attributeName="height" smil:values="0;height" smil:keyTimes="0;1"/>
                  <anim:animate smil:dur="0.8s" smil:targetElement="id40" smil:attributeName="rotate" smil:values="90;0" smil:keyTimes="0;1"/>
                  <anim:transitionFilter smil:dur="0.8s" smil:targetElement="id40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39" smil:attributeName="visibility" smil:fill="hold" smil:to="visible"/>
                  <anim:animate smil:dur="0.8s" smil:targetElement="id39" smil:attributeName="width" smil:values="0;width" smil:keyTimes="0;1"/>
                  <anim:animate smil:dur="0.8s" smil:targetElement="id39" smil:attributeName="height" smil:values="0;height" smil:keyTimes="0;1"/>
                  <anim:animate smil:dur="0.8s" smil:targetElement="id39" smil:attributeName="rotate" smil:values="90;0" smil:keyTimes="0;1"/>
                  <anim:transitionFilter smil:dur="0.8s" smil:targetElement="id39" smil:subtype="crossfade" smil:type="fade" smil:mode="in"/>
                </anim:par>
              </anim:par>
            </anim:par>
          </anim:seq>
        </anim:par>
        <presentation:notes draw:style-name="dp16">
          <draw:frame xml:id="id47" draw:id="id47" draw:name="Slide Image Placeholder 1" draw:text-style-name="P68" draw:layer="layout" presentation:style-name="pr15" presentation:class="title" presentation:placeholder="true" svg:width="0.035cm" svg:height="0.937cm" svg:x="0cm" svg:y="0cm">
            <draw:text-box fo:min-height="0.937cm">
              <text:p text:style-name="P69"><text:span/></text:p>
            </draw:text-box>
          </draw:frame>
          <draw:frame xml:id="id48" draw:id="id48" draw:name="Notes Placeholder 2" draw:text-style-name="P70" draw:layer="layout" presentation:style-name="pr16" presentation:class="outline" presentation:placeholder="true" svg:width="0.035cm" svg:height="0.937cm" svg:x="0cm" svg:y="0cm">
            <draw:text-box fo:min-height="0.937cm">
              <text:p text:style-name="P71"><text:span/></text:p>
            </draw:text-box>
          </draw:frame>
          <draw:frame xml:id="id49" draw:id="id49" draw:name="Slide Number Placeholder 3" draw:text-style-name="P72" draw:layer="layout" presentation:style-name="pr17" presentation:class="page-number" presentation:placeholder="true" svg:width="0.035cm" svg:height="0.543cm" svg:x="0cm" svg:y="0cm">
            <draw:text-box fo:min-height="0.543cm">
              <text:p text:style-name="P73"><text:span text:style-name="T29"><text:page-number>&lt;numéro&gt;</text:page-number></text:span></text:p>
            </draw:text-box>
          </draw:frame>
        </presentation:notes>
      </draw:page>
      <draw:page draw:name="Slide_2" draw:style-name="dp17" draw:master-page-name="_______5f__5f__5f_Standard2" presentation:presentation-page-layout-name="AL2">
        <draw:frame xml:id="id50" draw:id="id50" draw:style-name="gr34" svg:width="13.62cm" svg:height="1.017cm" svg:x="1.01cm" svg:y="0.504cm">
          <draw:text-box fo:min-height="1.017cm">
            <text:p text:style-name="P74"><text:span text:style-name="T30">ARCHITECTURE DU SYSTÈME</text:span></text:p>
          </draw:text-box>
        </draw:frame>
        <draw:frame xml:id="id51" draw:id="id51" draw:style-name="gr35" svg:width="9.433cm" svg:height="10.18cm" svg:x="3.763cm" svg:y="3.923cm">
          <draw:image xlink:href="Pictures/image8.png" xlink:type="simple" xlink:show="embed" xlink:actuate="onLoad"/>
        </draw:frame>
        <draw:frame xml:id="id52" draw:id="id52" draw:style-name="gr36" svg:width="6.641cm" svg:height="1.186cm" svg:x="17.3cm" svg:y="5.106cm">
          <draw:text-box fo:min-height="1.186cm">
            <text:list text:style-name="L39" text:continue-numbering="true">
              <text:list-item>
                <text:p text:style-name="P75"><text:span text:style-name="T31">Exposition</text:span></text:p>
              </text:list-item>
            </text:list>
          </draw:text-box>
        </draw:frame>
        <draw:frame xml:id="id53" draw:id="id53" draw:style-name="gr37" svg:width="13.64cm" svg:height="1.017cm" svg:x="2.479cm" svg:y="1.839cm">
          <draw:text-box fo:min-height="1.017cm">
            <text:list text:style-name="L41" text:continue-numbering="true">
              <text:list-item>
                <text:p text:style-name="P76"><text:span text:style-name="T32">ARCHITECTURE GLOBALE</text:span></text:p>
              </text:list-item>
            </text:list>
          </draw:text-box>
        </draw:frame>
        <draw:frame xml:id="id54" draw:id="id54" draw:style-name="gr38" svg:width="6.659cm" svg:height="1.186cm" svg:x="17.43cm" svg:y="6.724cm">
          <draw:text-box fo:min-height="1.186cm">
            <text:list text:style-name="L43" text:continue-numbering="true">
              <text:list-item>
                <text:p text:style-name="P77"><text:span text:style-name="T33">Applicative</text:span></text:p>
              </text:list-item>
            </text:list>
          </draw:text-box>
        </draw:frame>
        <draw:frame xml:id="id55" draw:id="id55" draw:style-name="gr39" svg:width="6.644cm" svg:height="1.186cm" svg:x="17.52cm" svg:y="8.23cm">
          <draw:text-box fo:min-height="1.186cm">
            <text:list text:style-name="L45" text:continue-numbering="true">
              <text:list-item>
                <text:p text:style-name="P78"><text:span text:style-name="T34">Persistance</text:span></text:p>
              </text:list-item>
            </text:list>
          </draw:text-box>
        </draw:frame>
        <draw:frame xml:id="id56" draw:id="id56" draw:style-name="gr40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split" presentation:preset-sub-type="vertical-in">
                  <anim:set smil:dur="0.001s" smil:begin="0s" smil:targetElement="id51" smil:attributeName="visibility" smil:fill="hold" smil:to="visible"/>
                  <anim:transitionFilter smil:dur="0.5s" smil:targetElement="id51" smil:subtype="vertical" smil:type="barnDoorWipe" smil:mode="in" smil:direction="reverse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fly-in" presentation:preset-sub-type="from-bottom">
                  <anim:set smil:dur="0.001s" smil:begin="0s" smil:targetElement="id52" smil:attributeName="visibility" smil:fill="hold" smil:to="visible"/>
                  <anim:animate smil:dur="0.5s" smil:targetElement="id52" smil:attributeName="x" smil:values="x;x" smil:keyTimes="0;1"/>
                  <anim:animate smil:dur="0.5s" smil:targetElement="id52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fly-in" presentation:preset-sub-type="from-bottom">
                  <anim:set smil:dur="0.001s" smil:begin="0s" smil:targetElement="id54" smil:attributeName="visibility" smil:fill="hold" smil:to="visible"/>
                  <anim:animate smil:dur="0.5s" smil:targetElement="id54" smil:attributeName="x" smil:values="x;x" smil:keyTimes="0;1"/>
                  <anim:animate smil:dur="0.5s" smil:targetElement="id54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fly-in" presentation:preset-sub-type="from-bottom">
                  <anim:set smil:dur="0.001s" smil:begin="0s" smil:targetElement="id55" smil:attributeName="visibility" smil:fill="hold" smil:to="visible"/>
                  <anim:animate smil:dur="0.5s" smil:targetElement="id55" smil:attributeName="x" smil:values="x;x" smil:keyTimes="0;1"/>
                  <anim:animate smil:dur="0.5s" smil:targetElement="id55" smil:attributeName="y" smil:values="1+height/2;y" smil:keyTimes="0;1"/>
                </anim:par>
              </anim:par>
            </anim:par>
          </anim:seq>
        </anim:par>
        <presentation:notes draw:style-name="dp18">
          <draw:frame xml:id="id57" draw:id="id57" draw:name="Slide Image Placeholder 1" draw:text-style-name="P79" draw:layer="layout" presentation:style-name="pr18" presentation:class="title" presentation:placeholder="true" svg:width="0.035cm" svg:height="0.937cm" svg:x="0cm" svg:y="0cm">
            <draw:text-box fo:min-height="0.937cm">
              <text:p text:style-name="P80"><text:span/></text:p>
            </draw:text-box>
          </draw:frame>
          <draw:frame xml:id="id58" draw:id="id58" draw:name="Notes Placeholder 2" draw:text-style-name="P81" draw:layer="layout" presentation:style-name="pr19" presentation:class="outline" presentation:placeholder="true" svg:width="0.035cm" svg:height="0.937cm" svg:x="0cm" svg:y="0cm">
            <draw:text-box fo:min-height="0.937cm">
              <text:p text:style-name="P82"><text:span/></text:p>
            </draw:text-box>
          </draw:frame>
          <draw:frame xml:id="id59" draw:id="id59" draw:name="Slide Number Placeholder 3" draw:text-style-name="P83" draw:layer="layout" presentation:style-name="pr20" presentation:class="page-number" presentation:placeholder="true" svg:width="0.035cm" svg:height="0.543cm" svg:x="0cm" svg:y="0cm">
            <draw:text-box fo:min-height="0.543cm">
              <text:p text:style-name="P84"><text:span text:style-name="T35"><text:page-number>&lt;numéro&gt;</text:page-number></text:span></text:p>
            </draw:text-box>
          </draw:frame>
        </presentation:notes>
      </draw:page>
      <draw:page draw:name="Slide_2" draw:style-name="dp19" draw:master-page-name="_______5f__5f__5f_Standard2" presentation:presentation-page-layout-name="AL2">
        <draw:frame xml:id="id60" draw:id="id60" draw:style-name="gr41" svg:width="13.62cm" svg:height="1.017cm" svg:x="1.01cm" svg:y="0.504cm">
          <draw:text-box fo:min-height="1.017cm">
            <text:p text:style-name="P85"><text:span text:style-name="T36">ARCHITECTURE DU SYSTÈME</text:span></text:p>
          </draw:text-box>
        </draw:frame>
        <draw:frame xml:id="id61" draw:id="id61" draw:style-name="gr42" svg:width="13.64cm" svg:height="1.017cm" svg:x="2.479cm" svg:y="1.764cm">
          <draw:text-box fo:min-height="1.017cm">
            <text:list text:style-name="L51" text:continue-numbering="true">
              <text:list-item>
                <text:p text:style-name="P86"><text:span text:style-name="T37">ARCHITECTURE GLOBALE</text:span></text:p>
              </text:list-item>
            </text:list>
          </draw:text-box>
        </draw:frame>
        <draw:frame xml:id="id62" draw:id="id62" draw:style-name="gr43" svg:width="21.21cm" svg:height="12.98cm" svg:x="3.88cm" svg:y="2.781cm">
          <draw:image xlink:href="Pictures/image9.jpg" xlink:type="simple" xlink:show="embed" xlink:actuate="onLoad"/>
        </draw:frame>
        <draw:frame xml:id="id63" draw:id="id63" draw:style-name="gr44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wheel" presentation:preset-sub-type="1">
                  <anim:set smil:dur="0.001s" smil:begin="0s" smil:targetElement="id62" smil:attributeName="visibility" smil:fill="hold" smil:to="visible"/>
                  <anim:transitionFilter smil:dur="1s" smil:targetElement="id62" smil:subtype="oneBlade" smil:type="pinWheelWipe" smil:mode="in"/>
                </anim:par>
              </anim:par>
            </anim:par>
          </anim:seq>
        </anim:par>
        <presentation:notes draw:style-name="dp20">
          <draw:frame xml:id="id64" draw:id="id64" draw:name="Slide Image Placeholder 1" draw:text-style-name="P87" draw:layer="layout" presentation:style-name="pr21" presentation:class="title" presentation:placeholder="true" svg:width="0.035cm" svg:height="0.937cm" svg:x="0cm" svg:y="0cm">
            <draw:text-box fo:min-height="0.937cm">
              <text:p text:style-name="P88"><text:span/></text:p>
            </draw:text-box>
          </draw:frame>
          <draw:frame xml:id="id65" draw:id="id65" draw:name="Notes Placeholder 2" draw:text-style-name="P89" draw:layer="layout" presentation:style-name="pr22" presentation:class="outline" presentation:placeholder="true" svg:width="0.035cm" svg:height="0.937cm" svg:x="0cm" svg:y="0cm">
            <draw:text-box fo:min-height="0.937cm">
              <text:p text:style-name="P90"><text:span/></text:p>
            </draw:text-box>
          </draw:frame>
          <draw:frame xml:id="id66" draw:id="id66" draw:name="Slide Number Placeholder 3" draw:text-style-name="P91" draw:layer="layout" presentation:style-name="pr23" presentation:class="page-number" presentation:placeholder="true" svg:width="0.035cm" svg:height="0.543cm" svg:x="0cm" svg:y="0cm">
            <draw:text-box fo:min-height="0.543cm">
              <text:p text:style-name="P92"><text:span text:style-name="T38"><text:page-number>&lt;numéro&gt;</text:page-number></text:span></text:p>
            </draw:text-box>
          </draw:frame>
        </presentation:notes>
      </draw:page>
      <draw:page draw:name="Slide_2" draw:style-name="dp21" draw:master-page-name="_______5f__5f__5f_Standard2" presentation:presentation-page-layout-name="AL2">
        <draw:frame xml:id="id67" draw:id="id67" draw:style-name="gr45" svg:width="13.62cm" svg:height="1.017cm" svg:x="1.01cm" svg:y="0.504cm">
          <draw:text-box fo:min-height="1.017cm">
            <text:p text:style-name="P93"><text:span text:style-name="T39">ARCHITECTURE DU SYSTÈME</text:span></text:p>
          </draw:text-box>
        </draw:frame>
        <draw:frame xml:id="id68" draw:id="id68" draw:style-name="gr46" svg:width="13.73cm" svg:height="1.017cm" svg:x="2.479cm" svg:y="1.764cm">
          <draw:text-box fo:min-height="1.017cm">
            <text:list text:style-name="L57" text:continue-numbering="true">
              <text:list-item>
                <text:p text:style-name="P94"><text:span text:style-name="T40">ARCHITECTURE CONCEPTUELLE</text:span></text:p>
              </text:list-item>
            </text:list>
          </draw:text-box>
        </draw:frame>
        <draw:frame xml:id="id69" draw:id="id69" draw:style-name="gr47" svg:width="26.62cm" svg:height="13.17cm" svg:x="1.383cm" svg:y="2.676cm">
          <draw:image xlink:href="Pictures/image10.png" xlink:type="simple" xlink:show="embed" xlink:actuate="onLoad"/>
        </draw:frame>
        <draw:frame xml:id="id70" draw:id="id70" draw:style-name="gr48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wheel" presentation:preset-sub-type="1">
                  <anim:set smil:dur="0.001s" smil:begin="0s" smil:targetElement="id69" smil:attributeName="visibility" smil:fill="hold" smil:to="visible"/>
                  <anim:transitionFilter smil:dur="1s" smil:targetElement="id69" smil:subtype="oneBlade" smil:type="pinWheelWipe" smil:mode="in"/>
                </anim:par>
              </anim:par>
            </anim:par>
          </anim:seq>
        </anim:par>
        <presentation:notes draw:style-name="dp22">
          <draw:frame xml:id="id71" draw:id="id71" draw:name="Slide Image Placeholder 1" draw:text-style-name="P95" draw:layer="layout" presentation:style-name="pr24" presentation:class="title" presentation:placeholder="true" svg:width="0.035cm" svg:height="0.937cm" svg:x="0cm" svg:y="0cm">
            <draw:text-box fo:min-height="0.937cm">
              <text:p text:style-name="P96"><text:span/></text:p>
            </draw:text-box>
          </draw:frame>
          <draw:frame xml:id="id72" draw:id="id72" draw:name="Notes Placeholder 2" draw:text-style-name="P97" draw:layer="layout" presentation:style-name="pr25" presentation:class="outline" presentation:placeholder="true" svg:width="0.035cm" svg:height="0.937cm" svg:x="0cm" svg:y="0cm">
            <draw:text-box fo:min-height="0.937cm">
              <text:p text:style-name="P98"><text:span/></text:p>
            </draw:text-box>
          </draw:frame>
          <draw:frame xml:id="id73" draw:id="id73" draw:name="Slide Number Placeholder 3" draw:text-style-name="P99" draw:layer="layout" presentation:style-name="pr26" presentation:class="page-number" presentation:placeholder="true" svg:width="0.035cm" svg:height="0.543cm" svg:x="0cm" svg:y="0cm">
            <draw:text-box fo:min-height="0.543cm">
              <text:p text:style-name="P100"><text:span text:style-name="T41"><text:page-number>&lt;numéro&gt;</text:page-number></text:span></text:p>
            </draw:text-box>
          </draw:frame>
        </presentation:notes>
      </draw:page>
      <draw:page draw:name="Slide_2" draw:style-name="dp23" draw:master-page-name="_______5f__5f__5f_Standard2" presentation:presentation-page-layout-name="AL2">
        <draw:frame xml:id="id74" draw:id="id74" draw:style-name="gr49" svg:width="13.62cm" svg:height="1.017cm" svg:x="1.01cm" svg:y="0.504cm">
          <draw:text-box fo:min-height="1.017cm">
            <text:p text:style-name="P101"><text:span text:style-name="T42">ARCHITECTURE DU SYSTÈME</text:span></text:p>
          </draw:text-box>
        </draw:frame>
        <draw:frame xml:id="id75" draw:id="id75" draw:style-name="gr50" svg:width="19.1cm" svg:height="1.017cm" svg:x="2.479cm" svg:y="1.764cm">
          <draw:text-box fo:min-height="1.017cm">
            <text:list text:style-name="L63" text:continue-numbering="true">
              <text:list-item>
                <text:p text:style-name="P102"><text:span text:style-name="T43">ARCHITECTURE CONCEPTUELLE(ANALYSE)</text:span></text:p>
              </text:list-item>
            </text:list>
          </draw:text-box>
        </draw:frame>
        <draw:frame xml:id="id76" draw:id="id76" draw:style-name="gr51" svg:width="26.21cm" svg:height="12.98cm" svg:x="1.793cm" svg:y="2.837cm">
          <draw:image xlink:href="Pictures/image11.png" xlink:type="simple" xlink:show="embed" xlink:actuate="onLoad"/>
        </draw:frame>
        <draw:frame xml:id="id77" draw:id="id77" draw:style-name="gr52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wheel" presentation:preset-sub-type="1">
                  <anim:set smil:dur="0.001s" smil:begin="0s" smil:targetElement="id76" smil:attributeName="visibility" smil:fill="hold" smil:to="visible"/>
                  <anim:transitionFilter smil:dur="1s" smil:targetElement="id76" smil:subtype="oneBlade" smil:type="pinWheelWipe" smil:mode="in"/>
                </anim:par>
              </anim:par>
            </anim:par>
          </anim:seq>
        </anim:par>
        <presentation:notes draw:style-name="dp24">
          <draw:frame xml:id="id78" draw:id="id78" draw:name="Slide Image Placeholder 1" draw:text-style-name="P103" draw:layer="layout" presentation:style-name="pr27" presentation:class="title" presentation:placeholder="true" svg:width="0.035cm" svg:height="0.937cm" svg:x="0cm" svg:y="0cm">
            <draw:text-box fo:min-height="0.937cm">
              <text:p text:style-name="P104"><text:span/></text:p>
            </draw:text-box>
          </draw:frame>
          <draw:frame xml:id="id79" draw:id="id79" draw:name="Notes Placeholder 2" draw:text-style-name="P105" draw:layer="layout" presentation:style-name="pr28" presentation:class="outline" presentation:placeholder="true" svg:width="0.035cm" svg:height="0.937cm" svg:x="0cm" svg:y="0cm">
            <draw:text-box fo:min-height="0.937cm">
              <text:p text:style-name="P106"><text:span/></text:p>
            </draw:text-box>
          </draw:frame>
          <draw:frame xml:id="id80" draw:id="id80" draw:name="Slide Number Placeholder 3" draw:text-style-name="P107" draw:layer="layout" presentation:style-name="pr29" presentation:class="page-number" presentation:placeholder="true" svg:width="0.035cm" svg:height="0.543cm" svg:x="0cm" svg:y="0cm">
            <draw:text-box fo:min-height="0.543cm">
              <text:p text:style-name="P108"><text:span text:style-name="T44"><text:page-number>&lt;numéro&gt;</text:page-number></text:span></text:p>
            </draw:text-box>
          </draw:frame>
        </presentation:notes>
      </draw:page>
      <draw:page draw:name="Slide_2" draw:style-name="dp25" draw:master-page-name="_______5f__5f__5f_Standard2" presentation:presentation-page-layout-name="AL2">
        <draw:frame xml:id="id81" draw:id="id81" draw:style-name="gr53" svg:width="13.62cm" svg:height="1.017cm" svg:x="1.01cm" svg:y="0.504cm">
          <draw:text-box fo:min-height="1.017cm">
            <text:p text:style-name="P109"><text:span text:style-name="T45">ARCHITECTURE DU SYSTÈME</text:span></text:p>
          </draw:text-box>
        </draw:frame>
        <draw:frame xml:id="id82" draw:id="id82" draw:style-name="gr54" svg:width="19.11cm" svg:height="1.017cm" svg:x="2.479cm" svg:y="1.764cm">
          <draw:text-box fo:min-height="1.017cm">
            <text:list text:style-name="L69" text:continue-numbering="true">
              <text:list-item>
                <text:p text:style-name="P110"><text:span text:style-name="T46">ARCHITECTURE CONCEPTUELLE(ML)</text:span></text:p>
              </text:list-item>
            </text:list>
          </draw:text-box>
        </draw:frame>
        <draw:frame xml:id="id83" draw:id="id83" draw:style-name="gr55" svg:width="23.92cm" svg:height="11.51cm" svg:x="3.111cm" svg:y="4.211cm">
          <draw:image xlink:href="Pictures/image12.png" xlink:type="simple" xlink:show="embed" xlink:actuate="onLoad"/>
        </draw:frame>
        <draw:frame xml:id="id84" draw:id="id84" draw:style-name="gr56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wheel" presentation:preset-sub-type="1">
                  <anim:set smil:dur="0.001s" smil:begin="0s" smil:targetElement="id83" smil:attributeName="visibility" smil:fill="hold" smil:to="visible"/>
                  <anim:transitionFilter smil:dur="1s" smil:targetElement="id83" smil:subtype="oneBlade" smil:type="pinWheelWipe" smil:mode="in"/>
                </anim:par>
              </anim:par>
            </anim:par>
          </anim:seq>
        </anim:par>
        <presentation:notes draw:style-name="dp26">
          <draw:frame xml:id="id85" draw:id="id85" draw:name="Slide Image Placeholder 1" draw:text-style-name="P111" draw:layer="layout" presentation:style-name="pr30" presentation:class="title" presentation:placeholder="true" svg:width="0.035cm" svg:height="0.937cm" svg:x="0cm" svg:y="0cm">
            <draw:text-box fo:min-height="0.937cm">
              <text:p text:style-name="P112"><text:span/></text:p>
            </draw:text-box>
          </draw:frame>
          <draw:frame xml:id="id86" draw:id="id86" draw:name="Notes Placeholder 2" draw:text-style-name="P113" draw:layer="layout" presentation:style-name="pr31" presentation:class="outline" presentation:placeholder="true" svg:width="0.035cm" svg:height="0.937cm" svg:x="0cm" svg:y="0cm">
            <draw:text-box fo:min-height="0.937cm">
              <text:p text:style-name="P114"><text:span/></text:p>
            </draw:text-box>
          </draw:frame>
          <draw:frame xml:id="id87" draw:id="id87" draw:name="Slide Number Placeholder 3" draw:text-style-name="P115" draw:layer="layout" presentation:style-name="pr32" presentation:class="page-number" presentation:placeholder="true" svg:width="0.035cm" svg:height="0.543cm" svg:x="0cm" svg:y="0cm">
            <draw:text-box fo:min-height="0.543cm">
              <text:p text:style-name="P116"><text:span text:style-name="T47"><text:page-number>&lt;numéro&gt;</text:page-number></text:span></text:p>
            </draw:text-box>
          </draw:frame>
        </presentation:notes>
      </draw:page>
      <draw:page draw:name="Slide_2" draw:style-name="dp27" draw:master-page-name="_______5f__5f__5f_Standard2" presentation:presentation-page-layout-name="AL2">
        <draw:frame xml:id="id88" draw:id="id88" draw:style-name="gr57" svg:width="13.62cm" svg:height="1.017cm" svg:x="1.01cm" svg:y="0.504cm">
          <draw:text-box fo:min-height="1.017cm">
            <text:p text:style-name="P117"><text:span text:style-name="T48">ARCHITECTURE DU SYSTÈME</text:span></text:p>
          </draw:text-box>
        </draw:frame>
        <draw:frame xml:id="id89" draw:id="id89" draw:style-name="gr58" svg:width="19.12cm" svg:height="1.017cm" svg:x="2.479cm" svg:y="1.764cm">
          <draw:text-box fo:min-height="1.017cm">
            <text:list text:style-name="L75" text:continue-numbering="true">
              <text:list-item>
                <text:p text:style-name="P118"><text:span text:style-name="T49">ARCHITECTURE CONCEPTUELLE(MONITORING)</text:span></text:p>
              </text:list-item>
            </text:list>
          </draw:text-box>
        </draw:frame>
        <draw:frame xml:id="id90" draw:id="id90" draw:style-name="gr59" svg:width="27.28cm" svg:height="12.33cm" svg:x="0.844cm" svg:y="3.424cm">
          <draw:image xlink:href="Pictures/image13.png" xlink:type="simple" xlink:show="embed" xlink:actuate="onLoad"/>
        </draw:frame>
        <draw:frame xml:id="id91" draw:id="id91" draw:style-name="gr60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wheel" presentation:preset-sub-type="1">
                  <anim:set smil:dur="0.001s" smil:begin="0s" smil:targetElement="id90" smil:attributeName="visibility" smil:fill="hold" smil:to="visible"/>
                  <anim:transitionFilter smil:dur="1s" smil:targetElement="id90" smil:subtype="oneBlade" smil:type="pinWheelWipe" smil:mode="in"/>
                </anim:par>
              </anim:par>
            </anim:par>
          </anim:seq>
        </anim:par>
        <presentation:notes draw:style-name="dp28">
          <draw:frame xml:id="id92" draw:id="id92" draw:name="Slide Image Placeholder 1" draw:text-style-name="P119" draw:layer="layout" presentation:style-name="pr33" presentation:class="title" presentation:placeholder="true" svg:width="0.035cm" svg:height="0.937cm" svg:x="0cm" svg:y="0cm">
            <draw:text-box fo:min-height="0.937cm">
              <text:p text:style-name="P120"><text:span/></text:p>
            </draw:text-box>
          </draw:frame>
          <draw:frame xml:id="id93" draw:id="id93" draw:name="Notes Placeholder 2" draw:text-style-name="P121" draw:layer="layout" presentation:style-name="pr34" presentation:class="outline" presentation:placeholder="true" svg:width="0.035cm" svg:height="0.937cm" svg:x="0cm" svg:y="0cm">
            <draw:text-box fo:min-height="0.937cm">
              <text:p text:style-name="P122"><text:span/></text:p>
            </draw:text-box>
          </draw:frame>
          <draw:frame xml:id="id94" draw:id="id94" draw:name="Slide Number Placeholder 3" draw:text-style-name="P123" draw:layer="layout" presentation:style-name="pr35" presentation:class="page-number" presentation:placeholder="true" svg:width="0.035cm" svg:height="0.543cm" svg:x="0cm" svg:y="0cm">
            <draw:text-box fo:min-height="0.543cm">
              <text:p text:style-name="P124"><text:span text:style-name="T50"><text:page-number>&lt;numéro&gt;</text:page-number></text:span></text:p>
            </draw:text-box>
          </draw:frame>
        </presentation:notes>
      </draw:page>
      <draw:page draw:name="Slide_2" draw:style-name="dp29" draw:master-page-name="_______5f__5f__5f_Standard2" presentation:presentation-page-layout-name="AL2">
        <draw:custom-shape xml:id="id95" draw:id="id95" draw:style-name="gr61" draw:transform="rotate(-37.037456069205426) translate(13.08cm,4.987cm)" svg:width="14.09cm" svg:height="4.776cm">
          <text:p text:style-name="P125"><text:span/></text:p>
          <draw:enhanced-geometry draw:type="flowchart-terminator"/>
        </draw:custom-shape>
        <draw:custom-shape xml:id="id96" draw:id="id96" draw:style-name="gr62" draw:transform="rotate(-37.037456069205426) translate(20.53cm,5.726cm)" svg:width="12.69cm" svg:height="3.142cm">
          <text:p text:style-name="P126"><text:span/></text:p>
          <draw:enhanced-geometry draw:type="flowchart-terminator"/>
        </draw:custom-shape>
        <draw:custom-shape xml:id="id97" draw:id="id97" draw:style-name="gr63" draw:transform="rotate(-40.153218431642124) translate(21.87cm,7.894cm)" svg:width="3.766cm" svg:height="2.491cm">
          <text:p text:style-name="P127"><text:span/></text:p>
          <draw:enhanced-geometry draw:type="flowchart-terminator"/>
        </draw:custom-shape>
        <draw:custom-shape xml:id="id98" draw:id="id98" draw:style-name="gr64" draw:transform="rotate(-37.037456069205426) translate(22.83cm,8.296cm)" svg:width="12.69cm" svg:height="3.126cm">
          <text:p text:style-name="P128"><text:span/></text:p>
          <draw:enhanced-geometry draw:type="flowchart-terminator"/>
        </draw:custom-shape>
        <draw:custom-shape xml:id="id99" draw:id="id99" draw:style-name="gr65" draw:transform="rotate(-37.037456069205426) translate(8.952cm,4.386cm)" svg:width="12.69cm" svg:height="2.287cm">
          <text:p text:style-name="P129"><text:span/></text:p>
          <draw:enhanced-geometry draw:type="flowchart-terminator"/>
        </draw:custom-shape>
        <draw:custom-shape xml:id="id100" draw:id="id100" draw:style-name="gr66" draw:transform="rotate(-37.201343067744105) translate(20.53cm,10.43cm)" svg:width="3.088cm" svg:height="2.003cm">
          <text:p text:style-name="P130"><text:span/></text:p>
          <draw:enhanced-geometry draw:type="flowchart-connector"/>
        </draw:custom-shape>
        <draw:frame xml:id="id101" draw:id="id101" draw:style-name="gr67" svg:width="10.21cm" svg:height="2.626cm" svg:x="1.495cm" svg:y="6.298cm">
          <draw:text-box fo:min-height="2.626cm">
            <text:p text:style-name="P131"><text:span text:style-name="T51">INFRASTRUCTURE AWS</text:span></text:p>
          </draw:text-box>
        </draw:frame>
        <draw:frame xml:id="id102" draw:id="id102" draw:style-name="gr68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101" smil:attributeName="visibility" smil:fill="hold" smil:to="visible"/>
                  <anim:animate smil:dur="0.8s" smil:targetElement="id101" smil:attributeName="width" smil:values="0;width" smil:keyTimes="0;1"/>
                  <anim:animate smil:dur="0.8s" smil:targetElement="id101" smil:attributeName="height" smil:values="0;height" smil:keyTimes="0;1"/>
                  <anim:animate smil:dur="0.8s" smil:targetElement="id101" smil:attributeName="rotate" smil:values="90;0" smil:keyTimes="0;1"/>
                  <anim:transitionFilter smil:dur="0.8s" smil:targetElement="id101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100" smil:attributeName="visibility" smil:fill="hold" smil:to="visible"/>
                  <anim:animate smil:dur="0.8s" smil:targetElement="id100" smil:attributeName="width" smil:values="0;width" smil:keyTimes="0;1"/>
                  <anim:animate smil:dur="0.8s" smil:targetElement="id100" smil:attributeName="height" smil:values="0;height" smil:keyTimes="0;1"/>
                  <anim:animate smil:dur="0.8s" smil:targetElement="id100" smil:attributeName="rotate" smil:values="90;0" smil:keyTimes="0;1"/>
                  <anim:transitionFilter smil:dur="0.8s" smil:targetElement="id100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99" smil:attributeName="visibility" smil:fill="hold" smil:to="visible"/>
                  <anim:animate smil:dur="0.8s" smil:targetElement="id99" smil:attributeName="width" smil:values="0;width" smil:keyTimes="0;1"/>
                  <anim:animate smil:dur="0.8s" smil:targetElement="id99" smil:attributeName="height" smil:values="0;height" smil:keyTimes="0;1"/>
                  <anim:animate smil:dur="0.8s" smil:targetElement="id99" smil:attributeName="rotate" smil:values="90;0" smil:keyTimes="0;1"/>
                  <anim:transitionFilter smil:dur="0.8s" smil:targetElement="id99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98" smil:attributeName="visibility" smil:fill="hold" smil:to="visible"/>
                  <anim:animate smil:dur="0.8s" smil:targetElement="id98" smil:attributeName="width" smil:values="0;width" smil:keyTimes="0;1"/>
                  <anim:animate smil:dur="0.8s" smil:targetElement="id98" smil:attributeName="height" smil:values="0;height" smil:keyTimes="0;1"/>
                  <anim:animate smil:dur="0.8s" smil:targetElement="id98" smil:attributeName="rotate" smil:values="90;0" smil:keyTimes="0;1"/>
                  <anim:transitionFilter smil:dur="0.8s" smil:targetElement="id98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97" smil:attributeName="visibility" smil:fill="hold" smil:to="visible"/>
                  <anim:animate smil:dur="0.8s" smil:targetElement="id97" smil:attributeName="width" smil:values="0;width" smil:keyTimes="0;1"/>
                  <anim:animate smil:dur="0.8s" smil:targetElement="id97" smil:attributeName="height" smil:values="0;height" smil:keyTimes="0;1"/>
                  <anim:animate smil:dur="0.8s" smil:targetElement="id97" smil:attributeName="rotate" smil:values="90;0" smil:keyTimes="0;1"/>
                  <anim:transitionFilter smil:dur="0.8s" smil:targetElement="id97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96" smil:attributeName="visibility" smil:fill="hold" smil:to="visible"/>
                  <anim:animate smil:dur="0.8s" smil:targetElement="id96" smil:attributeName="width" smil:values="0;width" smil:keyTimes="0;1"/>
                  <anim:animate smil:dur="0.8s" smil:targetElement="id96" smil:attributeName="height" smil:values="0;height" smil:keyTimes="0;1"/>
                  <anim:animate smil:dur="0.8s" smil:targetElement="id96" smil:attributeName="rotate" smil:values="90;0" smil:keyTimes="0;1"/>
                  <anim:transitionFilter smil:dur="0.8s" smil:targetElement="id96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95" smil:attributeName="visibility" smil:fill="hold" smil:to="visible"/>
                  <anim:animate smil:dur="0.8s" smil:targetElement="id95" smil:attributeName="width" smil:values="0;width" smil:keyTimes="0;1"/>
                  <anim:animate smil:dur="0.8s" smil:targetElement="id95" smil:attributeName="height" smil:values="0;height" smil:keyTimes="0;1"/>
                  <anim:animate smil:dur="0.8s" smil:targetElement="id95" smil:attributeName="rotate" smil:values="90;0" smil:keyTimes="0;1"/>
                  <anim:transitionFilter smil:dur="0.8s" smil:targetElement="id95" smil:subtype="crossfade" smil:type="fade" smil:mode="in"/>
                </anim:par>
              </anim:par>
            </anim:par>
          </anim:seq>
        </anim:par>
        <presentation:notes draw:style-name="dp30">
          <draw:frame xml:id="id103" draw:id="id103" draw:name="Slide Image Placeholder 1" draw:text-style-name="P132" draw:layer="layout" presentation:style-name="pr36" presentation:class="title" presentation:placeholder="true" svg:width="0.035cm" svg:height="0.937cm" svg:x="0cm" svg:y="0cm">
            <draw:text-box fo:min-height="0.937cm">
              <text:p text:style-name="P133"><text:span/></text:p>
            </draw:text-box>
          </draw:frame>
          <draw:frame xml:id="id104" draw:id="id104" draw:name="Notes Placeholder 2" draw:text-style-name="P134" draw:layer="layout" presentation:style-name="pr37" presentation:class="outline" presentation:placeholder="true" svg:width="0.035cm" svg:height="0.937cm" svg:x="0cm" svg:y="0cm">
            <draw:text-box fo:min-height="0.937cm">
              <text:p text:style-name="P135"><text:span/></text:p>
            </draw:text-box>
          </draw:frame>
          <draw:frame xml:id="id105" draw:id="id105" draw:name="Slide Number Placeholder 3" draw:text-style-name="P136" draw:layer="layout" presentation:style-name="pr38" presentation:class="page-number" presentation:placeholder="true" svg:width="0.035cm" svg:height="0.543cm" svg:x="0cm" svg:y="0cm">
            <draw:text-box fo:min-height="0.543cm">
              <text:p text:style-name="P137"><text:span text:style-name="T52"><text:page-number>&lt;numéro&gt;</text:page-number></text:span></text:p>
            </draw:text-box>
          </draw:frame>
        </presentation:notes>
      </draw:page>
      <draw:page draw:name="Slide_2" draw:style-name="dp31" draw:master-page-name="_______5f__5f__5f_Standard2" presentation:presentation-page-layout-name="AL2">
        <draw:frame xml:id="id106" draw:id="id106" draw:style-name="gr69" svg:width="13.64cm" svg:height="1.017cm" svg:x="1.01cm" svg:y="0.504cm">
          <draw:text-box fo:min-height="1.017cm">
            <text:p text:style-name="P138"><text:span text:style-name="T53">INFRASTRUCTURE AWS</text:span></text:p>
          </draw:text-box>
        </draw:frame>
        <draw:frame xml:id="id107" draw:id="id107" draw:style-name="gr70" svg:width="5.429cm" svg:height="5.357cm" svg:x="6.314cm" svg:y="2.781cm">
          <draw:image xlink:href="Pictures/image15.png" xlink:type="simple" xlink:show="embed" xlink:actuate="onLoad"/>
        </draw:frame>
        <draw:frame xml:id="id108" draw:id="id108" draw:style-name="gr71" svg:width="5.168cm" svg:height="1.017cm" svg:x="2.479cm" svg:y="1.764cm">
          <draw:text-box fo:min-height="1.017cm">
            <text:list text:style-name="L91" text:continue-numbering="true">
              <text:list-item>
                <text:p text:style-name="P139"><text:span text:style-name="T54">AMAZON S3</text:span></text:p>
              </text:list-item>
            </text:list>
          </draw:text-box>
        </draw:frame>
        <draw:frame xml:id="id109" draw:id="id109" draw:style-name="gr72" svg:width="17.49cm" svg:height="8.13cm" svg:x="7.305cm" svg:y="6.977cm">
          <draw:text-box fo:min-height="8.13cm">
            <text:list text:style-name="L93" text:continue-numbering="true">
              <text:list-item>
                <text:p text:style-name="P140"><text:span text:style-name="T55">Stockage du dataset au format .parquet </text:span></text:p>
              </text:list-item>
            </text:list>
            <text:p text:style-name="P141"><text:span text:style-name="T55"/></text:p>
            <text:list text:style-name="L94" text:continue-numbering="true">
              <text:list-item>
                <text:p text:style-name="P142"><text:span text:style-name="T56">Stockage des artefacts du modèle </text:span></text:p>
              </text:list-item>
            </text:list>
            <text:p text:style-name="P143"><text:span/></text:p>
            <text:p text:style-name="P144"><text:span text:style-name="T57">model.pkl</text:span></text:p>
            <text:p text:style-name="P145"><text:span text:style-name="T58">scaler.pkl</text:span></text:p>
            <text:p text:style-name="P146"><text:span text:style-name="T59">encoding.pkl</text:span></text:p>
            <text:p text:style-name="P147"><text:span text:style-name="T60">feature.pkl</text:span></text:p>
            <text:p text:style-name="P148"><text:span text:style-name="T61">split.pkl</text:span></text:p>
            <text:p text:style-name="P149"><text:span text:style-name="T62">metrics.json</text:span></text:p>
            <text:p text:style-name="P150"><text:span text:style-name="T62"/></text:p>
            <text:list text:style-name="L95" text:continue-numbering="true">
              <text:list-item>
                <text:p text:style-name="P151"><text:span text:style-name="T63">Backups automatique</text:span></text:p>
              </text:list-item>
            </text:list>
          </draw:text-box>
        </draw:frame>
        <draw:frame xml:id="id110" draw:id="id110" draw:style-name="gr73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split" presentation:preset-sub-type="vertical-in">
                  <anim:set smil:dur="0.001s" smil:begin="0s" smil:targetElement="id107" smil:attributeName="visibility" smil:fill="hold" smil:to="visible"/>
                  <anim:transitionFilter smil:dur="0.5s" smil:targetElement="id107" smil:subtype="vertical" smil:type="barnDoorWipe" smil:mode="in" smil:direction="reverse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random-bars" presentation:preset-sub-type="vertical">
                  <anim:set smil:dur="0.001s" smil:begin="0s" smil:targetElement="id109" smil:attributeName="visibility" smil:fill="hold" smil:to="visible"/>
                  <anim:transitionFilter smil:dur="0.5s" smil:targetElement="id109" smil:subtype="horizontal" smil:type="randomBarWipe" smil:mode="in"/>
                </anim:par>
              </anim:par>
            </anim:par>
          </anim:seq>
        </anim:par>
        <presentation:notes draw:style-name="dp32">
          <draw:frame xml:id="id111" draw:id="id111" draw:name="Slide Image Placeholder 1" draw:text-style-name="P152" draw:layer="layout" presentation:style-name="pr39" presentation:class="title" presentation:placeholder="true" svg:width="0.035cm" svg:height="0.937cm" svg:x="0cm" svg:y="0cm">
            <draw:text-box fo:min-height="0.937cm">
              <text:p text:style-name="P153"><text:span/></text:p>
            </draw:text-box>
          </draw:frame>
          <draw:frame xml:id="id112" draw:id="id112" draw:name="Notes Placeholder 2" draw:text-style-name="P154" draw:layer="layout" presentation:style-name="pr40" presentation:class="outline" presentation:placeholder="true" svg:width="0.035cm" svg:height="0.937cm" svg:x="0cm" svg:y="0cm">
            <draw:text-box fo:min-height="0.937cm">
              <text:p text:style-name="P155"><text:span/></text:p>
            </draw:text-box>
          </draw:frame>
          <draw:frame xml:id="id113" draw:id="id113" draw:name="Slide Number Placeholder 3" draw:text-style-name="P156" draw:layer="layout" presentation:style-name="pr41" presentation:class="page-number" presentation:placeholder="true" svg:width="0.035cm" svg:height="0.543cm" svg:x="0cm" svg:y="0cm">
            <draw:text-box fo:min-height="0.543cm">
              <text:p text:style-name="P157"><text:span text:style-name="T64"><text:page-number>&lt;numéro&gt;</text:page-number></text:span></text:p>
            </draw:text-box>
          </draw:frame>
        </presentation:notes>
      </draw:page>
      <draw:page draw:name="Slide_2" draw:style-name="dp33" draw:master-page-name="_______5f__5f__5f_Standard2" presentation:presentation-page-layout-name="AL2">
        <draw:frame xml:id="id114" draw:id="id114" draw:style-name="gr74" svg:width="13.64cm" svg:height="1.017cm" svg:x="1.01cm" svg:y="0.504cm">
          <draw:text-box fo:min-height="1.017cm">
            <text:p text:style-name="P158"><text:span text:style-name="T65">INFRASTRUCTURE AWS</text:span></text:p>
          </draw:text-box>
        </draw:frame>
        <draw:frame xml:id="id115" draw:id="id115" draw:style-name="gr75" svg:width="7.255cm" svg:height="1.017cm" svg:x="2.479cm" svg:y="1.764cm">
          <draw:text-box fo:min-height="1.017cm">
            <text:list text:style-name="L101" text:continue-numbering="true">
              <text:list-item>
                <text:p text:style-name="P159"><text:span text:style-name="T66">AMAZON ECR</text:span></text:p>
              </text:list-item>
            </text:list>
          </draw:text-box>
        </draw:frame>
        <draw:frame xml:id="id116" draw:id="id116" draw:style-name="gr76" svg:width="3.628cm" svg:height="3.644cm" svg:x="4.648cm" svg:y="3.452cm">
          <draw:image xlink:href="Pictures/image16.jpg" xlink:type="simple" xlink:show="embed" xlink:actuate="onLoad"/>
        </draw:frame>
        <draw:frame xml:id="id117" draw:id="id117" draw:style-name="gr77" svg:width="17.63cm" svg:height="2.287cm" svg:x="7.305cm" svg:y="7.455cm">
          <draw:text-box fo:min-height="2.287cm">
            <text:list text:style-name="L103" text:continue-numbering="true">
              <text:list-item>
                <text:p text:style-name="P160"><text:span text:style-name="T67">Stockage des images Docker des APIs et le training</text:span></text:p>
              </text:list-item>
            </text:list>
            <text:p text:style-name="P161"><text:span text:style-name="T67"/></text:p>
            <text:list text:style-name="L104" text:continue-numbering="true">
              <text:list-item>
                <text:p text:style-name="P162"><text:span text:style-name="T68">Versioning automatique des images</text:span></text:p>
              </text:list-item>
            </text:list>
          </draw:text-box>
        </draw:frame>
        <draw:frame xml:id="id118" draw:id="id118" draw:style-name="gr78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split" presentation:preset-sub-type="vertical-in">
                  <anim:set smil:dur="0.001s" smil:begin="0s" smil:targetElement="id116" smil:attributeName="visibility" smil:fill="hold" smil:to="visible"/>
                  <anim:transitionFilter smil:dur="0.5s" smil:targetElement="id116" smil:subtype="vertical" smil:type="barnDoorWipe" smil:mode="in" smil:direction="reverse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random-bars" presentation:preset-sub-type="vertical">
                  <anim:set smil:dur="0.001s" smil:begin="0s" smil:targetElement="id117" smil:attributeName="visibility" smil:fill="hold" smil:to="visible"/>
                  <anim:transitionFilter smil:dur="0.5s" smil:targetElement="id117" smil:subtype="horizontal" smil:type="randomBarWipe" smil:mode="in"/>
                </anim:par>
              </anim:par>
            </anim:par>
          </anim:seq>
        </anim:par>
        <presentation:notes draw:style-name="dp34">
          <draw:frame xml:id="id119" draw:id="id119" draw:name="Slide Image Placeholder 1" draw:text-style-name="P163" draw:layer="layout" presentation:style-name="pr42" presentation:class="title" presentation:placeholder="true" svg:width="0.035cm" svg:height="0.937cm" svg:x="0cm" svg:y="0cm">
            <draw:text-box fo:min-height="0.937cm">
              <text:p text:style-name="P164"><text:span/></text:p>
            </draw:text-box>
          </draw:frame>
          <draw:frame xml:id="id120" draw:id="id120" draw:name="Notes Placeholder 2" draw:text-style-name="P165" draw:layer="layout" presentation:style-name="pr43" presentation:class="outline" presentation:placeholder="true" svg:width="0.035cm" svg:height="0.937cm" svg:x="0cm" svg:y="0cm">
            <draw:text-box fo:min-height="0.937cm">
              <text:p text:style-name="P166"><text:span/></text:p>
            </draw:text-box>
          </draw:frame>
          <draw:frame xml:id="id121" draw:id="id121" draw:name="Slide Number Placeholder 3" draw:text-style-name="P167" draw:layer="layout" presentation:style-name="pr44" presentation:class="page-number" presentation:placeholder="true" svg:width="0.035cm" svg:height="0.543cm" svg:x="0cm" svg:y="0cm">
            <draw:text-box fo:min-height="0.543cm">
              <text:p text:style-name="P168"><text:span text:style-name="T69"><text:page-number>&lt;numéro&gt;</text:page-number></text:span></text:p>
            </draw:text-box>
          </draw:frame>
        </presentation:notes>
      </draw:page>
      <draw:page draw:name="Slide_2" draw:style-name="dp35" draw:master-page-name="_______5f__5f__5f_Standard2" presentation:presentation-page-layout-name="AL2">
        <draw:frame xml:id="id122" draw:id="id122" draw:style-name="gr79" svg:width="13.64cm" svg:height="1.017cm" svg:x="1.01cm" svg:y="0.504cm">
          <draw:text-box fo:min-height="1.017cm">
            <text:p text:style-name="P169"><text:span text:style-name="T70">INFRASTRUCTURE AWS</text:span></text:p>
          </draw:text-box>
        </draw:frame>
        <draw:frame xml:id="id123" draw:id="id123" draw:style-name="gr80" svg:width="7.261cm" svg:height="1.017cm" svg:x="2.479cm" svg:y="1.764cm">
          <draw:text-box fo:min-height="1.017cm">
            <text:list text:style-name="L110" text:continue-numbering="true">
              <text:list-item>
                <text:p text:style-name="P170"><text:span text:style-name="T71">AMAZON IAM</text:span></text:p>
              </text:list-item>
            </text:list>
          </draw:text-box>
        </draw:frame>
        <draw:frame xml:id="id124" draw:id="id124" draw:style-name="gr81" svg:width="4.215cm" svg:height="4.215cm" svg:x="4.621cm" svg:y="3.147cm">
          <draw:image xlink:href="Pictures/image17.jpg" xlink:type="simple" xlink:show="embed" xlink:actuate="onLoad"/>
        </draw:frame>
        <draw:frame xml:id="id125" draw:id="id125" draw:style-name="gr82" svg:width="17.78cm" svg:height="2.287cm" svg:x="7.305cm" svg:y="7.455cm">
          <draw:text-box fo:min-height="2.287cm">
            <text:list text:style-name="L112" text:continue-numbering="true">
              <text:list-item>
                <text:p text:style-name="P171"><text:span text:style-name="T72">Authentification &amp; Autorisation</text:span></text:p>
              </text:list-item>
            </text:list>
            <text:p text:style-name="P172"><text:span text:style-name="T72"/></text:p>
            <text:list text:style-name="L113" text:continue-numbering="true">
              <text:list-item>
                <text:p text:style-name="P173"><text:span text:style-name="T73">Gestion des accès S3 et ECR</text:span></text:p>
              </text:list-item>
            </text:list>
          </draw:text-box>
        </draw:frame>
        <draw:frame xml:id="id126" draw:id="id126" draw:style-name="gr83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split" presentation:preset-sub-type="vertical-in">
                  <anim:set smil:dur="0.001s" smil:begin="0s" smil:targetElement="id124" smil:attributeName="visibility" smil:fill="hold" smil:to="visible"/>
                  <anim:transitionFilter smil:dur="0.5s" smil:targetElement="id124" smil:subtype="vertical" smil:type="barnDoorWipe" smil:mode="in" smil:direction="reverse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random-bars" presentation:preset-sub-type="vertical">
                  <anim:set smil:dur="0.001s" smil:begin="0s" smil:targetElement="id125" smil:attributeName="visibility" smil:fill="hold" smil:to="visible"/>
                  <anim:transitionFilter smil:dur="0.5s" smil:targetElement="id125" smil:subtype="horizontal" smil:type="randomBarWipe" smil:mode="in"/>
                </anim:par>
              </anim:par>
            </anim:par>
          </anim:seq>
        </anim:par>
        <presentation:notes draw:style-name="dp36">
          <draw:frame xml:id="id127" draw:id="id127" draw:name="Slide Image Placeholder 1" draw:text-style-name="P174" draw:layer="layout" presentation:style-name="pr45" presentation:class="title" presentation:placeholder="true" svg:width="0.035cm" svg:height="0.937cm" svg:x="0cm" svg:y="0cm">
            <draw:text-box fo:min-height="0.937cm">
              <text:p text:style-name="P175"><text:span/></text:p>
            </draw:text-box>
          </draw:frame>
          <draw:frame xml:id="id128" draw:id="id128" draw:name="Notes Placeholder 2" draw:text-style-name="P176" draw:layer="layout" presentation:style-name="pr46" presentation:class="outline" presentation:placeholder="true" svg:width="0.035cm" svg:height="0.937cm" svg:x="0cm" svg:y="0cm">
            <draw:text-box fo:min-height="0.937cm">
              <text:p text:style-name="P177"><text:span/></text:p>
            </draw:text-box>
          </draw:frame>
          <draw:frame xml:id="id129" draw:id="id129" draw:name="Slide Number Placeholder 3" draw:text-style-name="P178" draw:layer="layout" presentation:style-name="pr47" presentation:class="page-number" presentation:placeholder="true" svg:width="0.035cm" svg:height="0.543cm" svg:x="0cm" svg:y="0cm">
            <draw:text-box fo:min-height="0.543cm">
              <text:p text:style-name="P179"><text:span text:style-name="T74"><text:page-number>&lt;numéro&gt;</text:page-number></text:span></text:p>
            </draw:text-box>
          </draw:frame>
        </presentation:notes>
      </draw:page>
      <draw:page draw:name="Slide_2" draw:style-name="dp37" draw:master-page-name="_______5f__5f__5f_Standard2" presentation:presentation-page-layout-name="AL2">
        <draw:frame xml:id="id130" draw:id="id130" draw:style-name="gr84" svg:width="13.64cm" svg:height="1.017cm" svg:x="1.01cm" svg:y="0.504cm">
          <draw:text-box fo:min-height="1.017cm">
            <text:p text:style-name="P180"><text:span text:style-name="T75">INFRASTRUCTURE AWS</text:span></text:p>
          </draw:text-box>
        </draw:frame>
        <draw:frame xml:id="id131" draw:id="id131" draw:style-name="gr85" svg:width="7.267cm" svg:height="1.017cm" svg:x="2.479cm" svg:y="1.764cm">
          <draw:text-box fo:min-height="1.017cm">
            <text:list text:style-name="L119" text:continue-numbering="true">
              <text:list-item>
                <text:p text:style-name="P181"><text:span text:style-name="T76">AMAZON CLI</text:span></text:p>
              </text:list-item>
            </text:list>
          </draw:text-box>
        </draw:frame>
        <draw:frame xml:id="id132" draw:id="id132" draw:style-name="gr86" svg:width="9.526cm" svg:height="3.704cm" svg:x="3.349cm" svg:y="3.19cm">
          <draw:image xlink:href="Pictures/image18.png" xlink:type="simple" xlink:show="embed" xlink:actuate="onLoad"/>
        </draw:frame>
        <draw:frame xml:id="id133" draw:id="id133" draw:style-name="gr87" svg:width="18.02cm" svg:height="1.61cm" svg:x="7.305cm" svg:y="7.455cm">
          <draw:text-box fo:min-height="1.61cm">
            <text:list text:style-name="L121" text:continue-numbering="true">
              <text:list-item>
                <text:p text:style-name="P182"><text:span text:style-name="T77">Synchronisation des artefacts</text:span></text:p>
              </text:list-item>
            </text:list>
            <text:p text:style-name="P183"><text:span text:style-name="T77"/></text:p>
          </draw:text-box>
        </draw:frame>
        <draw:frame xml:id="id134" draw:id="id134" draw:style-name="gr88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split" presentation:preset-sub-type="vertical-in">
                  <anim:set smil:dur="0.001s" smil:begin="0s" smil:targetElement="id132" smil:attributeName="visibility" smil:fill="hold" smil:to="visible"/>
                  <anim:transitionFilter smil:dur="0.5s" smil:targetElement="id132" smil:subtype="vertical" smil:type="barnDoorWipe" smil:mode="in" smil:direction="reverse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random-bars" presentation:preset-sub-type="vertical">
                  <anim:set smil:dur="0.001s" smil:begin="0s" smil:targetElement="id133" smil:attributeName="visibility" smil:fill="hold" smil:to="visible"/>
                  <anim:transitionFilter smil:dur="0.5s" smil:targetElement="id133" smil:subtype="horizontal" smil:type="randomBarWipe" smil:mode="in"/>
                </anim:par>
              </anim:par>
            </anim:par>
          </anim:seq>
        </anim:par>
        <presentation:notes draw:style-name="dp38">
          <draw:frame xml:id="id135" draw:id="id135" draw:name="Slide Image Placeholder 1" draw:text-style-name="P184" draw:layer="layout" presentation:style-name="pr48" presentation:class="title" presentation:placeholder="true" svg:width="0.035cm" svg:height="0.937cm" svg:x="0cm" svg:y="0cm">
            <draw:text-box fo:min-height="0.937cm">
              <text:p text:style-name="P185"><text:span/></text:p>
            </draw:text-box>
          </draw:frame>
          <draw:frame xml:id="id136" draw:id="id136" draw:name="Notes Placeholder 2" draw:text-style-name="P186" draw:layer="layout" presentation:style-name="pr49" presentation:class="outline" presentation:placeholder="true" svg:width="0.035cm" svg:height="0.937cm" svg:x="0cm" svg:y="0cm">
            <draw:text-box fo:min-height="0.937cm">
              <text:p text:style-name="P187"><text:span/></text:p>
            </draw:text-box>
          </draw:frame>
          <draw:frame xml:id="id137" draw:id="id137" draw:name="Slide Number Placeholder 3" draw:text-style-name="P188" draw:layer="layout" presentation:style-name="pr50" presentation:class="page-number" presentation:placeholder="true" svg:width="0.035cm" svg:height="0.543cm" svg:x="0cm" svg:y="0cm">
            <draw:text-box fo:min-height="0.543cm">
              <text:p text:style-name="P189"><text:span text:style-name="T78"><text:page-number>&lt;numéro&gt;</text:page-number></text:span></text:p>
            </draw:text-box>
          </draw:frame>
        </presentation:notes>
      </draw:page>
      <draw:page draw:name="Slide_2" draw:style-name="dp39" draw:master-page-name="_______5f__5f__5f_Standard2" presentation:presentation-page-layout-name="AL2">
        <draw:frame xml:id="id138" draw:id="id138" draw:style-name="gr89" svg:width="13.64cm" svg:height="1.017cm" svg:x="1.01cm" svg:y="0.504cm">
          <draw:text-box fo:min-height="1.017cm">
            <text:p text:style-name="P190"><text:span text:style-name="T79">INFRASTRUCTURE AWS</text:span></text:p>
          </draw:text-box>
        </draw:frame>
        <draw:frame xml:id="id139" draw:id="id139" draw:style-name="gr90" svg:width="7.273cm" svg:height="1.017cm" svg:x="2.479cm" svg:y="1.764cm">
          <draw:text-box fo:min-height="1.017cm">
            <text:list text:style-name="L127" text:continue-numbering="true">
              <text:list-item>
                <text:p text:style-name="P191"><text:span text:style-name="T80">AMAZON EC2</text:span></text:p>
              </text:list-item>
            </text:list>
          </draw:text-box>
        </draw:frame>
        <draw:frame xml:id="id140" draw:id="id140" draw:style-name="gr91" svg:width="7.912cm" svg:height="4.445cm" svg:x="2.479cm" svg:y="2.781cm">
          <draw:image xlink:href="Pictures/image19.png" xlink:type="simple" xlink:show="embed" xlink:actuate="onLoad"/>
        </draw:frame>
        <draw:frame xml:id="id141" draw:id="id141" draw:style-name="gr92" svg:width="17.98cm" svg:height="3.642cm" svg:x="7.305cm" svg:y="7.455cm">
          <draw:text-box fo:min-height="3.642cm">
            <text:list text:style-name="L129" text:continue-numbering="true">
              <text:list-item>
                <text:p text:style-name="P192"><text:span text:style-name="T81">Hébergement de l’infrastructure (Docker Compose)</text:span></text:p>
              </text:list-item>
            </text:list>
            <text:p text:style-name="P193"><text:span text:style-name="T81"/></text:p>
            <text:list text:style-name="L130" text:continue-numbering="true">
              <text:list-item>
                <text:p text:style-name="P194"><text:span text:style-name="T82">Exécution de l’api de prédiction (2 instances)</text:span></text:p>
              </text:list-item>
            </text:list>
            <text:p text:style-name="P195"><text:span text:style-name="T82"/></text:p>
            <text:list text:style-name="L131" text:continue-numbering="true">
              <text:list-item>
                <text:p text:style-name="P196"><text:span text:style-name="T83">Monitoring (Grafana+Prometheus)</text:span></text:p>
              </text:list-item>
            </text:list>
          </draw:text-box>
        </draw:frame>
        <draw:frame xml:id="id142" draw:id="id142" draw:style-name="gr93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split" presentation:preset-sub-type="vertical-in">
                  <anim:set smil:dur="0.001s" smil:begin="0s" smil:targetElement="id140" smil:attributeName="visibility" smil:fill="hold" smil:to="visible"/>
                  <anim:transitionFilter smil:dur="0.5s" smil:targetElement="id140" smil:subtype="vertical" smil:type="barnDoorWipe" smil:mode="in" smil:direction="reverse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random-bars" presentation:preset-sub-type="vertical">
                  <anim:set smil:dur="0.001s" smil:begin="0s" smil:targetElement="id141" smil:attributeName="visibility" smil:fill="hold" smil:to="visible"/>
                  <anim:transitionFilter smil:dur="0.5s" smil:targetElement="id141" smil:subtype="horizontal" smil:type="randomBarWipe" smil:mode="in"/>
                </anim:par>
              </anim:par>
            </anim:par>
          </anim:seq>
        </anim:par>
        <presentation:notes draw:style-name="dp40">
          <draw:frame xml:id="id143" draw:id="id143" draw:name="Slide Image Placeholder 1" draw:text-style-name="P197" draw:layer="layout" presentation:style-name="pr51" presentation:class="title" presentation:placeholder="true" svg:width="0.035cm" svg:height="0.937cm" svg:x="0cm" svg:y="0cm">
            <draw:text-box fo:min-height="0.937cm">
              <text:p text:style-name="P198"><text:span/></text:p>
            </draw:text-box>
          </draw:frame>
          <draw:frame xml:id="id144" draw:id="id144" draw:name="Notes Placeholder 2" draw:text-style-name="P199" draw:layer="layout" presentation:style-name="pr52" presentation:class="outline" presentation:placeholder="true" svg:width="0.035cm" svg:height="0.937cm" svg:x="0cm" svg:y="0cm">
            <draw:text-box fo:min-height="0.937cm">
              <text:p text:style-name="P200"><text:span/></text:p>
            </draw:text-box>
          </draw:frame>
          <draw:frame xml:id="id145" draw:id="id145" draw:name="Slide Number Placeholder 3" draw:text-style-name="P201" draw:layer="layout" presentation:style-name="pr53" presentation:class="page-number" presentation:placeholder="true" svg:width="0.035cm" svg:height="0.543cm" svg:x="0cm" svg:y="0cm">
            <draw:text-box fo:min-height="0.543cm">
              <text:p text:style-name="P202"><text:span text:style-name="T84"><text:page-number>&lt;numéro&gt;</text:page-number></text:span></text:p>
            </draw:text-box>
          </draw:frame>
        </presentation:notes>
      </draw:page>
      <draw:page draw:name="Slide_2" draw:style-name="dp41" draw:master-page-name="_______5f__5f__5f_Standard2" presentation:presentation-page-layout-name="AL2">
        <draw:custom-shape xml:id="id146" draw:id="id146" draw:style-name="gr94" draw:transform="rotate(-37.037456069205426) translate(13.08cm,4.987cm)" svg:width="14.09cm" svg:height="4.776cm">
          <text:p text:style-name="P203"><text:span/></text:p>
          <draw:enhanced-geometry draw:type="flowchart-terminator"/>
        </draw:custom-shape>
        <draw:custom-shape xml:id="id147" draw:id="id147" draw:style-name="gr95" draw:transform="rotate(-37.037456069205426) translate(20.53cm,5.726cm)" svg:width="12.69cm" svg:height="3.142cm">
          <text:p text:style-name="P204"><text:span/></text:p>
          <draw:enhanced-geometry draw:type="flowchart-terminator"/>
        </draw:custom-shape>
        <draw:custom-shape xml:id="id148" draw:id="id148" draw:style-name="gr96" draw:transform="rotate(-40.153218431642124) translate(21.87cm,7.894cm)" svg:width="3.766cm" svg:height="2.491cm">
          <text:p text:style-name="P205"><text:span/></text:p>
          <draw:enhanced-geometry draw:type="flowchart-terminator"/>
        </draw:custom-shape>
        <draw:custom-shape xml:id="id149" draw:id="id149" draw:style-name="gr97" draw:transform="rotate(-37.037456069205426) translate(22.83cm,8.296cm)" svg:width="12.69cm" svg:height="3.126cm">
          <text:p text:style-name="P206"><text:span/></text:p>
          <draw:enhanced-geometry draw:type="flowchart-terminator"/>
        </draw:custom-shape>
        <draw:custom-shape xml:id="id150" draw:id="id150" draw:style-name="gr98" draw:transform="rotate(-37.037456069205426) translate(8.952cm,4.386cm)" svg:width="12.69cm" svg:height="2.287cm">
          <text:p text:style-name="P207"><text:span/></text:p>
          <draw:enhanced-geometry draw:type="flowchart-terminator"/>
        </draw:custom-shape>
        <draw:custom-shape xml:id="id151" draw:id="id151" draw:style-name="gr99" draw:transform="rotate(-37.201343067744105) translate(20.53cm,10.43cm)" svg:width="3.088cm" svg:height="2.003cm">
          <text:p text:style-name="P208"><text:span/></text:p>
          <draw:enhanced-geometry draw:type="flowchart-connector"/>
        </draw:custom-shape>
        <draw:frame xml:id="id152" draw:id="id152" draw:style-name="gr100" svg:width="9.046cm" svg:height="2.626cm" svg:x="1.495cm" svg:y="6.298cm">
          <draw:text-box fo:min-height="2.626cm">
            <text:p text:style-name="P209"><text:span text:style-name="T85">PIPELINE CI/CD GitHub</text:span></text:p>
          </draw:text-box>
        </draw:frame>
        <draw:frame xml:id="id153" draw:id="id153" draw:style-name="gr101" svg:width="6.904cm" svg:height="3.608cm" svg:x="6.15cm" svg:y="8.226cm">
          <draw:image xlink:href="Pictures/image21.png" xlink:type="simple" xlink:show="embed" xlink:actuate="onLoad"/>
        </draw:frame>
        <draw:frame xml:id="id154" draw:id="id154" draw:style-name="gr102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153" smil:attributeName="visibility" smil:fill="hold" smil:to="visible"/>
                  <anim:animate smil:dur="0.8s" smil:targetElement="id153" smil:attributeName="width" smil:values="0;width" smil:keyTimes="0;1"/>
                  <anim:animate smil:dur="0.8s" smil:targetElement="id153" smil:attributeName="height" smil:values="0;height" smil:keyTimes="0;1"/>
                  <anim:animate smil:dur="0.8s" smil:targetElement="id153" smil:attributeName="rotate" smil:values="90;0" smil:keyTimes="0;1"/>
                  <anim:transitionFilter smil:dur="0.8s" smil:targetElement="id153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152" smil:attributeName="visibility" smil:fill="hold" smil:to="visible"/>
                  <anim:animate smil:dur="0.8s" smil:targetElement="id152" smil:attributeName="width" smil:values="0;width" smil:keyTimes="0;1"/>
                  <anim:animate smil:dur="0.8s" smil:targetElement="id152" smil:attributeName="height" smil:values="0;height" smil:keyTimes="0;1"/>
                  <anim:animate smil:dur="0.8s" smil:targetElement="id152" smil:attributeName="rotate" smil:values="90;0" smil:keyTimes="0;1"/>
                  <anim:transitionFilter smil:dur="0.8s" smil:targetElement="id152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151" smil:attributeName="visibility" smil:fill="hold" smil:to="visible"/>
                  <anim:animate smil:dur="0.8s" smil:targetElement="id151" smil:attributeName="width" smil:values="0;width" smil:keyTimes="0;1"/>
                  <anim:animate smil:dur="0.8s" smil:targetElement="id151" smil:attributeName="height" smil:values="0;height" smil:keyTimes="0;1"/>
                  <anim:animate smil:dur="0.8s" smil:targetElement="id151" smil:attributeName="rotate" smil:values="90;0" smil:keyTimes="0;1"/>
                  <anim:transitionFilter smil:dur="0.8s" smil:targetElement="id151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150" smil:attributeName="visibility" smil:fill="hold" smil:to="visible"/>
                  <anim:animate smil:dur="0.8s" smil:targetElement="id150" smil:attributeName="width" smil:values="0;width" smil:keyTimes="0;1"/>
                  <anim:animate smil:dur="0.8s" smil:targetElement="id150" smil:attributeName="height" smil:values="0;height" smil:keyTimes="0;1"/>
                  <anim:animate smil:dur="0.8s" smil:targetElement="id150" smil:attributeName="rotate" smil:values="90;0" smil:keyTimes="0;1"/>
                  <anim:transitionFilter smil:dur="0.8s" smil:targetElement="id150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149" smil:attributeName="visibility" smil:fill="hold" smil:to="visible"/>
                  <anim:animate smil:dur="0.8s" smil:targetElement="id149" smil:attributeName="width" smil:values="0;width" smil:keyTimes="0;1"/>
                  <anim:animate smil:dur="0.8s" smil:targetElement="id149" smil:attributeName="height" smil:values="0;height" smil:keyTimes="0;1"/>
                  <anim:animate smil:dur="0.8s" smil:targetElement="id149" smil:attributeName="rotate" smil:values="90;0" smil:keyTimes="0;1"/>
                  <anim:transitionFilter smil:dur="0.8s" smil:targetElement="id149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148" smil:attributeName="visibility" smil:fill="hold" smil:to="visible"/>
                  <anim:animate smil:dur="0.8s" smil:targetElement="id148" smil:attributeName="width" smil:values="0;width" smil:keyTimes="0;1"/>
                  <anim:animate smil:dur="0.8s" smil:targetElement="id148" smil:attributeName="height" smil:values="0;height" smil:keyTimes="0;1"/>
                  <anim:animate smil:dur="0.8s" smil:targetElement="id148" smil:attributeName="rotate" smil:values="90;0" smil:keyTimes="0;1"/>
                  <anim:transitionFilter smil:dur="0.8s" smil:targetElement="id148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147" smil:attributeName="visibility" smil:fill="hold" smil:to="visible"/>
                  <anim:animate smil:dur="0.8s" smil:targetElement="id147" smil:attributeName="width" smil:values="0;width" smil:keyTimes="0;1"/>
                  <anim:animate smil:dur="0.8s" smil:targetElement="id147" smil:attributeName="height" smil:values="0;height" smil:keyTimes="0;1"/>
                  <anim:animate smil:dur="0.8s" smil:targetElement="id147" smil:attributeName="rotate" smil:values="90;0" smil:keyTimes="0;1"/>
                  <anim:transitionFilter smil:dur="0.8s" smil:targetElement="id147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2s" smil:begin="0s" smil:targetElement="id146" smil:attributeName="visibility" smil:fill="hold" smil:to="visible"/>
                  <anim:animate smil:dur="0.8s" smil:targetElement="id146" smil:attributeName="width" smil:values="0;width" smil:keyTimes="0;1"/>
                  <anim:animate smil:dur="0.8s" smil:targetElement="id146" smil:attributeName="height" smil:values="0;height" smil:keyTimes="0;1"/>
                  <anim:animate smil:dur="0.8s" smil:targetElement="id146" smil:attributeName="rotate" smil:values="90;0" smil:keyTimes="0;1"/>
                  <anim:transitionFilter smil:dur="0.8s" smil:targetElement="id146" smil:subtype="crossfade" smil:type="fade" smil:mode="in"/>
                </anim:par>
              </anim:par>
            </anim:par>
          </anim:seq>
        </anim:par>
        <presentation:notes draw:style-name="dp42">
          <draw:frame xml:id="id155" draw:id="id155" draw:name="Slide Image Placeholder 1" draw:text-style-name="P210" draw:layer="layout" presentation:style-name="pr54" presentation:class="title" presentation:placeholder="true" svg:width="0.035cm" svg:height="0.937cm" svg:x="0cm" svg:y="0cm">
            <draw:text-box fo:min-height="0.937cm">
              <text:p text:style-name="P211"><text:span/></text:p>
            </draw:text-box>
          </draw:frame>
          <draw:frame xml:id="id156" draw:id="id156" draw:name="Notes Placeholder 2" draw:text-style-name="P212" draw:layer="layout" presentation:style-name="pr55" presentation:class="outline" presentation:placeholder="true" svg:width="0.035cm" svg:height="0.937cm" svg:x="0cm" svg:y="0cm">
            <draw:text-box fo:min-height="0.937cm">
              <text:p text:style-name="P213"><text:span/></text:p>
            </draw:text-box>
          </draw:frame>
          <draw:frame xml:id="id157" draw:id="id157" draw:name="Slide Number Placeholder 3" draw:text-style-name="P214" draw:layer="layout" presentation:style-name="pr56" presentation:class="page-number" presentation:placeholder="true" svg:width="0.035cm" svg:height="0.543cm" svg:x="0cm" svg:y="0cm">
            <draw:text-box fo:min-height="0.543cm">
              <text:p text:style-name="P215"><text:span text:style-name="T86"><text:page-number>&lt;numéro&gt;</text:page-number></text:span></text:p>
            </draw:text-box>
          </draw:frame>
        </presentation:notes>
      </draw:page>
      <draw:page draw:name="Slide_2" draw:style-name="dp43" draw:master-page-name="_______5f__5f__5f_Standard2" presentation:presentation-page-layout-name="AL2">
        <draw:frame xml:id="id158" draw:id="id158" draw:style-name="gr103" svg:width="13.66cm" svg:height="1.017cm" svg:x="1.01cm" svg:y="0.516cm">
          <draw:text-box fo:min-height="1.017cm">
            <text:p text:style-name="P216"><text:span text:style-name="T87">PIPELINE CI/CD GITHUB</text:span></text:p>
          </draw:text-box>
        </draw:frame>
        <draw:frame xml:id="id159" draw:id="id159" draw:style-name="gr104" svg:width="11.92cm" svg:height="1.44cm" svg:x="13.9cm" svg:y="7.906cm">
          <draw:text-box fo:min-height="1.44cm">
            <text:p text:style-name="P217"><text:span text:style-name="T88">COMBIEN DE JOB</text:span></text:p>
          </draw:text-box>
        </draw:frame>
        <draw:frame xml:id="id160" draw:id="id160" draw:style-name="gr105" svg:width="11.91cm" svg:height="1.44cm" svg:x="13.84cm" svg:y="5.232cm">
          <draw:text-box fo:min-height="1.44cm">
            <text:p text:style-name="P218"><text:span text:style-name="T89">DECLENCHEUR</text:span></text:p>
          </draw:text-box>
        </draw:frame>
        <draw:frame xml:id="id161" draw:id="id161" draw:style-name="gr106" svg:width="13.07cm" svg:height="8.732cm" svg:x="0.793cm" svg:y="3.506cm">
          <draw:image xlink:href="Pictures/image22.jpg" xlink:type="simple" xlink:show="embed" xlink:actuate="onLoad"/>
        </draw:frame>
        <draw:frame xml:id="id162" draw:id="id162" draw:style-name="gr107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fade-in-and-zoom" presentation:preset-sub-type="in">
                  <anim:set smil:dur="0.001s" smil:begin="0s" smil:targetElement="id161" smil:attributeName="visibility" smil:fill="hold" smil:to="visible"/>
                  <anim:animate smil:dur="0.5s" smil:targetElement="id161" smil:attributeName="width" smil:values="0;width" smil:keyTimes="0;1"/>
                  <anim:animate smil:dur="0.5s" smil:targetElement="id161" smil:attributeName="height" smil:values="0;height" smil:keyTimes="0;1"/>
                  <anim:transitionFilter smil:dur="0.5s" smil:targetElement="id161" smil:subtype="crossfade" smil:type="fade" smil:mode="in"/>
                </anim:par>
                <anim:par presentation:node-type="with-previous" smil:begin="0s" smil:fill="hold" presentation:preset-class="entrance" presentation:preset-id="ooo-entrance-fade-in-and-zoom" presentation:preset-sub-type="in">
                  <anim:set smil:dur="0.001s" smil:begin="0s" smil:targetElement="id160" smil:attributeName="visibility" smil:fill="hold" smil:to="visible"/>
                  <anim:animate smil:dur="0.5s" smil:targetElement="id160" smil:attributeName="width" smil:values="0;width" smil:keyTimes="0;1"/>
                  <anim:animate smil:dur="0.5s" smil:targetElement="id160" smil:attributeName="height" smil:values="0;height" smil:keyTimes="0;1"/>
                  <anim:transitionFilter smil:dur="0.5s" smil:targetElement="id160" smil:subtype="crossfade" smil:type="fade" smil:mode="in"/>
                </anim:par>
                <anim:par presentation:node-type="with-previous" smil:begin="0s" smil:fill="hold" presentation:preset-class="entrance" presentation:preset-id="ooo-entrance-fade-in-and-zoom" presentation:preset-sub-type="in">
                  <anim:set smil:dur="0.001s" smil:begin="0s" smil:targetElement="id159" smil:attributeName="visibility" smil:fill="hold" smil:to="visible"/>
                  <anim:animate smil:dur="0.5s" smil:targetElement="id159" smil:attributeName="width" smil:values="0;width" smil:keyTimes="0;1"/>
                  <anim:animate smil:dur="0.5s" smil:targetElement="id159" smil:attributeName="height" smil:values="0;height" smil:keyTimes="0;1"/>
                  <anim:transitionFilter smil:dur="0.5s" smil:targetElement="id159" smil:subtype="crossfade" smil:type="fade" smil:mode="in"/>
                </anim:par>
              </anim:par>
            </anim:par>
          </anim:seq>
        </anim:par>
        <presentation:notes draw:style-name="dp44">
          <draw:frame xml:id="id163" draw:id="id163" draw:name="Slide Image Placeholder 1" draw:text-style-name="P219" draw:layer="layout" presentation:style-name="pr57" presentation:class="title" presentation:placeholder="true" svg:width="0.035cm" svg:height="0.937cm" svg:x="0cm" svg:y="0cm">
            <draw:text-box fo:min-height="0.937cm">
              <text:p text:style-name="P220"><text:span/></text:p>
            </draw:text-box>
          </draw:frame>
          <draw:frame xml:id="id164" draw:id="id164" draw:name="Notes Placeholder 2" draw:text-style-name="P221" draw:layer="layout" presentation:style-name="pr58" presentation:class="outline" presentation:placeholder="true" svg:width="0.035cm" svg:height="0.937cm" svg:x="0cm" svg:y="0cm">
            <draw:text-box fo:min-height="0.937cm">
              <text:p text:style-name="P222"><text:span/></text:p>
            </draw:text-box>
          </draw:frame>
          <draw:frame xml:id="id165" draw:id="id165" draw:name="Slide Number Placeholder 3" draw:text-style-name="P223" draw:layer="layout" presentation:style-name="pr59" presentation:class="page-number" presentation:placeholder="true" svg:width="0.035cm" svg:height="0.543cm" svg:x="0cm" svg:y="0cm">
            <draw:text-box fo:min-height="0.543cm">
              <text:p text:style-name="P224"><text:span text:style-name="T90"><text:page-number>&lt;numéro&gt;</text:page-number></text:span></text:p>
            </draw:text-box>
          </draw:frame>
        </presentation:notes>
      </draw:page>
      <draw:page draw:name="Slide_2" draw:style-name="dp45" draw:master-page-name="_______5f__5f__5f_Standard2" presentation:presentation-page-layout-name="AL2">
        <draw:frame xml:id="id166" draw:id="id166" draw:style-name="gr108" svg:width="13.66cm" svg:height="1.017cm" svg:x="1.01cm" svg:y="0.516cm">
          <draw:text-box fo:min-height="1.017cm">
            <text:p text:style-name="P225"><text:span text:style-name="T91">PIPELINE CI/CD GITHUB</text:span></text:p>
          </draw:text-box>
        </draw:frame>
        <draw:frame xml:id="id167" draw:id="id167" draw:style-name="gr109" svg:width="8.372cm" svg:height="1.017cm" svg:x="2.479cm" svg:y="1.783cm">
          <draw:text-box fo:min-height="1.017cm">
            <text:list text:style-name="L153" text:continue-numbering="true">
              <text:list-item>
                <text:p text:style-name="P226"><text:span text:style-name="T92">JOB 1 : Train-Build-Push</text:span></text:p>
              </text:list-item>
            </text:list>
          </draw:text-box>
        </draw:frame>
        <draw:frame xml:id="id168" draw:id="id168" draw:style-name="gr110" svg:width="17.6cm" svg:height="2.805cm" svg:x="3.972cm" svg:y="2.8cm">
          <draw:image xlink:href="Pictures/image23.png" xlink:type="simple" xlink:show="embed" xlink:actuate="onLoad"/>
        </draw:frame>
        <draw:frame xml:id="id169" draw:id="id169" draw:style-name="gr111" svg:width="17.6cm" svg:height="1.826cm" svg:x="4.009cm" svg:y="5.881cm">
          <draw:image xlink:href="Pictures/image24.png" xlink:type="simple" xlink:show="embed" xlink:actuate="onLoad"/>
        </draw:frame>
        <draw:frame xml:id="id170" draw:id="id170" draw:style-name="gr112" svg:width="17.62cm" svg:height="3.44cm" svg:x="4.071cm" svg:y="8.018cm">
          <draw:image xlink:href="Pictures/image25.png" xlink:type="simple" xlink:show="embed" xlink:actuate="onLoad"/>
        </draw:frame>
        <draw:frame xml:id="id171" draw:id="id171" draw:style-name="gr113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fly-in" presentation:preset-sub-type="from-bottom">
                  <anim:set smil:dur="0.001s" smil:begin="0s" smil:targetElement="id168" smil:attributeName="visibility" smil:fill="hold" smil:to="visible"/>
                  <anim:animate smil:dur="0.5s" smil:targetElement="id168" smil:attributeName="x" smil:values="x;x" smil:keyTimes="0;1"/>
                  <anim:animate smil:dur="0.5s" smil:targetElement="id168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fly-in" presentation:preset-sub-type="from-bottom">
                  <anim:set smil:dur="0.001s" smil:begin="0s" smil:targetElement="id169" smil:attributeName="visibility" smil:fill="hold" smil:to="visible"/>
                  <anim:animate smil:dur="0.5s" smil:targetElement="id169" smil:attributeName="x" smil:values="x;x" smil:keyTimes="0;1"/>
                  <anim:animate smil:dur="0.5s" smil:targetElement="id169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fly-in" presentation:preset-sub-type="from-bottom">
                  <anim:set smil:dur="0.001s" smil:begin="0s" smil:targetElement="id170" smil:attributeName="visibility" smil:fill="hold" smil:to="visible"/>
                  <anim:animate smil:dur="0.5s" smil:targetElement="id170" smil:attributeName="x" smil:values="x;x" smil:keyTimes="0;1"/>
                  <anim:animate smil:dur="0.5s" smil:targetElement="id170" smil:attributeName="y" smil:values="1+height/2;y" smil:keyTimes="0;1"/>
                </anim:par>
              </anim:par>
            </anim:par>
          </anim:seq>
        </anim:par>
        <presentation:notes draw:style-name="dp46">
          <draw:frame xml:id="id172" draw:id="id172" draw:name="Slide Image Placeholder 1" draw:text-style-name="P227" draw:layer="layout" presentation:style-name="pr60" presentation:class="title" presentation:placeholder="true" svg:width="0.035cm" svg:height="0.937cm" svg:x="0cm" svg:y="0cm">
            <draw:text-box fo:min-height="0.937cm">
              <text:p text:style-name="P228"><text:span/></text:p>
            </draw:text-box>
          </draw:frame>
          <draw:frame xml:id="id173" draw:id="id173" draw:name="Notes Placeholder 2" draw:text-style-name="P229" draw:layer="layout" presentation:style-name="pr61" presentation:class="outline" presentation:placeholder="true" svg:width="0.035cm" svg:height="0.937cm" svg:x="0cm" svg:y="0cm">
            <draw:text-box fo:min-height="0.937cm">
              <text:p text:style-name="P230"><text:span/></text:p>
            </draw:text-box>
          </draw:frame>
          <draw:frame xml:id="id174" draw:id="id174" draw:name="Slide Number Placeholder 3" draw:text-style-name="P231" draw:layer="layout" presentation:style-name="pr62" presentation:class="page-number" presentation:placeholder="true" svg:width="0.035cm" svg:height="0.543cm" svg:x="0cm" svg:y="0cm">
            <draw:text-box fo:min-height="0.543cm">
              <text:p text:style-name="P232"><text:span text:style-name="T93"><text:page-number>&lt;numéro&gt;</text:page-number></text:span></text:p>
            </draw:text-box>
          </draw:frame>
        </presentation:notes>
      </draw:page>
      <draw:page draw:name="Slide_2" draw:style-name="dp47" draw:master-page-name="_______5f__5f__5f_Standard2" presentation:presentation-page-layout-name="AL2">
        <draw:frame xml:id="id175" draw:id="id175" draw:style-name="gr114" svg:width="13.66cm" svg:height="1.017cm" svg:x="1.01cm" svg:y="0.516cm">
          <draw:text-box fo:min-height="1.017cm">
            <text:p text:style-name="P233"><text:span text:style-name="T94">PIPELINE CI/CD GITHUB</text:span></text:p>
          </draw:text-box>
        </draw:frame>
        <draw:frame xml:id="id176" draw:id="id176" draw:style-name="gr115" svg:width="8.372cm" svg:height="1.017cm" svg:x="2.479cm" svg:y="1.783cm">
          <draw:text-box fo:min-height="1.017cm">
            <text:list text:style-name="L159" text:continue-numbering="true">
              <text:list-item>
                <text:p text:style-name="P234"><text:span text:style-name="T95">JOB 1 : Train-Build-Push</text:span></text:p>
              </text:list-item>
            </text:list>
          </draw:text-box>
        </draw:frame>
        <draw:frame xml:id="id177" draw:id="id177" draw:style-name="gr116" svg:width="20.77cm" svg:height="5.874cm" svg:x="3.242cm" svg:y="2.888cm">
          <draw:image xlink:href="Pictures/image26.png" xlink:type="simple" xlink:show="embed" xlink:actuate="onLoad"/>
        </draw:frame>
        <draw:frame xml:id="id178" draw:id="id178" draw:style-name="gr117" svg:width="21.56cm" svg:height="6.245cm" svg:x="3.031cm" svg:y="9.038cm">
          <draw:image xlink:href="Pictures/image27.png" xlink:type="simple" xlink:show="embed" xlink:actuate="onLoad"/>
        </draw:frame>
        <draw:frame xml:id="id179" draw:id="id179" draw:style-name="gr118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fly-in" presentation:preset-sub-type="from-bottom">
                  <anim:set smil:dur="0.001s" smil:begin="0s" smil:targetElement="id177" smil:attributeName="visibility" smil:fill="hold" smil:to="visible"/>
                  <anim:animate smil:dur="0.5s" smil:targetElement="id177" smil:attributeName="x" smil:values="x;x" smil:keyTimes="0;1"/>
                  <anim:animate smil:dur="0.5s" smil:targetElement="id177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fly-in" presentation:preset-sub-type="from-bottom">
                  <anim:set smil:dur="0.001s" smil:begin="0s" smil:targetElement="id178" smil:attributeName="visibility" smil:fill="hold" smil:to="visible"/>
                  <anim:animate smil:dur="0.5s" smil:targetElement="id178" smil:attributeName="x" smil:values="x;x" smil:keyTimes="0;1"/>
                  <anim:animate smil:dur="0.5s" smil:targetElement="id178" smil:attributeName="y" smil:values="1+height/2;y" smil:keyTimes="0;1"/>
                </anim:par>
              </anim:par>
            </anim:par>
          </anim:seq>
        </anim:par>
        <presentation:notes draw:style-name="dp48">
          <draw:frame xml:id="id180" draw:id="id180" draw:name="Slide Image Placeholder 1" draw:text-style-name="P235" draw:layer="layout" presentation:style-name="pr63" presentation:class="title" presentation:placeholder="true" svg:width="0.035cm" svg:height="0.937cm" svg:x="0cm" svg:y="0cm">
            <draw:text-box fo:min-height="0.937cm">
              <text:p text:style-name="P236"><text:span/></text:p>
            </draw:text-box>
          </draw:frame>
          <draw:frame xml:id="id181" draw:id="id181" draw:name="Notes Placeholder 2" draw:text-style-name="P237" draw:layer="layout" presentation:style-name="pr64" presentation:class="outline" presentation:placeholder="true" svg:width="0.035cm" svg:height="0.937cm" svg:x="0cm" svg:y="0cm">
            <draw:text-box fo:min-height="0.937cm">
              <text:p text:style-name="P238"><text:span/></text:p>
            </draw:text-box>
          </draw:frame>
          <draw:frame xml:id="id182" draw:id="id182" draw:name="Slide Number Placeholder 3" draw:text-style-name="P239" draw:layer="layout" presentation:style-name="pr65" presentation:class="page-number" presentation:placeholder="true" svg:width="0.035cm" svg:height="0.543cm" svg:x="0cm" svg:y="0cm">
            <draw:text-box fo:min-height="0.543cm">
              <text:p text:style-name="P240"><text:span text:style-name="T96"><text:page-number>&lt;numéro&gt;</text:page-number></text:span></text:p>
            </draw:text-box>
          </draw:frame>
        </presentation:notes>
      </draw:page>
      <draw:page draw:name="Slide_2" draw:style-name="dp49" draw:master-page-name="_______5f__5f__5f_Standard2" presentation:presentation-page-layout-name="AL2">
        <draw:frame xml:id="id183" draw:id="id183" draw:style-name="gr119" svg:width="13.66cm" svg:height="1.017cm" svg:x="1.01cm" svg:y="0.516cm">
          <draw:text-box fo:min-height="1.017cm">
            <text:p text:style-name="P241"><text:span text:style-name="T97">PIPELINE CI/CD GITHUB</text:span></text:p>
          </draw:text-box>
        </draw:frame>
        <draw:frame xml:id="id184" draw:id="id184" draw:style-name="gr120" svg:width="8.372cm" svg:height="1.017cm" svg:x="2.479cm" svg:y="1.783cm">
          <draw:text-box fo:min-height="1.017cm">
            <text:list text:style-name="L165" text:continue-numbering="true">
              <text:list-item>
                <text:p text:style-name="P242"><text:span text:style-name="T98">JOB 1 : Train-Build-Push</text:span></text:p>
              </text:list-item>
            </text:list>
          </draw:text-box>
        </draw:frame>
        <draw:frame xml:id="id185" draw:id="id185" draw:style-name="gr121" svg:width="22.28cm" svg:height="9.287cm" svg:x="2.86cm" svg:y="3.045cm">
          <draw:image xlink:href="Pictures/image28.png" xlink:type="simple" xlink:show="embed" xlink:actuate="onLoad"/>
        </draw:frame>
        <draw:frame xml:id="id186" draw:id="id186" draw:style-name="gr122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wheel" presentation:preset-sub-type="1">
                  <anim:set smil:dur="0s" smil:begin="0s" smil:targetElement="id185" smil:attributeName="visibility" smil:fill="hold" smil:to="visible"/>
                  <anim:transitionFilter smil:dur="0.5s" smil:targetElement="id185" smil:subtype="oneBlade" smil:type="pinWheelWipe" smil:mode="in"/>
                </anim:par>
              </anim:par>
            </anim:par>
          </anim:seq>
        </anim:par>
        <presentation:notes draw:style-name="dp50">
          <draw:frame xml:id="id187" draw:id="id187" draw:name="Slide Image Placeholder 1" draw:text-style-name="P243" draw:layer="layout" presentation:style-name="pr66" presentation:class="title" presentation:placeholder="true" svg:width="0.035cm" svg:height="0.937cm" svg:x="0cm" svg:y="0cm">
            <draw:text-box fo:min-height="0.937cm">
              <text:p text:style-name="P244"><text:span/></text:p>
            </draw:text-box>
          </draw:frame>
          <draw:frame xml:id="id188" draw:id="id188" draw:name="Notes Placeholder 2" draw:text-style-name="P245" draw:layer="layout" presentation:style-name="pr67" presentation:class="outline" presentation:placeholder="true" svg:width="0.035cm" svg:height="0.937cm" svg:x="0cm" svg:y="0cm">
            <draw:text-box fo:min-height="0.937cm">
              <text:p text:style-name="P246"><text:span/></text:p>
            </draw:text-box>
          </draw:frame>
          <draw:frame xml:id="id189" draw:id="id189" draw:name="Slide Number Placeholder 3" draw:text-style-name="P247" draw:layer="layout" presentation:style-name="pr68" presentation:class="page-number" presentation:placeholder="true" svg:width="0.035cm" svg:height="0.543cm" svg:x="0cm" svg:y="0cm">
            <draw:text-box fo:min-height="0.543cm">
              <text:p text:style-name="P248"><text:span text:style-name="T99"><text:page-number>&lt;numéro&gt;</text:page-number></text:span></text:p>
            </draw:text-box>
          </draw:frame>
        </presentation:notes>
      </draw:page>
      <draw:page draw:name="Slide_2" draw:style-name="dp51" draw:master-page-name="_______5f__5f__5f_Standard2" presentation:presentation-page-layout-name="AL2">
        <draw:frame xml:id="id190" draw:id="id190" draw:style-name="gr123" svg:width="13.66cm" svg:height="1.017cm" svg:x="1.01cm" svg:y="0.516cm">
          <draw:text-box fo:min-height="1.017cm">
            <text:p text:style-name="P249"><text:span text:style-name="T100">PIPELINE CI/CD GITHUB</text:span></text:p>
          </draw:text-box>
        </draw:frame>
        <draw:frame xml:id="id191" draw:id="id191" draw:style-name="gr124" svg:width="8.372cm" svg:height="1.017cm" svg:x="2.479cm" svg:y="1.783cm">
          <draw:text-box fo:min-height="1.017cm">
            <text:list text:style-name="L171" text:continue-numbering="true">
              <text:list-item>
                <text:p text:style-name="P250"><text:span text:style-name="T101">JOB 1 : Train-Build-Push</text:span></text:p>
              </text:list-item>
            </text:list>
          </draw:text-box>
        </draw:frame>
        <draw:frame xml:id="id192" draw:id="id192" draw:style-name="gr125" svg:width="22.62cm" svg:height="6.006cm" svg:x="2.316cm" svg:y="3.008cm">
          <draw:image xlink:href="Pictures/image29.png" xlink:type="simple" xlink:show="embed" xlink:actuate="onLoad"/>
        </draw:frame>
        <draw:frame xml:id="id193" draw:id="id193" draw:style-name="gr126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wheel" presentation:preset-sub-type="1">
                  <anim:set smil:dur="0s" smil:begin="0s" smil:targetElement="id192" smil:attributeName="visibility" smil:fill="hold" smil:to="visible"/>
                  <anim:transitionFilter smil:dur="0.5s" smil:targetElement="id192" smil:subtype="oneBlade" smil:type="pinWheelWipe" smil:mode="in"/>
                </anim:par>
              </anim:par>
            </anim:par>
          </anim:seq>
        </anim:par>
        <presentation:notes draw:style-name="dp52">
          <draw:frame xml:id="id194" draw:id="id194" draw:name="Slide Image Placeholder 1" draw:text-style-name="P251" draw:layer="layout" presentation:style-name="pr69" presentation:class="title" presentation:placeholder="true" svg:width="0.035cm" svg:height="0.937cm" svg:x="0cm" svg:y="0cm">
            <draw:text-box fo:min-height="0.937cm">
              <text:p text:style-name="P252"><text:span/></text:p>
            </draw:text-box>
          </draw:frame>
          <draw:frame xml:id="id195" draw:id="id195" draw:name="Notes Placeholder 2" draw:text-style-name="P253" draw:layer="layout" presentation:style-name="pr70" presentation:class="outline" presentation:placeholder="true" svg:width="0.035cm" svg:height="0.937cm" svg:x="0cm" svg:y="0cm">
            <draw:text-box fo:min-height="0.937cm">
              <text:p text:style-name="P254"><text:span/></text:p>
            </draw:text-box>
          </draw:frame>
          <draw:frame xml:id="id196" draw:id="id196" draw:name="Slide Number Placeholder 3" draw:text-style-name="P255" draw:layer="layout" presentation:style-name="pr71" presentation:class="page-number" presentation:placeholder="true" svg:width="0.035cm" svg:height="0.543cm" svg:x="0cm" svg:y="0cm">
            <draw:text-box fo:min-height="0.543cm">
              <text:p text:style-name="P256"><text:span text:style-name="T102"><text:page-number>&lt;numéro&gt;</text:page-number></text:span></text:p>
            </draw:text-box>
          </draw:frame>
        </presentation:notes>
      </draw:page>
      <draw:page draw:name="Slide_2" draw:style-name="dp53" draw:master-page-name="_______5f__5f__5f_Standard2" presentation:presentation-page-layout-name="AL2">
        <draw:frame xml:id="id197" draw:id="id197" draw:style-name="gr127" svg:width="13.66cm" svg:height="1.017cm" svg:x="1.01cm" svg:y="0.516cm">
          <draw:text-box fo:min-height="1.017cm">
            <text:p text:style-name="P257"><text:span text:style-name="T103">PIPELINE CI/CD GITHUB</text:span></text:p>
          </draw:text-box>
        </draw:frame>
        <draw:frame xml:id="id198" draw:id="id198" draw:style-name="gr128" svg:width="9.378cm" svg:height="1.017cm" svg:x="2.479cm" svg:y="1.803cm">
          <draw:text-box fo:min-height="1.017cm">
            <text:list text:style-name="L177" text:continue-numbering="true">
              <text:list-item>
                <text:p text:style-name="P258"><text:span text:style-name="T104">JOB 2 : Déploiement sur EC2</text:span></text:p>
              </text:list-item>
            </text:list>
          </draw:text-box>
        </draw:frame>
        <draw:frame xml:id="id199" draw:id="id199" draw:style-name="gr129" svg:width="18.99cm" svg:height="11.95cm" svg:x="2.026cm" svg:y="3.38cm">
          <draw:image xlink:href="Pictures/image30.png" xlink:type="simple" xlink:show="embed" xlink:actuate="onLoad"/>
        </draw:frame>
        <draw:frame xml:id="id200" draw:id="id200" draw:style-name="gr130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wheel" presentation:preset-sub-type="1">
                  <anim:set smil:dur="0s" smil:begin="0s" smil:targetElement="id199" smil:attributeName="visibility" smil:fill="hold" smil:to="visible"/>
                  <anim:transitionFilter smil:dur="0.5s" smil:targetElement="id199" smil:subtype="oneBlade" smil:type="pinWheelWipe" smil:mode="in"/>
                </anim:par>
              </anim:par>
            </anim:par>
          </anim:seq>
        </anim:par>
        <presentation:notes draw:style-name="dp54">
          <draw:frame xml:id="id201" draw:id="id201" draw:name="Slide Image Placeholder 1" draw:text-style-name="P259" draw:layer="layout" presentation:style-name="pr72" presentation:class="title" presentation:placeholder="true" svg:width="0.035cm" svg:height="0.937cm" svg:x="0cm" svg:y="0cm">
            <draw:text-box fo:min-height="0.937cm">
              <text:p text:style-name="P260"><text:span/></text:p>
            </draw:text-box>
          </draw:frame>
          <draw:frame xml:id="id202" draw:id="id202" draw:name="Notes Placeholder 2" draw:text-style-name="P261" draw:layer="layout" presentation:style-name="pr73" presentation:class="outline" presentation:placeholder="true" svg:width="0.035cm" svg:height="0.937cm" svg:x="0cm" svg:y="0cm">
            <draw:text-box fo:min-height="0.937cm">
              <text:p text:style-name="P262"><text:span/></text:p>
            </draw:text-box>
          </draw:frame>
          <draw:frame xml:id="id203" draw:id="id203" draw:name="Slide Number Placeholder 3" draw:text-style-name="P263" draw:layer="layout" presentation:style-name="pr74" presentation:class="page-number" presentation:placeholder="true" svg:width="0.035cm" svg:height="0.543cm" svg:x="0cm" svg:y="0cm">
            <draw:text-box fo:min-height="0.543cm">
              <text:p text:style-name="P264"><text:span text:style-name="T105"><text:page-number>&lt;numéro&gt;</text:page-number></text:span></text:p>
            </draw:text-box>
          </draw:frame>
        </presentation:notes>
      </draw:page>
      <draw:page draw:name="Slide_2" draw:style-name="dp55" draw:master-page-name="_______5f__5f__5f_Standard2" presentation:presentation-page-layout-name="AL2">
        <draw:frame xml:id="id204" draw:id="id204" draw:style-name="gr131" svg:width="13.66cm" svg:height="1.017cm" svg:x="1.01cm" svg:y="0.516cm">
          <draw:text-box fo:min-height="1.017cm">
            <text:p text:style-name="P265"><text:span text:style-name="T106">PIPELINE CI/CD GITHUB</text:span></text:p>
          </draw:text-box>
        </draw:frame>
        <draw:frame xml:id="id205" draw:id="id205" draw:style-name="gr132" svg:width="9.378cm" svg:height="1.017cm" svg:x="2.479cm" svg:y="1.803cm">
          <draw:text-box fo:min-height="1.017cm">
            <text:list text:style-name="L183" text:continue-numbering="true">
              <text:list-item>
                <text:p text:style-name="P266"><text:span text:style-name="T107">JOB 2 : Déploiement sur EC2</text:span></text:p>
              </text:list-item>
            </text:list>
          </draw:text-box>
        </draw:frame>
        <draw:frame xml:id="id206" draw:id="id206" draw:style-name="gr133" svg:width="23.68cm" svg:height="6.271cm" svg:x="1.6cm" svg:y="3.137cm">
          <draw:image xlink:href="Pictures/image31.png" xlink:type="simple" xlink:show="embed" xlink:actuate="onLoad"/>
        </draw:frame>
        <draw:frame xml:id="id207" draw:id="id207" draw:style-name="gr134" svg:width="2.136cm" svg:height="2.851cm" svg:x="0.2158cm" svg:y="13.51cm">
          <draw:image xlink:href="Pictures/image3.png" xlink:type="simple" xlink:show="embed" xlink:actuate="onLoad"/>
        </draw:frame>
        <draw:custom-shape xml:id="id208" draw:id="id208" draw:style-name="gr135" draw:transform="rotate(-6.2831853071795862) translate(0.7247cm,5.851cm)" svg:width="13.39cm" svg:height="0.7832cm">
          <text:p text:style-name="P267"><text:span/></text:p>
          <draw:enhanced-geometry draw:type="flowchart-terminator"/>
        </draw:custom-shape>
        <draw:frame xml:id="id209" draw:id="id209" draw:style-name="gr136" svg:width="13.1cm" svg:height="7.858cm" svg:x="8.122cm" svg:y="0.1806cm">
          <draw:image xlink:href="Pictures/image32.png" xlink:type="simple" xlink:show="embed" xlink:actuate="onLoad"/>
        </draw:frame>
        <draw:frame xml:id="id210" draw:id="id210" draw:style-name="gr137" svg:width="6.387cm" svg:height="7.556cm" svg:x="19.82cm" svg:y="7.689cm">
          <draw:image xlink:href="Pictures/image3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wheel" presentation:preset-sub-type="1">
                  <anim:set smil:dur="0s" smil:begin="0s" smil:targetElement="id206" smil:attributeName="visibility" smil:fill="hold" smil:to="visible"/>
                  <anim:transitionFilter smil:dur="0.5s" smil:targetElement="id206" smil:subtype="oneBlade" smil:type="pinWheelWipe" smil:mode="in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fade-in" presentation:preset-sub-type="0">
                  <anim:set smil:dur="0.001s" smil:begin="0s" smil:targetElement="id208" smil:attributeName="visibility" smil:fill="hold" smil:to="visible"/>
                  <anim:transitionFilter smil:dur="0.5s" smil:targetElement="id208" smil:subtype="crossfade" smil:type="fade" smil:mode="in"/>
                </anim:par>
                <anim:par presentation:node-type="with-previous" smil:begin="0s" smil:fill="hold" presentation:preset-class="entrance" presentation:preset-id="ooo-entrance-fade-in" presentation:preset-sub-type="0">
                  <anim:set smil:dur="0.001s" smil:begin="0s" smil:targetElement="id209" smil:attributeName="visibility" smil:fill="hold" smil:to="visible"/>
                  <anim:transitionFilter smil:dur="0.5s" smil:targetElement="id209" smil:subtype="crossfade" smil:type="fade" smil:mode="in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appear" presentation:preset-sub-type="0">
                  <anim:set smil:dur="0.001s" smil:begin="0s" smil:targetElement="id210" smil:attributeName="visibility" smil:fill="hold" smil:to="visible"/>
                </anim:par>
              </anim:par>
            </anim:par>
          </anim:seq>
        </anim:par>
        <presentation:notes draw:style-name="dp56">
          <draw:frame xml:id="id211" draw:id="id211" draw:name="Slide Image Placeholder 1" draw:text-style-name="P268" draw:layer="layout" presentation:style-name="pr75" presentation:class="title" presentation:placeholder="true" svg:width="0.035cm" svg:height="0.937cm" svg:x="0cm" svg:y="0cm">
            <draw:text-box fo:min-height="0.937cm">
              <text:p text:style-name="P269"><text:span/></text:p>
            </draw:text-box>
          </draw:frame>
          <draw:frame xml:id="id212" draw:id="id212" draw:name="Notes Placeholder 2" draw:text-style-name="P270" draw:layer="layout" presentation:style-name="pr76" presentation:class="outline" presentation:placeholder="true" svg:width="0.035cm" svg:height="0.937cm" svg:x="0cm" svg:y="0cm">
            <draw:text-box fo:min-height="0.937cm">
              <text:p text:style-name="P271"><text:span/></text:p>
            </draw:text-box>
          </draw:frame>
          <draw:frame xml:id="id213" draw:id="id213" draw:name="Slide Number Placeholder 3" draw:text-style-name="P272" draw:layer="layout" presentation:style-name="pr77" presentation:class="page-number" presentation:placeholder="true" svg:width="0.035cm" svg:height="0.543cm" svg:x="0cm" svg:y="0cm">
            <draw:text-box fo:min-height="0.543cm">
              <text:p text:style-name="P273"><text:span text:style-name="T108"><text:page-number>&lt;numéro&gt;</text:page-number></text:span></text:p>
            </draw:text-box>
          </draw:frame>
        </presentation:notes>
      </draw:page>
      <draw:page draw:name="Slide_2" draw:style-name="dp57" draw:master-page-name="_______5f__5f__5f_Standard2" presentation:presentation-page-layout-name="AL2">
        <draw:custom-shape xml:id="id214" draw:id="id214" draw:style-name="gr138" draw:transform="rotate(-37.037456069205426) translate(13.08cm,4.987cm)" svg:width="14.09cm" svg:height="4.776cm">
          <text:p text:style-name="P274"><text:span/></text:p>
          <draw:enhanced-geometry draw:type="flowchart-terminator"/>
        </draw:custom-shape>
        <draw:custom-shape xml:id="id215" draw:id="id215" draw:style-name="gr139" draw:transform="rotate(-37.037456069205426) translate(20.53cm,5.726cm)" svg:width="12.69cm" svg:height="3.142cm">
          <text:p text:style-name="P275"><text:span/></text:p>
          <draw:enhanced-geometry draw:type="flowchart-terminator"/>
        </draw:custom-shape>
        <draw:custom-shape xml:id="id216" draw:id="id216" draw:style-name="gr140" draw:transform="rotate(-40.153218431642124) translate(21.87cm,7.894cm)" svg:width="3.766cm" svg:height="2.491cm">
          <text:p text:style-name="P276"><text:span/></text:p>
          <draw:enhanced-geometry draw:type="flowchart-terminator"/>
        </draw:custom-shape>
        <draw:custom-shape xml:id="id217" draw:id="id217" draw:style-name="gr141" draw:transform="rotate(-37.037456069205426) translate(22.83cm,8.296cm)" svg:width="12.69cm" svg:height="3.126cm">
          <text:p text:style-name="P277"><text:span/></text:p>
          <draw:enhanced-geometry draw:type="flowchart-terminator"/>
        </draw:custom-shape>
        <draw:custom-shape xml:id="id218" draw:id="id218" draw:style-name="gr142" draw:transform="rotate(-37.037456069205426) translate(8.952cm,4.386cm)" svg:width="12.69cm" svg:height="2.287cm">
          <text:p text:style-name="P278"><text:span/></text:p>
          <draw:enhanced-geometry draw:type="flowchart-terminator"/>
        </draw:custom-shape>
        <draw:custom-shape xml:id="id219" draw:id="id219" draw:style-name="gr143" draw:transform="rotate(-37.201343067744105) translate(20.53cm,10.43cm)" svg:width="3.088cm" svg:height="2.003cm">
          <text:p text:style-name="P279"><text:span/></text:p>
          <draw:enhanced-geometry draw:type="flowchart-connector"/>
        </draw:custom-shape>
        <draw:frame xml:id="id220" draw:id="id220" draw:style-name="gr144" svg:width="11.37cm" svg:height="1.44cm" svg:x="1.495cm" svg:y="6.298cm">
          <draw:text-box fo:min-height="1.44cm">
            <text:p text:style-name="P280"><text:span text:style-name="T109">CONTENEURISATION</text:span></text:p>
          </draw:text-box>
        </draw:frame>
        <draw:frame xml:id="id221" draw:id="id221" draw:style-name="gr145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220" smil:attributeName="visibility" smil:fill="hold" smil:to="visible"/>
                  <anim:animate smil:dur="1s" smil:targetElement="id220" smil:attributeName="width" smil:values="0;width" smil:keyTimes="0;1"/>
                  <anim:animate smil:dur="1s" smil:targetElement="id220" smil:attributeName="height" smil:values="0;height" smil:keyTimes="0;1"/>
                  <anim:animate smil:dur="1s" smil:targetElement="id220" smil:attributeName="rotate" smil:values="90;0" smil:keyTimes="0;1"/>
                  <anim:transitionFilter smil:dur="1s" smil:targetElement="id220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219" smil:attributeName="visibility" smil:fill="hold" smil:to="visible"/>
                  <anim:animate smil:dur="1s" smil:targetElement="id219" smil:attributeName="width" smil:values="0;width" smil:keyTimes="0;1"/>
                  <anim:animate smil:dur="1s" smil:targetElement="id219" smil:attributeName="height" smil:values="0;height" smil:keyTimes="0;1"/>
                  <anim:animate smil:dur="1s" smil:targetElement="id219" smil:attributeName="rotate" smil:values="90;0" smil:keyTimes="0;1"/>
                  <anim:transitionFilter smil:dur="1s" smil:targetElement="id219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218" smil:attributeName="visibility" smil:fill="hold" smil:to="visible"/>
                  <anim:animate smil:dur="1s" smil:targetElement="id218" smil:attributeName="width" smil:values="0;width" smil:keyTimes="0;1"/>
                  <anim:animate smil:dur="1s" smil:targetElement="id218" smil:attributeName="height" smil:values="0;height" smil:keyTimes="0;1"/>
                  <anim:animate smil:dur="1s" smil:targetElement="id218" smil:attributeName="rotate" smil:values="90;0" smil:keyTimes="0;1"/>
                  <anim:transitionFilter smil:dur="1s" smil:targetElement="id218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217" smil:attributeName="visibility" smil:fill="hold" smil:to="visible"/>
                  <anim:animate smil:dur="1s" smil:targetElement="id217" smil:attributeName="width" smil:values="0;width" smil:keyTimes="0;1"/>
                  <anim:animate smil:dur="1s" smil:targetElement="id217" smil:attributeName="height" smil:values="0;height" smil:keyTimes="0;1"/>
                  <anim:animate smil:dur="1s" smil:targetElement="id217" smil:attributeName="rotate" smil:values="90;0" smil:keyTimes="0;1"/>
                  <anim:transitionFilter smil:dur="1s" smil:targetElement="id217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216" smil:attributeName="visibility" smil:fill="hold" smil:to="visible"/>
                  <anim:animate smil:dur="1s" smil:targetElement="id216" smil:attributeName="width" smil:values="0;width" smil:keyTimes="0;1"/>
                  <anim:animate smil:dur="1s" smil:targetElement="id216" smil:attributeName="height" smil:values="0;height" smil:keyTimes="0;1"/>
                  <anim:animate smil:dur="1s" smil:targetElement="id216" smil:attributeName="rotate" smil:values="90;0" smil:keyTimes="0;1"/>
                  <anim:transitionFilter smil:dur="1s" smil:targetElement="id216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215" smil:attributeName="visibility" smil:fill="hold" smil:to="visible"/>
                  <anim:animate smil:dur="1s" smil:targetElement="id215" smil:attributeName="width" smil:values="0;width" smil:keyTimes="0;1"/>
                  <anim:animate smil:dur="1s" smil:targetElement="id215" smil:attributeName="height" smil:values="0;height" smil:keyTimes="0;1"/>
                  <anim:animate smil:dur="1s" smil:targetElement="id215" smil:attributeName="rotate" smil:values="90;0" smil:keyTimes="0;1"/>
                  <anim:transitionFilter smil:dur="1s" smil:targetElement="id215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214" smil:attributeName="visibility" smil:fill="hold" smil:to="visible"/>
                  <anim:animate smil:dur="1s" smil:targetElement="id214" smil:attributeName="width" smil:values="0;width" smil:keyTimes="0;1"/>
                  <anim:animate smil:dur="1s" smil:targetElement="id214" smil:attributeName="height" smil:values="0;height" smil:keyTimes="0;1"/>
                  <anim:animate smil:dur="1s" smil:targetElement="id214" smil:attributeName="rotate" smil:values="90;0" smil:keyTimes="0;1"/>
                  <anim:transitionFilter smil:dur="1s" smil:targetElement="id214" smil:subtype="crossfade" smil:type="fade" smil:mode="in"/>
                </anim:par>
              </anim:par>
            </anim:par>
          </anim:seq>
        </anim:par>
        <presentation:notes draw:style-name="dp58">
          <draw:frame xml:id="id222" draw:id="id222" draw:name="Slide Image Placeholder 1" draw:text-style-name="P281" draw:layer="layout" presentation:style-name="pr78" presentation:class="title" presentation:placeholder="true" svg:width="0.035cm" svg:height="0.937cm" svg:x="0cm" svg:y="0cm">
            <draw:text-box fo:min-height="0.937cm">
              <text:p text:style-name="P282"><text:span/></text:p>
            </draw:text-box>
          </draw:frame>
          <draw:frame xml:id="id223" draw:id="id223" draw:name="Notes Placeholder 2" draw:text-style-name="P283" draw:layer="layout" presentation:style-name="pr79" presentation:class="outline" presentation:placeholder="true" svg:width="0.035cm" svg:height="0.937cm" svg:x="0cm" svg:y="0cm">
            <draw:text-box fo:min-height="0.937cm">
              <text:p text:style-name="P284"><text:span/></text:p>
            </draw:text-box>
          </draw:frame>
          <draw:frame xml:id="id224" draw:id="id224" draw:name="Slide Number Placeholder 3" draw:text-style-name="P285" draw:layer="layout" presentation:style-name="pr80" presentation:class="page-number" presentation:placeholder="true" svg:width="0.035cm" svg:height="0.543cm" svg:x="0cm" svg:y="0cm">
            <draw:text-box fo:min-height="0.543cm">
              <text:p text:style-name="P286"><text:span text:style-name="T110"><text:page-number>&lt;numéro&gt;</text:page-number></text:span></text:p>
            </draw:text-box>
          </draw:frame>
        </presentation:notes>
      </draw:page>
      <draw:page draw:name="Slide_2" draw:style-name="dp59" draw:master-page-name="_______5f__5f__5f_Standard2" presentation:presentation-page-layout-name="AL2">
        <draw:frame xml:id="id225" draw:id="id225" draw:style-name="gr146" svg:width="13.64cm" svg:height="1.017cm" svg:x="1.01cm" svg:y="0.514cm">
          <draw:text-box fo:min-height="1.017cm">
            <text:p text:style-name="P287"><text:span text:style-name="T111">CONTENEURISATION</text:span></text:p>
          </draw:text-box>
        </draw:frame>
        <draw:frame xml:id="id226" draw:id="id226" draw:style-name="gr147" svg:width="13.72cm" svg:height="1.017cm" svg:x="2.479cm" svg:y="1.786cm">
          <draw:text-box fo:min-height="1.017cm">
            <text:list text:style-name="L200" text:continue-numbering="true">
              <text:list-item>
                <text:p text:style-name="P288"><text:span text:style-name="T112">SCHÉMA DU RÉSEAU</text:span></text:p>
              </text:list-item>
            </text:list>
          </draw:text-box>
        </draw:frame>
        <draw:frame xml:id="id227" draw:id="id227" draw:style-name="gr148" svg:width="19.69cm" svg:height="12.97cm" svg:x="7.819cm" svg:y="2.781cm">
          <draw:image xlink:href="Pictures/image35.png" xlink:type="simple" xlink:show="embed" xlink:actuate="onLoad"/>
        </draw:frame>
        <draw:frame xml:id="id228" draw:id="id228" draw:style-name="gr149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wheel" presentation:preset-sub-type="1">
                  <anim:set smil:dur="0.001s" smil:begin="0s" smil:targetElement="id227" smil:attributeName="visibility" smil:fill="hold" smil:to="visible"/>
                  <anim:transitionFilter smil:dur="1s" smil:targetElement="id227" smil:subtype="oneBlade" smil:type="pinWheelWipe" smil:mode="in"/>
                </anim:par>
              </anim:par>
            </anim:par>
          </anim:seq>
        </anim:par>
        <presentation:notes draw:style-name="dp60">
          <draw:frame xml:id="id229" draw:id="id229" draw:name="Slide Image Placeholder 1" draw:text-style-name="P289" draw:layer="layout" presentation:style-name="pr81" presentation:class="title" presentation:placeholder="true" svg:width="0.035cm" svg:height="0.937cm" svg:x="0cm" svg:y="0cm">
            <draw:text-box fo:min-height="0.937cm">
              <text:p text:style-name="P290"><text:span/></text:p>
            </draw:text-box>
          </draw:frame>
          <draw:frame xml:id="id230" draw:id="id230" draw:name="Notes Placeholder 2" draw:text-style-name="P291" draw:layer="layout" presentation:style-name="pr82" presentation:class="outline" presentation:placeholder="true" svg:width="0.035cm" svg:height="0.937cm" svg:x="0cm" svg:y="0cm">
            <draw:text-box fo:min-height="0.937cm">
              <text:p text:style-name="P292"><text:span/></text:p>
            </draw:text-box>
          </draw:frame>
          <draw:frame xml:id="id231" draw:id="id231" draw:name="Slide Number Placeholder 3" draw:text-style-name="P293" draw:layer="layout" presentation:style-name="pr83" presentation:class="page-number" presentation:placeholder="true" svg:width="0.035cm" svg:height="0.543cm" svg:x="0cm" svg:y="0cm">
            <draw:text-box fo:min-height="0.543cm">
              <text:p text:style-name="P294"><text:span text:style-name="T113"><text:page-number>&lt;numéro&gt;</text:page-number></text:span></text:p>
            </draw:text-box>
          </draw:frame>
        </presentation:notes>
      </draw:page>
      <draw:page draw:name="Slide_2" draw:style-name="dp61" draw:master-page-name="_______5f__5f__5f_Standard2" presentation:presentation-page-layout-name="AL2">
        <draw:frame xml:id="id232" draw:id="id232" draw:style-name="gr150" svg:width="13.64cm" svg:height="1.017cm" svg:x="1.01cm" svg:y="0.515cm">
          <draw:text-box fo:min-height="1.017cm">
            <text:p text:style-name="P295"><text:span text:style-name="T114">CONTENEURISATION</text:span></text:p>
          </draw:text-box>
        </draw:frame>
        <draw:frame xml:id="id233" draw:id="id233" draw:style-name="gr151" svg:width="13.77cm" svg:height="1.017cm" svg:x="2.479cm" svg:y="1.81cm">
          <draw:text-box fo:min-height="1.017cm">
            <text:list text:style-name="L206" text:continue-numbering="true">
              <text:list-item>
                <text:p text:style-name="P296"><text:span text:style-name="T115">CONTENEURS</text:span></text:p>
              </text:list-item>
            </text:list>
          </draw:text-box>
        </draw:frame>
        <draw:frame xml:id="id234" draw:id="id234" draw:style-name="gr152" svg:width="5.954cm" svg:height="5.954cm" svg:x="2.191cm" svg:y="3.408cm">
          <draw:image xlink:href="Pictures/image36.png" xlink:type="simple" xlink:show="embed" xlink:actuate="onLoad"/>
        </draw:frame>
        <draw:frame xml:id="id235" draw:id="id235" draw:style-name="gr153" svg:width="5.075cm" svg:height="5.075cm" svg:x="17.86cm" svg:y="3.727cm">
          <draw:image xlink:href="Pictures/image37.png" xlink:type="simple" xlink:show="embed" xlink:actuate="onLoad"/>
        </draw:frame>
        <draw:frame xml:id="id236" draw:id="id236" draw:style-name="gr154" svg:width="4.274cm" svg:height="0.932cm" svg:x="3.544cm" svg:y="9.503cm">
          <draw:text-box fo:min-height="0.932cm">
            <text:p text:style-name="P297"><text:span text:style-name="T116">PERMANENTS</text:span></text:p>
          </draw:text-box>
        </draw:frame>
        <draw:frame xml:id="id237" draw:id="id237" draw:style-name="gr155" svg:width="4.774cm" svg:height="0.932cm" svg:x="18.92cm" svg:y="9.664cm">
          <draw:text-box fo:min-height="0.932cm">
            <text:p text:style-name="P298"><text:span text:style-name="T117">À LA DEMANDE</text:span></text:p>
          </draw:text-box>
        </draw:frame>
        <draw:frame xml:id="id238" draw:id="id238" draw:style-name="gr156" svg:width="6.632cm" svg:height="6.581cm" svg:x="9.397cm" svg:y="7.872cm">
          <draw:image xlink:href="Pictures/image38.png" xlink:type="simple" xlink:show="embed" xlink:actuate="onLoad"/>
        </draw:frame>
        <draw:frame xml:id="id239" draw:id="id239" draw:style-name="gr157" svg:width="6.076cm" svg:height="0.932cm" svg:x="9.523cm" svg:y="14.45cm">
          <draw:text-box fo:min-height="0.932cm">
            <text:p text:style-name="P299"><text:span text:style-name="T118">VRAIMENT UTILISÉS</text:span></text:p>
          </draw:text-box>
        </draw:frame>
        <draw:frame xml:id="id240" draw:id="id240" draw:style-name="gr158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ascend" presentation:preset-sub-type="0">
                  <anim:set smil:dur="0.001s" smil:begin="0s" smil:targetElement="id234" smil:attributeName="visibility" smil:fill="hold" smil:to="visible"/>
                  <anim:transitionFilter smil:dur="1s" smil:targetElement="id234" smil:subtype="crossfade" smil:type="fade" smil:mode="in"/>
                  <anim:animate smil:dur="1s" smil:targetElement="id234" smil:attributeName="x" smil:values="x;x" smil:keyTimes="0;1"/>
                  <anim:animate smil:dur="1s" smil:targetElement="id234" smil:attributeName="y" smil:values="y+.1;y" smil:keyTimes="0;1"/>
                </anim:par>
                <anim:par presentation:node-type="with-previous" smil:begin="0s" smil:fill="hold" presentation:preset-class="entrance" presentation:preset-id="ooo-entrance-ascend" presentation:preset-sub-type="0">
                  <anim:set smil:dur="0.001s" smil:begin="0s" smil:targetElement="id236" smil:attributeName="visibility" smil:fill="hold" smil:to="visible"/>
                  <anim:transitionFilter smil:dur="1s" smil:targetElement="id236" smil:subtype="crossfade" smil:type="fade" smil:mode="in"/>
                  <anim:animate smil:dur="1s" smil:targetElement="id236" smil:attributeName="x" smil:values="x;x" smil:keyTimes="0;1"/>
                  <anim:animate smil:dur="1s" smil:targetElement="id236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ascend" presentation:preset-sub-type="0">
                  <anim:set smil:dur="0.001s" smil:begin="0s" smil:targetElement="id235" smil:attributeName="visibility" smil:fill="hold" smil:to="visible"/>
                  <anim:transitionFilter smil:dur="1s" smil:targetElement="id235" smil:subtype="crossfade" smil:type="fade" smil:mode="in"/>
                  <anim:animate smil:dur="1s" smil:targetElement="id235" smil:attributeName="x" smil:values="x;x" smil:keyTimes="0;1"/>
                  <anim:animate smil:dur="1s" smil:targetElement="id235" smil:attributeName="y" smil:values="y+.1;y" smil:keyTimes="0;1"/>
                </anim:par>
                <anim:par presentation:node-type="with-previous" smil:begin="0s" smil:fill="hold" presentation:preset-class="entrance" presentation:preset-id="ooo-entrance-ascend" presentation:preset-sub-type="0">
                  <anim:set smil:dur="0.001s" smil:begin="0s" smil:targetElement="id237" smil:attributeName="visibility" smil:fill="hold" smil:to="visible"/>
                  <anim:transitionFilter smil:dur="1s" smil:targetElement="id237" smil:subtype="crossfade" smil:type="fade" smil:mode="in"/>
                  <anim:animate smil:dur="1s" smil:targetElement="id237" smil:attributeName="x" smil:values="x;x" smil:keyTimes="0;1"/>
                  <anim:animate smil:dur="1s" smil:targetElement="id237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ascend" presentation:preset-sub-type="0">
                  <anim:set smil:dur="0.001s" smil:begin="0s" smil:targetElement="id238" smil:attributeName="visibility" smil:fill="hold" smil:to="visible"/>
                  <anim:transitionFilter smil:dur="1s" smil:targetElement="id238" smil:subtype="crossfade" smil:type="fade" smil:mode="in"/>
                  <anim:animate smil:dur="1s" smil:targetElement="id238" smil:attributeName="x" smil:values="x;x" smil:keyTimes="0;1"/>
                  <anim:animate smil:dur="1s" smil:targetElement="id238" smil:attributeName="y" smil:values="y+.1;y" smil:keyTimes="0;1"/>
                </anim:par>
                <anim:par presentation:node-type="with-previous" smil:begin="0s" smil:fill="hold" presentation:preset-class="entrance" presentation:preset-id="ooo-entrance-ascend" presentation:preset-sub-type="0">
                  <anim:set smil:dur="0.001s" smil:begin="0s" smil:targetElement="id239" smil:attributeName="visibility" smil:fill="hold" smil:to="visible"/>
                  <anim:transitionFilter smil:dur="1s" smil:targetElement="id239" smil:subtype="crossfade" smil:type="fade" smil:mode="in"/>
                  <anim:animate smil:dur="1s" smil:targetElement="id239" smil:attributeName="x" smil:values="x;x" smil:keyTimes="0;1"/>
                  <anim:animate smil:dur="1s" smil:targetElement="id239" smil:attributeName="y" smil:values="y+.1;y" smil:keyTimes="0;1"/>
                </anim:par>
              </anim:par>
            </anim:par>
          </anim:seq>
        </anim:par>
        <presentation:notes draw:style-name="dp62">
          <draw:frame xml:id="id241" draw:id="id241" draw:name="Slide Image Placeholder 1" draw:text-style-name="P300" draw:layer="layout" presentation:style-name="pr84" presentation:class="title" presentation:placeholder="true" svg:width="0.035cm" svg:height="0.937cm" svg:x="0cm" svg:y="0cm">
            <draw:text-box fo:min-height="0.937cm">
              <text:p text:style-name="P301"><text:span/></text:p>
            </draw:text-box>
          </draw:frame>
          <draw:frame xml:id="id242" draw:id="id242" draw:name="Notes Placeholder 2" draw:text-style-name="P302" draw:layer="layout" presentation:style-name="pr85" presentation:class="outline" presentation:placeholder="true" svg:width="0.035cm" svg:height="0.937cm" svg:x="0cm" svg:y="0cm">
            <draw:text-box fo:min-height="0.937cm">
              <text:p text:style-name="P303"><text:span/></text:p>
            </draw:text-box>
          </draw:frame>
          <draw:frame xml:id="id243" draw:id="id243" draw:name="Slide Number Placeholder 3" draw:text-style-name="P304" draw:layer="layout" presentation:style-name="pr86" presentation:class="page-number" presentation:placeholder="true" svg:width="0.035cm" svg:height="0.543cm" svg:x="0cm" svg:y="0cm">
            <draw:text-box fo:min-height="0.543cm">
              <text:p text:style-name="P305"><text:span text:style-name="T119"><text:page-number>&lt;numéro&gt;</text:page-number></text:span></text:p>
            </draw:text-box>
          </draw:frame>
        </presentation:notes>
      </draw:page>
      <draw:page draw:name="Slide_2" draw:style-name="dp63" draw:master-page-name="_______5f__5f__5f_Standard2" presentation:presentation-page-layout-name="AL2">
        <draw:frame xml:id="id244" draw:id="id244" draw:style-name="gr159" svg:width="21.3cm" svg:height="11.38cm" svg:x="3.723cm" svg:y="3.304cm">
          <draw:image xlink:href="Pictures/image39.png" xlink:type="simple" xlink:show="embed" xlink:actuate="onLoad"/>
        </draw:frame>
        <draw:frame xml:id="id245" draw:id="id245" draw:style-name="gr160" svg:width="13.64cm" svg:height="1.017cm" svg:x="1.01cm" svg:y="0.515cm">
          <draw:text-box fo:min-height="1.017cm">
            <text:p text:style-name="P306"><text:span text:style-name="T120">CONTENEURISATION</text:span></text:p>
          </draw:text-box>
        </draw:frame>
        <draw:frame xml:id="id246" draw:id="id246" draw:style-name="gr161" svg:width="20.52cm" svg:height="1.017cm" svg:x="2.479cm" svg:y="1.827cm">
          <draw:text-box fo:min-height="1.017cm">
            <text:list text:style-name="L215" text:continue-numbering="true">
              <text:list-item>
                <text:p text:style-name="P307"><text:span text:style-name="T121">No root sur API &amp; Non élévation des privilèges Docker compose</text:span></text:p>
              </text:list-item>
            </text:list>
          </draw:text-box>
        </draw:frame>
        <draw:frame xml:id="id247" draw:id="id247" draw:style-name="gr162" svg:width="2.136cm" svg:height="2.851cm" svg:x="0.2158cm" svg:y="13.51cm">
          <draw:image xlink:href="Pictures/image3.png" xlink:type="simple" xlink:show="embed" xlink:actuate="onLoad"/>
        </draw:frame>
        <draw:custom-shape xml:id="id248" draw:id="id248" draw:style-name="gr163" draw:transform="rotate(-6.2831853071795862) translate(3.693cm,12.78cm)" svg:width="7.975cm" svg:height="1.901cm">
          <text:p text:style-name="P308"><text:span/></text:p>
          <draw:enhanced-geometry draw:type="flowchart-terminator"/>
        </draw:custom-shape>
        <draw:frame xml:id="id249" draw:id="id249" draw:style-name="gr164" svg:width="8.338cm" svg:height="5.558cm" svg:x="19.54cm" svg:y="3.436cm">
          <draw:image xlink:href="Pictures/image40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fade-in" presentation:preset-sub-type="0">
                  <anim:set smil:dur="0.001s" smil:begin="0s" smil:targetElement="id248" smil:attributeName="visibility" smil:fill="hold" smil:to="visible"/>
                  <anim:transitionFilter smil:dur="0.5s" smil:targetElement="id248" smil:subtype="crossfade" smil:type="fade" smil:mode="in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appear" presentation:preset-sub-type="0">
                  <anim:set smil:dur="0.001s" smil:begin="0s" smil:targetElement="id249" smil:attributeName="visibility" smil:fill="hold" smil:to="visible"/>
                </anim:par>
              </anim:par>
            </anim:par>
          </anim:seq>
        </anim:par>
        <presentation:notes draw:style-name="dp64">
          <draw:frame xml:id="id250" draw:id="id250" draw:name="Slide Image Placeholder 1" draw:text-style-name="P309" draw:layer="layout" presentation:style-name="pr87" presentation:class="title" presentation:placeholder="true" svg:width="0.035cm" svg:height="0.937cm" svg:x="0cm" svg:y="0cm">
            <draw:text-box fo:min-height="0.937cm">
              <text:p text:style-name="P310"><text:span/></text:p>
            </draw:text-box>
          </draw:frame>
          <draw:frame xml:id="id251" draw:id="id251" draw:name="Notes Placeholder 2" draw:text-style-name="P311" draw:layer="layout" presentation:style-name="pr88" presentation:class="outline" presentation:placeholder="true" svg:width="0.035cm" svg:height="0.937cm" svg:x="0cm" svg:y="0cm">
            <draw:text-box fo:min-height="0.937cm">
              <text:p text:style-name="P312"><text:span/></text:p>
            </draw:text-box>
          </draw:frame>
          <draw:frame xml:id="id252" draw:id="id252" draw:name="Slide Number Placeholder 3" draw:text-style-name="P313" draw:layer="layout" presentation:style-name="pr89" presentation:class="page-number" presentation:placeholder="true" svg:width="0.035cm" svg:height="0.543cm" svg:x="0cm" svg:y="0cm">
            <draw:text-box fo:min-height="0.543cm">
              <text:p text:style-name="P314"><text:span text:style-name="T122"><text:page-number>&lt;numéro&gt;</text:page-number></text:span></text:p>
            </draw:text-box>
          </draw:frame>
        </presentation:notes>
      </draw:page>
      <draw:page draw:name="Slide_2" draw:style-name="dp65" draw:master-page-name="_______5f__5f__5f_Standard2" presentation:presentation-page-layout-name="AL2">
        <draw:frame xml:id="id253" draw:id="id253" draw:style-name="gr165" svg:width="13.64cm" svg:height="1.017cm" svg:x="1.01cm" svg:y="0.515cm">
          <draw:text-box fo:min-height="1.017cm">
            <text:p text:style-name="P315"><text:span text:style-name="T123">CONTENEURISATION</text:span></text:p>
          </draw:text-box>
        </draw:frame>
        <draw:frame xml:id="id254" draw:id="id254" draw:style-name="gr166" svg:width="13.84cm" svg:height="1.017cm" svg:x="2.479cm" svg:y="1.827cm">
          <draw:text-box fo:min-height="1.017cm">
            <text:list text:style-name="L222" text:continue-numbering="true">
              <text:list-item>
                <text:p text:style-name="P316"><text:span text:style-name="T124">No root sur API</text:span></text:p>
              </text:list-item>
            </text:list>
          </draw:text-box>
        </draw:frame>
        <draw:frame xml:id="id255" draw:id="id255" draw:style-name="gr167" svg:width="2.136cm" svg:height="2.851cm" svg:x="0.2158cm" svg:y="13.51cm">
          <draw:image xlink:href="Pictures/image3.png" xlink:type="simple" xlink:show="embed" xlink:actuate="onLoad"/>
        </draw:frame>
        <draw:frame xml:id="id256" draw:id="id256" draw:style-name="gr168" svg:width="16.09cm" svg:height="10.88cm" svg:x="4.726cm" svg:y="3.146cm">
          <draw:image xlink:href="Pictures/image41.png" xlink:type="simple" xlink:show="embed" xlink:actuate="onLoad"/>
        </draw:frame>
        <draw:custom-shape xml:id="id257" draw:id="id257" draw:style-name="gr169" draw:transform="rotate(-6.2831853071795862) translate(3.898cm,4.435cm)" svg:width="18.02cm" svg:height="1.007cm">
          <text:p text:style-name="P317"><text:span/></text:p>
          <draw:enhanced-geometry draw:type="flowchart-terminator"/>
        </draw:custom-shape>
        <draw:frame xml:id="id258" draw:id="id258" draw:style-name="gr170" svg:width="8.338cm" svg:height="5.558cm" svg:x="19.54cm" svg:y="4.696cm">
          <draw:image xlink:href="Pictures/image40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fade-in" presentation:preset-sub-type="0">
                  <anim:set smil:dur="0.001s" smil:begin="0s" smil:targetElement="id257" smil:attributeName="visibility" smil:fill="hold" smil:to="visible"/>
                  <anim:transitionFilter smil:dur="0.5s" smil:targetElement="id257" smil:subtype="crossfade" smil:type="fade" smil:mode="in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appear" presentation:preset-sub-type="0">
                  <anim:set smil:dur="0.001s" smil:begin="0s" smil:targetElement="id258" smil:attributeName="visibility" smil:fill="hold" smil:to="visible"/>
                </anim:par>
              </anim:par>
            </anim:par>
          </anim:seq>
        </anim:par>
        <presentation:notes draw:style-name="dp66">
          <draw:frame xml:id="id259" draw:id="id259" draw:name="Slide Image Placeholder 1" draw:text-style-name="P318" draw:layer="layout" presentation:style-name="pr90" presentation:class="title" presentation:placeholder="true" svg:width="0.035cm" svg:height="0.937cm" svg:x="0cm" svg:y="0cm">
            <draw:text-box fo:min-height="0.937cm">
              <text:p text:style-name="P319"><text:span/></text:p>
            </draw:text-box>
          </draw:frame>
          <draw:frame xml:id="id260" draw:id="id260" draw:name="Notes Placeholder 2" draw:text-style-name="P320" draw:layer="layout" presentation:style-name="pr91" presentation:class="outline" presentation:placeholder="true" svg:width="0.035cm" svg:height="0.937cm" svg:x="0cm" svg:y="0cm">
            <draw:text-box fo:min-height="0.937cm">
              <text:p text:style-name="P321"><text:span/></text:p>
            </draw:text-box>
          </draw:frame>
          <draw:frame xml:id="id261" draw:id="id261" draw:name="Slide Number Placeholder 3" draw:text-style-name="P322" draw:layer="layout" presentation:style-name="pr92" presentation:class="page-number" presentation:placeholder="true" svg:width="0.035cm" svg:height="0.543cm" svg:x="0cm" svg:y="0cm">
            <draw:text-box fo:min-height="0.543cm">
              <text:p text:style-name="P323"><text:span text:style-name="T125"><text:page-number/></text:span></text:p>
            </draw:text-box>
          </draw:frame>
        </presentation:notes>
      </draw:page>
      <draw:page draw:name="Slide_2" draw:style-name="dp67" draw:master-page-name="_______5f__5f__5f_Standard2" presentation:presentation-page-layout-name="AL2">
        <draw:frame xml:id="id262" draw:id="id262" draw:style-name="gr171" svg:width="13.64cm" svg:height="1.017cm" svg:x="1.01cm" svg:y="0.515cm">
          <draw:text-box fo:min-height="1.017cm">
            <text:p text:style-name="P324"><text:span text:style-name="T126">CONTENEURISATION</text:span></text:p>
          </draw:text-box>
        </draw:frame>
        <draw:frame xml:id="id263" draw:id="id263" draw:style-name="gr172" svg:width="13.86cm" svg:height="1.017cm" svg:x="2.479cm" svg:y="1.827cm">
          <draw:text-box fo:min-height="1.017cm">
            <text:list text:style-name="L229" text:continue-numbering="true">
              <text:list-item>
                <text:p text:style-name="P325"><text:span text:style-name="T127">No root sur le training</text:span></text:p>
              </text:list-item>
            </text:list>
          </draw:text-box>
        </draw:frame>
        <draw:frame xml:id="id264" draw:id="id264" draw:style-name="gr173" svg:width="2.136cm" svg:height="2.851cm" svg:x="0.2158cm" svg:y="13.51cm">
          <draw:image xlink:href="Pictures/image3.png" xlink:type="simple" xlink:show="embed" xlink:actuate="onLoad"/>
        </draw:frame>
        <draw:frame xml:id="id265" draw:id="id265" draw:style-name="gr174" svg:width="17.52cm" svg:height="7.673cm" svg:x="5.242cm" svg:y="4.038cm">
          <draw:image xlink:href="Pictures/image42.png" xlink:type="simple" xlink:show="embed" xlink:actuate="onLoad"/>
        </draw:frame>
        <draw:custom-shape xml:id="id266" draw:id="id266" draw:style-name="gr175" draw:transform="rotate(-6.2831853071795862) translate(4.998cm,4.919cm)" svg:width="17.22cm" svg:height="1.044cm">
          <text:p text:style-name="P326"><text:span/></text:p>
          <draw:enhanced-geometry draw:type="flowchart-terminator"/>
        </draw:custom-shape>
        <draw:frame xml:id="id267" draw:id="id267" draw:style-name="gr176" svg:width="8.338cm" svg:height="5.558cm" svg:x="19.54cm" svg:y="4.696cm">
          <draw:image xlink:href="Pictures/image40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fade-in" presentation:preset-sub-type="0">
                  <anim:set smil:dur="0.001s" smil:begin="0s" smil:targetElement="id266" smil:attributeName="visibility" smil:fill="hold" smil:to="visible"/>
                  <anim:transitionFilter smil:dur="0.5s" smil:targetElement="id266" smil:subtype="crossfade" smil:type="fade" smil:mode="in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appear" presentation:preset-sub-type="0">
                  <anim:set smil:dur="0.001s" smil:begin="0s" smil:targetElement="id267" smil:attributeName="visibility" smil:fill="hold" smil:to="visible"/>
                </anim:par>
              </anim:par>
            </anim:par>
          </anim:seq>
        </anim:par>
        <presentation:notes draw:style-name="dp68">
          <draw:frame xml:id="id268" draw:id="id268" draw:name="Slide Image Placeholder 1" draw:text-style-name="P327" draw:layer="layout" presentation:style-name="pr93" presentation:class="title" presentation:placeholder="true" svg:width="0.035cm" svg:height="0.937cm" svg:x="0cm" svg:y="0cm">
            <draw:text-box fo:min-height="0.937cm">
              <text:p text:style-name="P328"><text:span/></text:p>
            </draw:text-box>
          </draw:frame>
          <draw:frame xml:id="id269" draw:id="id269" draw:name="Notes Placeholder 2" draw:text-style-name="P329" draw:layer="layout" presentation:style-name="pr94" presentation:class="outline" presentation:placeholder="true" svg:width="0.035cm" svg:height="0.937cm" svg:x="0cm" svg:y="0cm">
            <draw:text-box fo:min-height="0.937cm">
              <text:p text:style-name="P330"><text:span/></text:p>
            </draw:text-box>
          </draw:frame>
          <draw:frame xml:id="id270" draw:id="id270" draw:name="Slide Number Placeholder 3" draw:text-style-name="P331" draw:layer="layout" presentation:style-name="pr95" presentation:class="page-number" presentation:placeholder="true" svg:width="0.035cm" svg:height="0.543cm" svg:x="0cm" svg:y="0cm">
            <draw:text-box fo:min-height="0.543cm">
              <text:p text:style-name="P332"><text:span text:style-name="T128"><text:page-number/></text:span></text:p>
            </draw:text-box>
          </draw:frame>
        </presentation:notes>
      </draw:page>
      <draw:page draw:name="Slide_2" draw:style-name="dp69" draw:master-page-name="_______5f__5f__5f_Standard2" presentation:presentation-page-layout-name="AL2">
        <draw:custom-shape xml:id="id271" draw:id="id271" draw:style-name="gr177" draw:transform="rotate(-37.037456069205426) translate(13.08cm,4.987cm)" svg:width="14.09cm" svg:height="4.776cm">
          <text:p text:style-name="P333"><text:span/></text:p>
          <draw:enhanced-geometry draw:type="flowchart-terminator"/>
        </draw:custom-shape>
        <draw:custom-shape xml:id="id272" draw:id="id272" draw:style-name="gr178" draw:transform="rotate(-37.037456069205426) translate(20.53cm,5.726cm)" svg:width="12.69cm" svg:height="3.142cm">
          <text:p text:style-name="P334"><text:span/></text:p>
          <draw:enhanced-geometry draw:type="flowchart-terminator"/>
        </draw:custom-shape>
        <draw:custom-shape xml:id="id273" draw:id="id273" draw:style-name="gr179" draw:transform="rotate(-40.153218431642124) translate(21.87cm,7.894cm)" svg:width="3.766cm" svg:height="2.491cm">
          <text:p text:style-name="P335"><text:span/></text:p>
          <draw:enhanced-geometry draw:type="flowchart-terminator"/>
        </draw:custom-shape>
        <draw:custom-shape xml:id="id274" draw:id="id274" draw:style-name="gr180" draw:transform="rotate(-37.037456069205426) translate(22.83cm,8.296cm)" svg:width="12.69cm" svg:height="3.126cm">
          <text:p text:style-name="P336"><text:span/></text:p>
          <draw:enhanced-geometry draw:type="flowchart-terminator"/>
        </draw:custom-shape>
        <draw:custom-shape xml:id="id275" draw:id="id275" draw:style-name="gr181" draw:transform="rotate(-37.037456069205426) translate(8.952cm,4.386cm)" svg:width="12.69cm" svg:height="2.287cm">
          <text:p text:style-name="P337"><text:span/></text:p>
          <draw:enhanced-geometry draw:type="flowchart-terminator"/>
        </draw:custom-shape>
        <draw:custom-shape xml:id="id276" draw:id="id276" draw:style-name="gr182" draw:transform="rotate(-37.201343067744105) translate(20.53cm,10.43cm)" svg:width="3.088cm" svg:height="2.003cm">
          <text:p text:style-name="P338"><text:span/></text:p>
          <draw:enhanced-geometry draw:type="flowchart-connector"/>
        </draw:custom-shape>
        <draw:frame xml:id="id277" draw:id="id277" draw:style-name="gr183" svg:width="9.069cm" svg:height="2.626cm" svg:x="1.495cm" svg:y="6.298cm">
          <draw:text-box fo:min-height="2.626cm">
            <text:p text:style-name="P339"><text:span text:style-name="T129">OBSERVABILITÉ &amp; MONITORING</text:span></text:p>
          </draw:text-box>
        </draw:frame>
        <draw:frame xml:id="id278" draw:id="id278" draw:style-name="gr184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277" smil:attributeName="visibility" smil:fill="hold" smil:to="visible"/>
                  <anim:animate smil:dur="1s" smil:targetElement="id277" smil:attributeName="width" smil:values="0;width" smil:keyTimes="0;1"/>
                  <anim:animate smil:dur="1s" smil:targetElement="id277" smil:attributeName="height" smil:values="0;height" smil:keyTimes="0;1"/>
                  <anim:animate smil:dur="1s" smil:targetElement="id277" smil:attributeName="rotate" smil:values="90;0" smil:keyTimes="0;1"/>
                  <anim:transitionFilter smil:dur="1s" smil:targetElement="id277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276" smil:attributeName="visibility" smil:fill="hold" smil:to="visible"/>
                  <anim:animate smil:dur="1s" smil:targetElement="id276" smil:attributeName="width" smil:values="0;width" smil:keyTimes="0;1"/>
                  <anim:animate smil:dur="1s" smil:targetElement="id276" smil:attributeName="height" smil:values="0;height" smil:keyTimes="0;1"/>
                  <anim:animate smil:dur="1s" smil:targetElement="id276" smil:attributeName="rotate" smil:values="90;0" smil:keyTimes="0;1"/>
                  <anim:transitionFilter smil:dur="1s" smil:targetElement="id276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275" smil:attributeName="visibility" smil:fill="hold" smil:to="visible"/>
                  <anim:animate smil:dur="1s" smil:targetElement="id275" smil:attributeName="width" smil:values="0;width" smil:keyTimes="0;1"/>
                  <anim:animate smil:dur="1s" smil:targetElement="id275" smil:attributeName="height" smil:values="0;height" smil:keyTimes="0;1"/>
                  <anim:animate smil:dur="1s" smil:targetElement="id275" smil:attributeName="rotate" smil:values="90;0" smil:keyTimes="0;1"/>
                  <anim:transitionFilter smil:dur="1s" smil:targetElement="id275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274" smil:attributeName="visibility" smil:fill="hold" smil:to="visible"/>
                  <anim:animate smil:dur="1s" smil:targetElement="id274" smil:attributeName="width" smil:values="0;width" smil:keyTimes="0;1"/>
                  <anim:animate smil:dur="1s" smil:targetElement="id274" smil:attributeName="height" smil:values="0;height" smil:keyTimes="0;1"/>
                  <anim:animate smil:dur="1s" smil:targetElement="id274" smil:attributeName="rotate" smil:values="90;0" smil:keyTimes="0;1"/>
                  <anim:transitionFilter smil:dur="1s" smil:targetElement="id274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273" smil:attributeName="visibility" smil:fill="hold" smil:to="visible"/>
                  <anim:animate smil:dur="1s" smil:targetElement="id273" smil:attributeName="width" smil:values="0;width" smil:keyTimes="0;1"/>
                  <anim:animate smil:dur="1s" smil:targetElement="id273" smil:attributeName="height" smil:values="0;height" smil:keyTimes="0;1"/>
                  <anim:animate smil:dur="1s" smil:targetElement="id273" smil:attributeName="rotate" smil:values="90;0" smil:keyTimes="0;1"/>
                  <anim:transitionFilter smil:dur="1s" smil:targetElement="id273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272" smil:attributeName="visibility" smil:fill="hold" smil:to="visible"/>
                  <anim:animate smil:dur="1s" smil:targetElement="id272" smil:attributeName="width" smil:values="0;width" smil:keyTimes="0;1"/>
                  <anim:animate smil:dur="1s" smil:targetElement="id272" smil:attributeName="height" smil:values="0;height" smil:keyTimes="0;1"/>
                  <anim:animate smil:dur="1s" smil:targetElement="id272" smil:attributeName="rotate" smil:values="90;0" smil:keyTimes="0;1"/>
                  <anim:transitionFilter smil:dur="1s" smil:targetElement="id272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271" smil:attributeName="visibility" smil:fill="hold" smil:to="visible"/>
                  <anim:animate smil:dur="1s" smil:targetElement="id271" smil:attributeName="width" smil:values="0;width" smil:keyTimes="0;1"/>
                  <anim:animate smil:dur="1s" smil:targetElement="id271" smil:attributeName="height" smil:values="0;height" smil:keyTimes="0;1"/>
                  <anim:animate smil:dur="1s" smil:targetElement="id271" smil:attributeName="rotate" smil:values="90;0" smil:keyTimes="0;1"/>
                  <anim:transitionFilter smil:dur="1s" smil:targetElement="id271" smil:subtype="crossfade" smil:type="fade" smil:mode="in"/>
                </anim:par>
              </anim:par>
            </anim:par>
          </anim:seq>
        </anim:par>
        <presentation:notes draw:style-name="dp70">
          <draw:frame xml:id="id279" draw:id="id279" draw:name="Slide Image Placeholder 1" draw:text-style-name="P340" draw:layer="layout" presentation:style-name="pr96" presentation:class="title" presentation:placeholder="true" svg:width="0.035cm" svg:height="0.937cm" svg:x="0cm" svg:y="0cm">
            <draw:text-box fo:min-height="0.937cm">
              <text:p text:style-name="P341"><text:span/></text:p>
            </draw:text-box>
          </draw:frame>
          <draw:frame xml:id="id280" draw:id="id280" draw:name="Notes Placeholder 2" draw:text-style-name="P342" draw:layer="layout" presentation:style-name="pr97" presentation:class="outline" presentation:placeholder="true" svg:width="0.035cm" svg:height="0.937cm" svg:x="0cm" svg:y="0cm">
            <draw:text-box fo:min-height="0.937cm">
              <text:p text:style-name="P343"><text:span/></text:p>
            </draw:text-box>
          </draw:frame>
          <draw:frame xml:id="id281" draw:id="id281" draw:name="Slide Number Placeholder 3" draw:text-style-name="P344" draw:layer="layout" presentation:style-name="pr98" presentation:class="page-number" presentation:placeholder="true" svg:width="0.035cm" svg:height="0.543cm" svg:x="0cm" svg:y="0cm">
            <draw:text-box fo:min-height="0.543cm">
              <text:p text:style-name="P345"><text:span text:style-name="T130"><text:page-number>&lt;numéro&gt;</text:page-number></text:span></text:p>
            </draw:text-box>
          </draw:frame>
        </presentation:notes>
      </draw:page>
      <draw:page draw:name="Slide_2" draw:style-name="dp71" draw:master-page-name="_______5f__5f__5f_Standard2" presentation:presentation-page-layout-name="AL2">
        <draw:frame xml:id="id282" draw:id="id282" draw:style-name="gr185" svg:width="13.67cm" svg:height="1.017cm" svg:x="1.01cm" svg:y="0.528cm">
          <draw:text-box fo:min-height="1.017cm">
            <text:p text:style-name="P346"><text:span text:style-name="T131">OBSERVABILITÉ &amp; MONITORING</text:span></text:p>
          </draw:text-box>
        </draw:frame>
        <draw:frame xml:id="id283" draw:id="id283" draw:style-name="gr186" svg:width="13.9cm" svg:height="1.017cm" svg:x="2.479cm" svg:y="1.874cm">
          <draw:text-box fo:min-height="1.017cm">
            <text:list text:style-name="L246" text:continue-numbering="true">
              <text:list-item>
                <text:p text:style-name="P347"><text:span text:style-name="T132">OBSERVABILITÉ</text:span></text:p>
              </text:list-item>
            </text:list>
          </draw:text-box>
        </draw:frame>
        <draw:frame xml:id="id284" draw:id="id284" draw:style-name="gr187" svg:width="10.31cm" svg:height="4.017cm" svg:x="4.7cm" svg:y="4.099cm">
          <draw:text-box fo:min-height="4.017cm">
            <text:list text:style-name="L248" text:continue-numbering="true">
              <text:list-item>
                <text:p text:style-name="P348"><text:span text:style-name="T133">Métrique Prometheus :</text:span></text:p>
              </text:list-item>
            </text:list>
            <text:p text:style-name="P349"><text:span text:style-name="T133"/></text:p>
            <text:p text:style-name="P350"><text:span/></text:p>
            <text:p text:style-name="P351"><text:span/></text:p>
            <text:p text:style-name="P352"><text:span text:style-name="T134">Predictions totals</text:span></text:p>
            <text:p text:style-name="P353"><text:span text:style-name="T135">latence des prédictions par seconde</text:span></text:p>
            <text:p text:style-name="P354"><text:span text:style-name="T136">Scraping toutes les 15 secondes</text:span></text:p>
          </draw:text-box>
        </draw:frame>
        <draw:frame xml:id="id285" draw:id="id285" draw:style-name="gr188" svg:width="8.337cm" svg:height="8.337cm" svg:x="17.25cm" svg:y="3.073cm">
          <draw:image xlink:href="Pictures/image44.png" xlink:type="simple" xlink:show="embed" xlink:actuate="onLoad"/>
        </draw:frame>
        <draw:frame xml:id="id286" draw:id="id286" draw:style-name="gr189" svg:width="2.136cm" svg:height="2.851cm" svg:x="0.2158cm" svg:y="13.51cm">
          <draw:image xlink:href="Pictures/image3.png" xlink:type="simple" xlink:show="embed" xlink:actuate="onLoad"/>
        </draw:frame>
        <presentation:notes draw:style-name="dp72">
          <draw:frame xml:id="id287" draw:id="id287" draw:name="Slide Image Placeholder 1" draw:text-style-name="P355" draw:layer="layout" presentation:style-name="pr99" presentation:class="title" presentation:placeholder="true" svg:width="0.035cm" svg:height="0.937cm" svg:x="0cm" svg:y="0cm">
            <draw:text-box fo:min-height="0.937cm">
              <text:p text:style-name="P356"><text:span/></text:p>
            </draw:text-box>
          </draw:frame>
          <draw:frame xml:id="id288" draw:id="id288" draw:name="Notes Placeholder 2" draw:text-style-name="P357" draw:layer="layout" presentation:style-name="pr100" presentation:class="outline" presentation:placeholder="true" svg:width="0.035cm" svg:height="0.937cm" svg:x="0cm" svg:y="0cm">
            <draw:text-box fo:min-height="0.937cm">
              <text:p text:style-name="P358"><text:span/></text:p>
            </draw:text-box>
          </draw:frame>
          <draw:frame xml:id="id289" draw:id="id289" draw:name="Slide Number Placeholder 3" draw:text-style-name="P359" draw:layer="layout" presentation:style-name="pr101" presentation:class="page-number" presentation:placeholder="true" svg:width="0.035cm" svg:height="0.543cm" svg:x="0cm" svg:y="0cm">
            <draw:text-box fo:min-height="0.543cm">
              <text:p text:style-name="P360"><text:span text:style-name="T137"><text:page-number>&lt;numéro&gt;</text:page-number></text:span></text:p>
            </draw:text-box>
          </draw:frame>
        </presentation:notes>
      </draw:page>
      <draw:page draw:name="Slide_2" draw:style-name="dp73" draw:master-page-name="_______5f__5f__5f_Standard2" presentation:presentation-page-layout-name="AL2">
        <draw:frame xml:id="id290" draw:id="id290" draw:style-name="gr190" svg:width="13.67cm" svg:height="1.017cm" svg:x="1.01cm" svg:y="0.528cm">
          <draw:text-box fo:min-height="1.017cm">
            <text:p text:style-name="P361"><text:span text:style-name="T138">OBSERVABILITÉ &amp; MONITORING</text:span></text:p>
          </draw:text-box>
        </draw:frame>
        <draw:frame xml:id="id291" draw:id="id291" draw:style-name="gr191" svg:width="13.84cm" svg:height="1.017cm" svg:x="2.479cm" svg:y="1.842cm">
          <draw:text-box fo:min-height="1.017cm">
            <text:list text:style-name="L254" text:continue-numbering="true">
              <text:list-item>
                <text:p text:style-name="P362"><text:span text:style-name="T139">MONITORING </text:span></text:p>
              </text:list-item>
            </text:list>
          </draw:text-box>
        </draw:frame>
        <draw:frame xml:id="id292" draw:id="id292" draw:style-name="gr192" svg:width="10.48cm" svg:height="2.287cm" svg:x="4.7cm" svg:y="4.099cm">
          <draw:text-box fo:min-height="2.287cm">
            <text:list text:style-name="L256" text:continue-numbering="true">
              <text:list-item>
                <text:p text:style-name="P363"><text:span text:style-name="T140">Visualisation du Dashboard en temps réel</text:span></text:p>
              </text:list-item>
            </text:list>
            <text:p text:style-name="P364"><text:span text:style-name="T140"/></text:p>
            <text:list text:style-name="L257" text:continue-numbering="true">
              <text:list-item>
                <text:p text:style-name="P365"><text:span text:style-name="T141">Connecté à Prometheus</text:span></text:p>
              </text:list-item>
            </text:list>
          </draw:text-box>
        </draw:frame>
        <draw:frame xml:id="id293" draw:id="id293" draw:style-name="gr193" svg:width="8.337cm" svg:height="8.337cm" svg:x="17.25cm" svg:y="3.073cm">
          <draw:image xlink:href="Pictures/image44.png" xlink:type="simple" xlink:show="embed" xlink:actuate="onLoad"/>
        </draw:frame>
        <draw:frame xml:id="id294" draw:id="id294" draw:style-name="gr194" svg:width="2.136cm" svg:height="2.851cm" svg:x="0.2158cm" svg:y="13.51cm">
          <draw:image xlink:href="Pictures/image3.png" xlink:type="simple" xlink:show="embed" xlink:actuate="onLoad"/>
        </draw:frame>
        <presentation:notes draw:style-name="dp74">
          <draw:frame xml:id="id295" draw:id="id295" draw:name="Slide Image Placeholder 1" draw:text-style-name="P366" draw:layer="layout" presentation:style-name="pr102" presentation:class="title" presentation:placeholder="true" svg:width="0.035cm" svg:height="0.937cm" svg:x="0cm" svg:y="0cm">
            <draw:text-box fo:min-height="0.937cm">
              <text:p text:style-name="P367"><text:span/></text:p>
            </draw:text-box>
          </draw:frame>
          <draw:frame xml:id="id296" draw:id="id296" draw:name="Notes Placeholder 2" draw:text-style-name="P368" draw:layer="layout" presentation:style-name="pr103" presentation:class="outline" presentation:placeholder="true" svg:width="0.035cm" svg:height="0.937cm" svg:x="0cm" svg:y="0cm">
            <draw:text-box fo:min-height="0.937cm">
              <text:p text:style-name="P369"><text:span/></text:p>
            </draw:text-box>
          </draw:frame>
          <draw:frame xml:id="id297" draw:id="id297" draw:name="Slide Number Placeholder 3" draw:text-style-name="P370" draw:layer="layout" presentation:style-name="pr104" presentation:class="page-number" presentation:placeholder="true" svg:width="0.035cm" svg:height="0.543cm" svg:x="0cm" svg:y="0cm">
            <draw:text-box fo:min-height="0.543cm">
              <text:p text:style-name="P371"><text:span text:style-name="T142"><text:page-number>&lt;numéro&gt;</text:page-number></text:span></text:p>
            </draw:text-box>
          </draw:frame>
        </presentation:notes>
      </draw:page>
      <draw:page draw:name="Slide_2" draw:style-name="dp75" draw:master-page-name="_______5f__5f__5f_Standard2" presentation:presentation-page-layout-name="AL2">
        <draw:custom-shape xml:id="id298" draw:id="id298" draw:style-name="gr195" draw:transform="rotate(-37.037456069205426) translate(13.08cm,4.987cm)" svg:width="14.09cm" svg:height="4.776cm">
          <text:p text:style-name="P372"><text:span/></text:p>
          <draw:enhanced-geometry draw:type="flowchart-terminator"/>
        </draw:custom-shape>
        <draw:custom-shape xml:id="id299" draw:id="id299" draw:style-name="gr196" draw:transform="rotate(-37.037456069205426) translate(20.53cm,5.726cm)" svg:width="12.69cm" svg:height="3.142cm">
          <text:p text:style-name="P373"><text:span/></text:p>
          <draw:enhanced-geometry draw:type="flowchart-terminator"/>
        </draw:custom-shape>
        <draw:custom-shape xml:id="id300" draw:id="id300" draw:style-name="gr197" draw:transform="rotate(-40.153218431642124) translate(21.87cm,7.894cm)" svg:width="3.766cm" svg:height="2.491cm">
          <text:p text:style-name="P374"><text:span/></text:p>
          <draw:enhanced-geometry draw:type="flowchart-terminator"/>
        </draw:custom-shape>
        <draw:custom-shape xml:id="id301" draw:id="id301" draw:style-name="gr198" draw:transform="rotate(-37.037456069205426) translate(22.83cm,8.296cm)" svg:width="12.69cm" svg:height="3.126cm">
          <text:p text:style-name="P375"><text:span/></text:p>
          <draw:enhanced-geometry draw:type="flowchart-terminator"/>
        </draw:custom-shape>
        <draw:custom-shape xml:id="id302" draw:id="id302" draw:style-name="gr199" draw:transform="rotate(-37.037456069205426) translate(8.952cm,4.386cm)" svg:width="12.69cm" svg:height="2.287cm">
          <text:p text:style-name="P376"><text:span/></text:p>
          <draw:enhanced-geometry draw:type="flowchart-terminator"/>
        </draw:custom-shape>
        <draw:custom-shape xml:id="id303" draw:id="id303" draw:style-name="gr200" draw:transform="rotate(-37.201343067744105) translate(20.53cm,10.43cm)" svg:width="3.088cm" svg:height="2.003cm">
          <text:p text:style-name="P377"><text:span/></text:p>
          <draw:enhanced-geometry draw:type="flowchart-connector"/>
        </draw:custom-shape>
        <draw:frame xml:id="id304" draw:id="id304" draw:style-name="gr201" svg:width="12.31cm" svg:height="3.811cm" svg:x="1.495cm" svg:y="6.298cm">
          <draw:text-box fo:min-height="3.811cm">
            <text:p text:style-name="P378"><text:span text:style-name="T143">SECURITÉ RÉSEAU </text:span></text:p>
            <text:p text:style-name="P379"><text:span text:style-name="T144">&amp; </text:span></text:p>
            <text:p text:style-name="P380"><text:span text:style-name="T145">HAUTE DISPONIBILITÉ</text:span></text:p>
          </draw:text-box>
        </draw:frame>
        <draw:frame xml:id="id305" draw:id="id305" draw:style-name="gr202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304" smil:attributeName="visibility" smil:fill="hold" smil:to="visible"/>
                  <anim:animate smil:dur="0.8s" smil:targetElement="id304" smil:attributeName="width" smil:values="0;width" smil:keyTimes="0;1"/>
                  <anim:animate smil:dur="0.8s" smil:targetElement="id304" smil:attributeName="height" smil:values="0;height" smil:keyTimes="0;1"/>
                  <anim:animate smil:dur="0.8s" smil:targetElement="id304" smil:attributeName="rotate" smil:values="90;0" smil:keyTimes="0;1"/>
                  <anim:transitionFilter smil:dur="0.8s" smil:targetElement="id304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303" smil:attributeName="visibility" smil:fill="hold" smil:to="visible"/>
                  <anim:animate smil:dur="0.8s" smil:targetElement="id303" smil:attributeName="width" smil:values="0;width" smil:keyTimes="0;1"/>
                  <anim:animate smil:dur="0.8s" smil:targetElement="id303" smil:attributeName="height" smil:values="0;height" smil:keyTimes="0;1"/>
                  <anim:animate smil:dur="0.8s" smil:targetElement="id303" smil:attributeName="rotate" smil:values="90;0" smil:keyTimes="0;1"/>
                  <anim:transitionFilter smil:dur="0.8s" smil:targetElement="id303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302" smil:attributeName="visibility" smil:fill="hold" smil:to="visible"/>
                  <anim:animate smil:dur="0.8s" smil:targetElement="id302" smil:attributeName="width" smil:values="0;width" smil:keyTimes="0;1"/>
                  <anim:animate smil:dur="0.8s" smil:targetElement="id302" smil:attributeName="height" smil:values="0;height" smil:keyTimes="0;1"/>
                  <anim:animate smil:dur="0.8s" smil:targetElement="id302" smil:attributeName="rotate" smil:values="90;0" smil:keyTimes="0;1"/>
                  <anim:transitionFilter smil:dur="0.8s" smil:targetElement="id302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301" smil:attributeName="visibility" smil:fill="hold" smil:to="visible"/>
                  <anim:animate smil:dur="0.8s" smil:targetElement="id301" smil:attributeName="width" smil:values="0;width" smil:keyTimes="0;1"/>
                  <anim:animate smil:dur="0.8s" smil:targetElement="id301" smil:attributeName="height" smil:values="0;height" smil:keyTimes="0;1"/>
                  <anim:animate smil:dur="0.8s" smil:targetElement="id301" smil:attributeName="rotate" smil:values="90;0" smil:keyTimes="0;1"/>
                  <anim:transitionFilter smil:dur="0.8s" smil:targetElement="id301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300" smil:attributeName="visibility" smil:fill="hold" smil:to="visible"/>
                  <anim:animate smil:dur="0.8s" smil:targetElement="id300" smil:attributeName="width" smil:values="0;width" smil:keyTimes="0;1"/>
                  <anim:animate smil:dur="0.8s" smil:targetElement="id300" smil:attributeName="height" smil:values="0;height" smil:keyTimes="0;1"/>
                  <anim:animate smil:dur="0.8s" smil:targetElement="id300" smil:attributeName="rotate" smil:values="90;0" smil:keyTimes="0;1"/>
                  <anim:transitionFilter smil:dur="0.8s" smil:targetElement="id300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299" smil:attributeName="visibility" smil:fill="hold" smil:to="visible"/>
                  <anim:animate smil:dur="0.8s" smil:targetElement="id299" smil:attributeName="width" smil:values="0;width" smil:keyTimes="0;1"/>
                  <anim:animate smil:dur="0.8s" smil:targetElement="id299" smil:attributeName="height" smil:values="0;height" smil:keyTimes="0;1"/>
                  <anim:animate smil:dur="0.8s" smil:targetElement="id299" smil:attributeName="rotate" smil:values="90;0" smil:keyTimes="0;1"/>
                  <anim:transitionFilter smil:dur="0.8s" smil:targetElement="id299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298" smil:attributeName="visibility" smil:fill="hold" smil:to="visible"/>
                  <anim:animate smil:dur="0.8s" smil:targetElement="id298" smil:attributeName="width" smil:values="0;width" smil:keyTimes="0;1"/>
                  <anim:animate smil:dur="0.8s" smil:targetElement="id298" smil:attributeName="height" smil:values="0;height" smil:keyTimes="0;1"/>
                  <anim:animate smil:dur="0.8s" smil:targetElement="id298" smil:attributeName="rotate" smil:values="90;0" smil:keyTimes="0;1"/>
                  <anim:transitionFilter smil:dur="0.8s" smil:targetElement="id298" smil:subtype="crossfade" smil:type="fade" smil:mode="in"/>
                </anim:par>
              </anim:par>
            </anim:par>
          </anim:seq>
        </anim:par>
        <presentation:notes draw:style-name="dp76">
          <draw:frame xml:id="id306" draw:id="id306" draw:name="Slide Image Placeholder 1" draw:text-style-name="P381" draw:layer="layout" presentation:style-name="pr105" presentation:class="title" presentation:placeholder="true" svg:width="0.035cm" svg:height="0.937cm" svg:x="0cm" svg:y="0cm">
            <draw:text-box fo:min-height="0.937cm">
              <text:p text:style-name="P382"><text:span/></text:p>
            </draw:text-box>
          </draw:frame>
          <draw:frame xml:id="id307" draw:id="id307" draw:name="Notes Placeholder 2" draw:text-style-name="P383" draw:layer="layout" presentation:style-name="pr106" presentation:class="outline" presentation:placeholder="true" svg:width="0.035cm" svg:height="0.937cm" svg:x="0cm" svg:y="0cm">
            <draw:text-box fo:min-height="0.937cm">
              <text:p text:style-name="P384"><text:span/></text:p>
            </draw:text-box>
          </draw:frame>
          <draw:frame xml:id="id308" draw:id="id308" draw:name="Slide Number Placeholder 3" draw:text-style-name="P385" draw:layer="layout" presentation:style-name="pr107" presentation:class="page-number" presentation:placeholder="true" svg:width="0.035cm" svg:height="0.543cm" svg:x="0cm" svg:y="0cm">
            <draw:text-box fo:min-height="0.543cm">
              <text:p text:style-name="P386"><text:span text:style-name="T146"><text:page-number>&lt;numéro&gt;</text:page-number></text:span></text:p>
            </draw:text-box>
          </draw:frame>
        </presentation:notes>
      </draw:page>
      <draw:page draw:name="Slide_2" draw:style-name="dp77" draw:master-page-name="_______5f__5f__5f_Standard2" presentation:presentation-page-layout-name="AL2">
        <draw:frame xml:id="id309" draw:id="id309" draw:style-name="gr203" svg:width="18.34cm" svg:height="1.017cm" svg:x="1.01cm" svg:y="0.538cm">
          <draw:text-box fo:min-height="1.017cm">
            <text:p text:style-name="P387"><text:span text:style-name="T147">SECURITE RÉSEAU &amp; HAUTE DISPONIBILITÉ</text:span></text:p>
          </draw:text-box>
        </draw:frame>
        <draw:frame xml:id="id310" draw:id="id310" draw:style-name="gr204" svg:width="16.89cm" svg:height="1.017cm" svg:x="2.479cm" svg:y="1.839cm">
          <draw:text-box fo:min-height="1.017cm">
            <text:list text:style-name="L273" text:continue-numbering="true">
              <text:list-item>
                <text:p text:style-name="P388"><text:span text:style-name="T148">SECURITÉ DU RÉSEAU</text:span></text:p>
              </text:list-item>
            </text:list>
          </draw:text-box>
        </draw:frame>
        <draw:frame xml:id="id311" draw:id="id311" draw:style-name="gr205" svg:width="17.72cm" svg:height="4.997cm" svg:x="5.229cm" svg:y="3.652cm">
          <draw:text-box fo:min-height="4.997cm">
            <text:list text:style-name="L275" text:continue-numbering="true">
              <text:list-item>
                <text:p text:style-name="P389"><text:span text:style-name="T149">SEGMENTATION DU RÉSEAU</text:span></text:p>
              </text:list-item>
            </text:list>
            <text:list text:style-name="L276" text:continue-numbering="true">
              <text:list-item>
                <text:p text:style-name="P390"><text:span text:style-name="T150">RESTRICTION D’ACCÈS</text:span></text:p>
              </text:list-item>
            </text:list>
            <text:list text:style-name="L277" text:continue-numbering="true">
              <text:list-item>
                <text:p text:style-name="P391"><text:span text:style-name="T151">HTTPS (Certificat SSL généré) + Association à un sous nom de Domaine</text:span></text:p>
              </text:list-item>
            </text:list>
            <text:p text:style-name="P392"><text:span text:style-name="T151"/></text:p>
            <text:list text:style-name="L278" text:continue-numbering="true">
              <text:list-item>
                <text:p text:style-name="P393"><text:span text:style-name="T152">GESTION DES SÉCURITÉ SUR GITHUB</text:span></text:p>
              </text:list-item>
            </text:list>
          </draw:text-box>
        </draw:frame>
        <draw:frame xml:id="id312" draw:id="id312" draw:style-name="gr206" svg:width="2.136cm" svg:height="2.851cm" svg:x="0.2158cm" svg:y="13.51cm">
          <draw:image xlink:href="Pictures/image3.png" xlink:type="simple" xlink:show="embed" xlink:actuate="onLoad"/>
        </draw:frame>
        <presentation:notes draw:style-name="dp78">
          <draw:frame xml:id="id313" draw:id="id313" draw:name="Slide Image Placeholder 1" draw:text-style-name="P394" draw:layer="layout" presentation:style-name="pr108" presentation:class="title" presentation:placeholder="true" svg:width="0.035cm" svg:height="0.937cm" svg:x="0cm" svg:y="0cm">
            <draw:text-box fo:min-height="0.937cm">
              <text:p text:style-name="P395"><text:span/></text:p>
            </draw:text-box>
          </draw:frame>
          <draw:frame xml:id="id314" draw:id="id314" draw:name="Notes Placeholder 2" draw:text-style-name="P396" draw:layer="layout" presentation:style-name="pr109" presentation:class="outline" presentation:placeholder="true" svg:width="0.035cm" svg:height="0.937cm" svg:x="0cm" svg:y="0cm">
            <draw:text-box fo:min-height="0.937cm">
              <text:p text:style-name="P397"><text:span/></text:p>
            </draw:text-box>
          </draw:frame>
          <draw:frame xml:id="id315" draw:id="id315" draw:name="Slide Number Placeholder 3" draw:text-style-name="P398" draw:layer="layout" presentation:style-name="pr110" presentation:class="page-number" presentation:placeholder="true" svg:width="0.035cm" svg:height="0.543cm" svg:x="0cm" svg:y="0cm">
            <draw:text-box fo:min-height="0.543cm">
              <text:p text:style-name="P399"><text:span text:style-name="T153"><text:page-number>&lt;numéro&gt;</text:page-number></text:span></text:p>
            </draw:text-box>
          </draw:frame>
        </presentation:notes>
      </draw:page>
      <draw:page draw:name="Slide_2" draw:style-name="dp79" draw:master-page-name="_______5f__5f__5f_Standard2" presentation:presentation-page-layout-name="AL2">
        <draw:frame xml:id="id316" draw:id="id316" draw:style-name="gr207" svg:width="18.34cm" svg:height="1.017cm" svg:x="1.01cm" svg:y="0.538cm">
          <draw:text-box fo:min-height="1.017cm">
            <text:p text:style-name="P400"><text:span text:style-name="T154">SECURITE RÉSEAU &amp; HAUTE DISPONIBILITÉ</text:span></text:p>
          </draw:text-box>
        </draw:frame>
        <draw:frame xml:id="id317" draw:id="id317" draw:style-name="gr208" svg:width="16.91cm" svg:height="1.017cm" svg:x="2.479cm" svg:y="1.848cm">
          <draw:text-box fo:min-height="1.017cm">
            <text:list text:style-name="L284" text:continue-numbering="true">
              <text:list-item>
                <text:p text:style-name="P401"><text:span text:style-name="T155">HAUTE DISPONIBILITÉ : JOB 2 : Déploiement sur EC2</text:span></text:p>
              </text:list-item>
            </text:list>
          </draw:text-box>
        </draw:frame>
        <draw:frame xml:id="id318" draw:id="id318" draw:style-name="gr209" svg:width="13.69cm" svg:height="1.017cm" svg:x="8.964cm" svg:y="5.131cm">
          <draw:text-box fo:min-height="1.017cm">
            <text:p text:style-name="P402"><text:span text:style-name="T156">--NO DEPS</text:span></text:p>
          </draw:text-box>
        </draw:frame>
        <draw:frame xml:id="id319" draw:id="id319" draw:style-name="gr210" svg:width="5.292cm" svg:height="5.292cm" svg:x="2.55cm" svg:y="3.912cm">
          <draw:image xlink:href="Pictures/image46.png" xlink:type="simple" xlink:show="embed" xlink:actuate="onLoad"/>
        </draw:frame>
        <draw:frame xml:id="id320" draw:id="id320" draw:style-name="gr211" svg:width="2.136cm" svg:height="2.851cm" svg:x="0.2158cm" svg:y="13.51cm">
          <draw:image xlink:href="Pictures/image3.png" xlink:type="simple" xlink:show="embed" xlink:actuate="onLoad"/>
        </draw:frame>
        <draw:frame xml:id="id321" draw:id="id321" draw:style-name="gr212" svg:width="6.615cm" svg:height="5.345cm" svg:x="16.38cm" svg:y="3.712cm">
          <draw:image xlink:href="Pictures/image47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fade-in" presentation:preset-sub-type="0">
                  <anim:set smil:dur="0.001s" smil:begin="0s" smil:targetElement="id319" smil:attributeName="visibility" smil:fill="hold" smil:to="visible"/>
                  <anim:transitionFilter smil:dur="0.5s" smil:targetElement="id319" smil:subtype="crossfade" smil:type="fade" smil:mode="in"/>
                </anim:par>
                <anim:par presentation:node-type="with-previous" smil:begin="0s" smil:fill="hold" presentation:preset-class="entrance" presentation:preset-id="ooo-entrance-fade-in" presentation:preset-sub-type="0">
                  <anim:set smil:dur="0.001s" smil:begin="0s" smil:targetElement="id318" smil:attributeName="visibility" smil:fill="hold" smil:to="visible"/>
                  <anim:transitionFilter smil:dur="0.5s" smil:targetElement="id318" smil:subtype="crossfade" smil:type="fade" smil:mode="in"/>
                </anim:par>
              </anim:par>
            </anim:par>
            <anim:par smil:begin="next" smil:fill="hold">
              <anim:par smil:begin="0s" smil:fill="hold">
                <anim:par presentation:node-type="on-click" smil:begin="0s" smil:fill="hold" presentation:preset-class="entrance" presentation:preset-id="ooo-entrance-appear" presentation:preset-sub-type="0">
                  <anim:set smil:dur="0.001s" smil:begin="0s" smil:targetElement="id321" smil:attributeName="visibility" smil:fill="hold" smil:to="visible"/>
                </anim:par>
              </anim:par>
            </anim:par>
          </anim:seq>
        </anim:par>
        <presentation:notes draw:style-name="dp80">
          <draw:frame xml:id="id322" draw:id="id322" draw:name="Slide Image Placeholder 1" draw:text-style-name="P403" draw:layer="layout" presentation:style-name="pr111" presentation:class="title" presentation:placeholder="true" svg:width="0.035cm" svg:height="0.937cm" svg:x="0cm" svg:y="0cm">
            <draw:text-box fo:min-height="0.937cm">
              <text:p text:style-name="P404"><text:span/></text:p>
            </draw:text-box>
          </draw:frame>
          <draw:frame xml:id="id323" draw:id="id323" draw:name="Notes Placeholder 2" draw:text-style-name="P405" draw:layer="layout" presentation:style-name="pr112" presentation:class="outline" presentation:placeholder="true" svg:width="0.035cm" svg:height="0.937cm" svg:x="0cm" svg:y="0cm">
            <draw:text-box fo:min-height="0.937cm">
              <text:p text:style-name="P406"><text:span/></text:p>
            </draw:text-box>
          </draw:frame>
          <draw:frame xml:id="id324" draw:id="id324" draw:name="Slide Number Placeholder 3" draw:text-style-name="P407" draw:layer="layout" presentation:style-name="pr113" presentation:class="page-number" presentation:placeholder="true" svg:width="0.035cm" svg:height="0.543cm" svg:x="0cm" svg:y="0cm">
            <draw:text-box fo:min-height="0.543cm">
              <text:p text:style-name="P408"><text:span text:style-name="T157"><text:page-number>&lt;numéro&gt;</text:page-number></text:span></text:p>
            </draw:text-box>
          </draw:frame>
        </presentation:notes>
      </draw:page>
      <draw:page draw:name="Slide_2" draw:style-name="dp81" draw:master-page-name="_______5f__5f__5f_Standard2" presentation:presentation-page-layout-name="AL2">
        <draw:frame xml:id="id325" draw:id="id325" draw:style-name="gr213" svg:width="18.34cm" svg:height="1.017cm" svg:x="1.01cm" svg:y="0.538cm">
          <draw:text-box fo:min-height="1.017cm">
            <text:p text:style-name="P409"><text:span text:style-name="T158">SECURITE RÉSEAU &amp; HAUTE DISPONIBILITÉ</text:span></text:p>
          </draw:text-box>
        </draw:frame>
        <draw:frame xml:id="id326" draw:id="id326" draw:style-name="gr214" svg:width="16.94cm" svg:height="1.017cm" svg:x="2.479cm" svg:y="1.863cm">
          <draw:text-box fo:min-height="1.017cm">
            <text:list text:style-name="L291" text:continue-numbering="true">
              <text:list-item>
                <text:p text:style-name="P410"><text:span text:style-name="T159">HAUTE DISPONIBILITÉ</text:span></text:p>
              </text:list-item>
            </text:list>
          </draw:text-box>
        </draw:frame>
        <draw:frame xml:id="id327" draw:id="id327" draw:style-name="gr215" svg:width="13.77cm" svg:height="3.642cm" svg:x="9.262cm" svg:y="4.526cm">
          <draw:text-box fo:min-height="3.642cm">
            <text:list text:style-name="L293" text:continue-numbering="true">
              <text:list-item>
                <text:p text:style-name="P411"><text:span text:style-name="T160">LOADBALANCER</text:span></text:p>
              </text:list-item>
            </text:list>
            <text:p text:style-name="P412"><text:span/></text:p>
            <text:list text:style-name="L294" text:continue-numbering="true">
              <text:list-item>
                <text:p text:style-name="P413"><text:span text:style-name="T161">HEALTH CHECK (30 s)</text:span></text:p>
              </text:list-item>
            </text:list>
            <text:p text:style-name="P414"><text:span/></text:p>
            <text:list text:style-name="L295" text:continue-numbering="true">
              <text:list-item>
                <text:p text:style-name="P415"><text:span text:style-name="T162">BACKUP AUTOMATISÉ</text:span></text:p>
              </text:list-item>
            </text:list>
          </draw:text-box>
        </draw:frame>
        <draw:frame xml:id="id328" draw:id="id328" draw:style-name="gr216" svg:width="5.954cm" svg:height="5.954cm" svg:x="2.899cm" svg:y="3.817cm">
          <draw:image xlink:href="Pictures/image48.png" xlink:type="simple" xlink:show="embed" xlink:actuate="onLoad"/>
        </draw:frame>
        <draw:frame xml:id="id329" draw:id="id329" draw:style-name="gr217" svg:width="2.136cm" svg:height="2.851cm" svg:x="0.2158cm" svg:y="13.51cm">
          <draw:image xlink:href="Pictures/image3.png" xlink:type="simple" xlink:show="embed" xlink:actuate="onLoad"/>
        </draw:frame>
        <presentation:notes draw:style-name="dp82">
          <draw:frame xml:id="id330" draw:id="id330" draw:name="Slide Image Placeholder 1" draw:text-style-name="P416" draw:layer="layout" presentation:style-name="pr114" presentation:class="title" presentation:placeholder="true" svg:width="0.035cm" svg:height="0.937cm" svg:x="0cm" svg:y="0cm">
            <draw:text-box fo:min-height="0.937cm">
              <text:p text:style-name="P417"><text:span/></text:p>
            </draw:text-box>
          </draw:frame>
          <draw:frame xml:id="id331" draw:id="id331" draw:name="Notes Placeholder 2" draw:text-style-name="P418" draw:layer="layout" presentation:style-name="pr115" presentation:class="outline" presentation:placeholder="true" svg:width="0.035cm" svg:height="0.937cm" svg:x="0cm" svg:y="0cm">
            <draw:text-box fo:min-height="0.937cm">
              <text:p text:style-name="P419"><text:span/></text:p>
            </draw:text-box>
          </draw:frame>
          <draw:frame xml:id="id332" draw:id="id332" draw:name="Slide Number Placeholder 3" draw:text-style-name="P420" draw:layer="layout" presentation:style-name="pr116" presentation:class="page-number" presentation:placeholder="true" svg:width="0.035cm" svg:height="0.543cm" svg:x="0cm" svg:y="0cm">
            <draw:text-box fo:min-height="0.543cm">
              <text:p text:style-name="P421"><text:span text:style-name="T163"><text:page-number>&lt;numéro&gt;</text:page-number></text:span></text:p>
            </draw:text-box>
          </draw:frame>
        </presentation:notes>
      </draw:page>
      <draw:page draw:name="Slide_2" draw:style-name="dp83" draw:master-page-name="_______5f__5f__5f_Standard2" presentation:presentation-page-layout-name="AL2">
        <draw:custom-shape xml:id="id333" draw:id="id333" draw:style-name="gr218" draw:transform="rotate(-37.037456069205426) translate(13.08cm,4.987cm)" svg:width="14.09cm" svg:height="4.776cm">
          <text:p text:style-name="P422"><text:span/></text:p>
          <draw:enhanced-geometry draw:type="flowchart-terminator"/>
        </draw:custom-shape>
        <draw:custom-shape xml:id="id334" draw:id="id334" draw:style-name="gr219" draw:transform="rotate(-37.037456069205426) translate(20.53cm,5.726cm)" svg:width="12.69cm" svg:height="3.142cm">
          <text:p text:style-name="P423"><text:span/></text:p>
          <draw:enhanced-geometry draw:type="flowchart-terminator"/>
        </draw:custom-shape>
        <draw:custom-shape xml:id="id335" draw:id="id335" draw:style-name="gr220" draw:transform="rotate(-40.153218431642124) translate(21.87cm,7.894cm)" svg:width="3.766cm" svg:height="2.491cm">
          <text:p text:style-name="P424"><text:span/></text:p>
          <draw:enhanced-geometry draw:type="flowchart-terminator"/>
        </draw:custom-shape>
        <draw:custom-shape xml:id="id336" draw:id="id336" draw:style-name="gr221" draw:transform="rotate(-37.037456069205426) translate(22.83cm,8.296cm)" svg:width="12.69cm" svg:height="3.126cm">
          <text:p text:style-name="P425"><text:span/></text:p>
          <draw:enhanced-geometry draw:type="flowchart-terminator"/>
        </draw:custom-shape>
        <draw:custom-shape xml:id="id337" draw:id="id337" draw:style-name="gr222" draw:transform="rotate(-37.037456069205426) translate(8.952cm,4.386cm)" svg:width="12.69cm" svg:height="2.287cm">
          <text:p text:style-name="P426"><text:span/></text:p>
          <draw:enhanced-geometry draw:type="flowchart-terminator"/>
        </draw:custom-shape>
        <draw:custom-shape xml:id="id338" draw:id="id338" draw:style-name="gr223" draw:transform="rotate(-37.201343067744105) translate(20.53cm,10.43cm)" svg:width="3.088cm" svg:height="2.003cm">
          <text:p text:style-name="P427"><text:span/></text:p>
          <draw:enhanced-geometry draw:type="flowchart-connector"/>
        </draw:custom-shape>
        <draw:frame xml:id="id339" draw:id="id339" draw:style-name="gr224" svg:width="10.18cm" svg:height="2.626cm" svg:x="1.495cm" svg:y="6.298cm">
          <draw:text-box fo:min-height="2.626cm">
            <text:p text:style-name="P428"><text:span text:style-name="T164">RÉSULTAT ET DÉMONSTRATION</text:span></text:p>
          </draw:text-box>
        </draw:frame>
        <draw:frame xml:id="id340" draw:id="id340" draw:style-name="gr225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339" smil:attributeName="visibility" smil:fill="hold" smil:to="visible"/>
                  <anim:animate smil:dur="1s" smil:targetElement="id339" smil:attributeName="width" smil:values="0;width" smil:keyTimes="0;1"/>
                  <anim:animate smil:dur="1s" smil:targetElement="id339" smil:attributeName="height" smil:values="0;height" smil:keyTimes="0;1"/>
                  <anim:animate smil:dur="1s" smil:targetElement="id339" smil:attributeName="rotate" smil:values="90;0" smil:keyTimes="0;1"/>
                  <anim:transitionFilter smil:dur="1s" smil:targetElement="id339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338" smil:attributeName="visibility" smil:fill="hold" smil:to="visible"/>
                  <anim:animate smil:dur="1s" smil:targetElement="id338" smil:attributeName="width" smil:values="0;width" smil:keyTimes="0;1"/>
                  <anim:animate smil:dur="1s" smil:targetElement="id338" smil:attributeName="height" smil:values="0;height" smil:keyTimes="0;1"/>
                  <anim:animate smil:dur="1s" smil:targetElement="id338" smil:attributeName="rotate" smil:values="90;0" smil:keyTimes="0;1"/>
                  <anim:transitionFilter smil:dur="1s" smil:targetElement="id338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337" smil:attributeName="visibility" smil:fill="hold" smil:to="visible"/>
                  <anim:animate smil:dur="1s" smil:targetElement="id337" smil:attributeName="width" smil:values="0;width" smil:keyTimes="0;1"/>
                  <anim:animate smil:dur="1s" smil:targetElement="id337" smil:attributeName="height" smil:values="0;height" smil:keyTimes="0;1"/>
                  <anim:animate smil:dur="1s" smil:targetElement="id337" smil:attributeName="rotate" smil:values="90;0" smil:keyTimes="0;1"/>
                  <anim:transitionFilter smil:dur="1s" smil:targetElement="id337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336" smil:attributeName="visibility" smil:fill="hold" smil:to="visible"/>
                  <anim:animate smil:dur="1s" smil:targetElement="id336" smil:attributeName="width" smil:values="0;width" smil:keyTimes="0;1"/>
                  <anim:animate smil:dur="1s" smil:targetElement="id336" smil:attributeName="height" smil:values="0;height" smil:keyTimes="0;1"/>
                  <anim:animate smil:dur="1s" smil:targetElement="id336" smil:attributeName="rotate" smil:values="90;0" smil:keyTimes="0;1"/>
                  <anim:transitionFilter smil:dur="1s" smil:targetElement="id336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335" smil:attributeName="visibility" smil:fill="hold" smil:to="visible"/>
                  <anim:animate smil:dur="1s" smil:targetElement="id335" smil:attributeName="width" smil:values="0;width" smil:keyTimes="0;1"/>
                  <anim:animate smil:dur="1s" smil:targetElement="id335" smil:attributeName="height" smil:values="0;height" smil:keyTimes="0;1"/>
                  <anim:animate smil:dur="1s" smil:targetElement="id335" smil:attributeName="rotate" smil:values="90;0" smil:keyTimes="0;1"/>
                  <anim:transitionFilter smil:dur="1s" smil:targetElement="id335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334" smil:attributeName="visibility" smil:fill="hold" smil:to="visible"/>
                  <anim:animate smil:dur="1s" smil:targetElement="id334" smil:attributeName="width" smil:values="0;width" smil:keyTimes="0;1"/>
                  <anim:animate smil:dur="1s" smil:targetElement="id334" smil:attributeName="height" smil:values="0;height" smil:keyTimes="0;1"/>
                  <anim:animate smil:dur="1s" smil:targetElement="id334" smil:attributeName="rotate" smil:values="90;0" smil:keyTimes="0;1"/>
                  <anim:transitionFilter smil:dur="1s" smil:targetElement="id334" smil:subtype="crossfade" smil:type="fade" smil:mode="in"/>
                </anim:par>
                <anim:par presentation:node-type="with-previous" smil:begin="0s" smil:fill="hold" presentation:preset-class="entrance" presentation:preset-id="ooo-entrance-turn-and-grow" presentation:preset-sub-type="0">
                  <anim:set smil:dur="0.001s" smil:begin="0s" smil:targetElement="id333" smil:attributeName="visibility" smil:fill="hold" smil:to="visible"/>
                  <anim:animate smil:dur="1s" smil:targetElement="id333" smil:attributeName="width" smil:values="0;width" smil:keyTimes="0;1"/>
                  <anim:animate smil:dur="1s" smil:targetElement="id333" smil:attributeName="height" smil:values="0;height" smil:keyTimes="0;1"/>
                  <anim:animate smil:dur="1s" smil:targetElement="id333" smil:attributeName="rotate" smil:values="90;0" smil:keyTimes="0;1"/>
                  <anim:transitionFilter smil:dur="1s" smil:targetElement="id333" smil:subtype="crossfade" smil:type="fade" smil:mode="in"/>
                </anim:par>
              </anim:par>
            </anim:par>
          </anim:seq>
        </anim:par>
        <presentation:notes draw:style-name="dp84">
          <draw:frame xml:id="id341" draw:id="id341" draw:name="Slide Image Placeholder 1" draw:text-style-name="P429" draw:layer="layout" presentation:style-name="pr117" presentation:class="title" presentation:placeholder="true" svg:width="0.035cm" svg:height="0.937cm" svg:x="0cm" svg:y="0cm">
            <draw:text-box fo:min-height="0.937cm">
              <text:p text:style-name="P430"><text:span/></text:p>
            </draw:text-box>
          </draw:frame>
          <draw:frame xml:id="id342" draw:id="id342" draw:name="Notes Placeholder 2" draw:text-style-name="P431" draw:layer="layout" presentation:style-name="pr118" presentation:class="outline" presentation:placeholder="true" svg:width="0.035cm" svg:height="0.937cm" svg:x="0cm" svg:y="0cm">
            <draw:text-box fo:min-height="0.937cm">
              <text:p text:style-name="P432"><text:span/></text:p>
            </draw:text-box>
          </draw:frame>
          <draw:frame xml:id="id343" draw:id="id343" draw:name="Slide Number Placeholder 3" draw:text-style-name="P433" draw:layer="layout" presentation:style-name="pr119" presentation:class="page-number" presentation:placeholder="true" svg:width="0.035cm" svg:height="0.543cm" svg:x="0cm" svg:y="0cm">
            <draw:text-box fo:min-height="0.543cm">
              <text:p text:style-name="P434"><text:span text:style-name="T165"><text:page-number>&lt;numéro&gt;</text:page-number></text:span></text:p>
            </draw:text-box>
          </draw:frame>
        </presentation:notes>
      </draw:page>
      <draw:page draw:name="Slide_2" draw:style-name="dp85" draw:master-page-name="_______5f__5f__5f_Standard2" presentation:presentation-page-layout-name="AL2">
        <draw:frame xml:id="id344" draw:id="id344" draw:style-name="gr226" svg:width="18.37cm" svg:height="1.017cm" svg:x="1.01cm" svg:y="0.552cm">
          <draw:text-box fo:min-height="1.017cm">
            <text:p text:style-name="P435"><text:span text:style-name="T166">RESULTAT ET DÉMONSTRATION</text:span></text:p>
          </draw:text-box>
        </draw:frame>
        <draw:frame xml:id="id345" draw:id="id345" draw:style-name="gr227" svg:width="16.35cm" svg:height="10.69cm" svg:x="0cm" svg:y="2.046cm">
          <draw:image xlink:href="Pictures/image50.png" xlink:type="simple" xlink:show="embed" xlink:actuate="onLoad"/>
        </draw:frame>
        <draw:frame xml:id="id346" draw:id="id346" draw:style-name="gr228" svg:width="13.7cm" svg:height="6.013cm" svg:x="14.48cm" svg:y="2.99cm">
          <draw:text-box fo:min-height="6.013cm">
            <text:list text:style-name="L311" text:continue-numbering="true">
              <text:list-item>
                <text:p text:style-name="P436"><text:span text:style-name="T167">INFRASTRUCTURE DÉPLOYÉE</text:span></text:p>
              </text:list-item>
            </text:list>
            <text:p text:style-name="P437"><text:span/></text:p>
            <text:list text:style-name="L312" text:continue-numbering="true">
              <text:list-item>
                <text:p text:style-name="P438"><text:span text:style-name="T168">PIPELINE CI/CD COMPLET</text:span></text:p>
              </text:list-item>
            </text:list>
            <text:p text:style-name="P439"><text:span/></text:p>
            <text:list text:style-name="L313" text:continue-numbering="true">
              <text:list-item>
                <text:p text:style-name="P440"><text:span text:style-name="T169">MONITOING EN TEMPS RÉEL</text:span></text:p>
              </text:list-item>
            </text:list>
            <text:p text:style-name="P441"><text:span/></text:p>
            <text:list text:style-name="L314" text:continue-numbering="true">
              <text:list-item>
                <text:p text:style-name="P442"><text:span text:style-name="T170">SECURITÉ IMPLEMENTÉE</text:span></text:p>
              </text:list-item>
            </text:list>
            <text:p text:style-name="P443"><text:span/></text:p>
            <text:list text:style-name="L315" text:continue-numbering="true">
              <text:list-item>
                <text:p text:style-name="P444"><text:span text:style-name="T171">HAUTE DISPONIBILITÉ</text:span></text:p>
              </text:list-item>
            </text:list>
            <text:p text:style-name="P445"><text:span/></text:p>
          </draw:text-box>
        </draw:frame>
        <draw:frame xml:id="id347" draw:id="id347" draw:style-name="gr229" svg:width="2.136cm" svg:height="2.851cm" svg:x="0.2158cm" svg:y="13.51cm">
          <draw:image xlink:href="Pictures/image3.png" xlink:type="simple" xlink:show="embed" xlink:actuate="onLoad"/>
        </draw:frame>
        <presentation:notes draw:style-name="dp86">
          <draw:frame xml:id="id348" draw:id="id348" draw:name="Slide Image Placeholder 1" draw:text-style-name="P446" draw:layer="layout" presentation:style-name="pr120" presentation:class="title" presentation:placeholder="true" svg:width="0.035cm" svg:height="0.937cm" svg:x="0cm" svg:y="0cm">
            <draw:text-box fo:min-height="0.937cm">
              <text:p text:style-name="P447"><text:span/></text:p>
            </draw:text-box>
          </draw:frame>
          <draw:frame xml:id="id349" draw:id="id349" draw:name="Notes Placeholder 2" draw:text-style-name="P448" draw:layer="layout" presentation:style-name="pr121" presentation:class="outline" presentation:placeholder="true" svg:width="0.035cm" svg:height="0.937cm" svg:x="0cm" svg:y="0cm">
            <draw:text-box fo:min-height="0.937cm">
              <text:p text:style-name="P449"><text:span/></text:p>
            </draw:text-box>
          </draw:frame>
          <draw:frame xml:id="id350" draw:id="id350" draw:name="Slide Number Placeholder 3" draw:text-style-name="P450" draw:layer="layout" presentation:style-name="pr122" presentation:class="page-number" presentation:placeholder="true" svg:width="0.035cm" svg:height="0.543cm" svg:x="0cm" svg:y="0cm">
            <draw:text-box fo:min-height="0.543cm">
              <text:p text:style-name="P451"><text:span text:style-name="T172"><text:page-number>&lt;numéro&gt;</text:page-number></text:span></text:p>
            </draw:text-box>
          </draw:frame>
        </presentation:notes>
      </draw:page>
      <draw:page draw:name="Slide_2" draw:style-name="dp87" draw:master-page-name="_______5f__5f__5f_Standard2" presentation:presentation-page-layout-name="AL2">
        <draw:custom-shape xml:id="id351" draw:id="id351" draw:style-name="gr230" draw:transform="rotate(-37.037456069205426) translate(13.08cm,4.987cm)" svg:width="14.09cm" svg:height="4.776cm">
          <text:p text:style-name="P452"><text:span/></text:p>
          <draw:enhanced-geometry draw:type="flowchart-terminator"/>
        </draw:custom-shape>
        <draw:custom-shape xml:id="id352" draw:id="id352" draw:style-name="gr231" draw:transform="rotate(-37.037456069205426) translate(20.53cm,5.726cm)" svg:width="12.69cm" svg:height="3.142cm">
          <text:p text:style-name="P453"><text:span/></text:p>
          <draw:enhanced-geometry draw:type="flowchart-terminator"/>
        </draw:custom-shape>
        <draw:custom-shape xml:id="id353" draw:id="id353" draw:style-name="gr232" draw:transform="rotate(-40.153218431642124) translate(21.87cm,7.894cm)" svg:width="3.766cm" svg:height="2.491cm">
          <text:p text:style-name="P454"><text:span/></text:p>
          <draw:enhanced-geometry draw:type="flowchart-terminator"/>
        </draw:custom-shape>
        <draw:custom-shape xml:id="id354" draw:id="id354" draw:style-name="gr233" draw:transform="rotate(-37.037456069205426) translate(22.83cm,8.296cm)" svg:width="12.69cm" svg:height="3.126cm">
          <text:p text:style-name="P455"><text:span/></text:p>
          <draw:enhanced-geometry draw:type="flowchart-terminator"/>
        </draw:custom-shape>
        <draw:custom-shape xml:id="id355" draw:id="id355" draw:style-name="gr234" draw:transform="rotate(-37.037456069205426) translate(8.952cm,4.386cm)" svg:width="12.69cm" svg:height="2.287cm">
          <text:p text:style-name="P456"><text:span/></text:p>
          <draw:enhanced-geometry draw:type="flowchart-terminator"/>
        </draw:custom-shape>
        <draw:custom-shape xml:id="id356" draw:id="id356" draw:style-name="gr235" draw:transform="rotate(-37.201343067744105) translate(20.53cm,10.43cm)" svg:width="3.088cm" svg:height="2.003cm">
          <text:p text:style-name="P457"><text:span/></text:p>
          <draw:enhanced-geometry draw:type="flowchart-connector"/>
        </draw:custom-shape>
        <draw:frame xml:id="id357" draw:id="id357" draw:style-name="gr236" svg:width="9.036cm" svg:height="1.44cm" svg:x="1.495cm" svg:y="6.298cm">
          <draw:text-box fo:min-height="1.44cm">
            <text:p text:style-name="P458"><text:span text:style-name="T173">CONCLUSION</text:span></text:p>
          </draw:text-box>
        </draw:frame>
        <draw:frame xml:id="id358" draw:id="id358" draw:style-name="gr237" svg:width="9.857cm" svg:height="7.545cm" svg:x="0.5cm" svg:y="8.755cm">
          <draw:image xlink:href="Pictures/image52.png" xlink:type="simple" xlink:show="embed" xlink:actuate="onLoad"/>
        </draw:frame>
        <draw:frame xml:id="id359" draw:id="id359" draw:style-name="gr238" svg:width="2.136cm" svg:height="2.851cm" svg:x="0.2158cm" svg:y="13.51cm">
          <draw:image xlink:href="Pictures/image3.png" xlink:type="simple" xlink:show="embed" xlink:actuate="onLoad"/>
        </draw:frame>
        <anim:par smil:restart="never" smil:dur="indefinite" presentation:node-type="timing-root" smil:fill="hold">
          <anim:seq smil:dur="indefinite" presentation:node-type="main-sequence">
            <anim:par smil:begin="0s" smil:fill="hold">
              <anim:par smil:begin="0s" smil:fill="hold">
                <anim:par presentation:node-type="with-previous" smil:begin="0s" smil:fill="hold" presentation:preset-class="emphasis" presentation:preset-id="ooo-emphasis-flash-bulb" presentation:preset-sub-type="0">
                  <anim:transitionFilter smil:dur="0.5s" smil:targetElement="id358" smil:subtype="crossfade" smil:type="fade" smil:mode="out"/>
                  <anim:animateTransform smil:dur="0.25s" smil:begin="0s" smil:targetElement="id358" smil:attributeName="transform" smil:fill="hold" smil:autoReverse="true" smil:by="0.05,0.05" svg:type="scale"/>
                </anim:par>
                <anim:par presentation:node-type="with-previous" smil:begin="0s" smil:fill="hold" presentation:preset-class="emphasis" presentation:preset-id="ooo-emphasis-flash-bulb" presentation:preset-sub-type="0">
                  <anim:transitionFilter smil:dur="0.5s" smil:targetElement="id357" smil:subtype="crossfade" smil:type="fade" smil:mode="out"/>
                  <anim:animateTransform smil:dur="0.25s" smil:begin="0s" smil:targetElement="id357" smil:attributeName="transform" smil:fill="hold" smil:autoReverse="true" smil:by="0.05,0.05" svg:type="scale"/>
                </anim:par>
                <anim:par presentation:node-type="with-previous" smil:begin="0s" smil:fill="hold" presentation:preset-class="emphasis" presentation:preset-id="ooo-emphasis-flash-bulb" presentation:preset-sub-type="0">
                  <anim:transitionFilter smil:dur="0.5s" smil:targetElement="id356" smil:subtype="crossfade" smil:type="fade" smil:mode="out"/>
                  <anim:animateTransform smil:dur="0.25s" smil:begin="0s" smil:targetElement="id356" smil:attributeName="transform" smil:fill="hold" smil:autoReverse="true" smil:by="0.05,0.05" svg:type="scale"/>
                </anim:par>
                <anim:par presentation:node-type="with-previous" smil:begin="0s" smil:fill="hold" presentation:preset-class="emphasis" presentation:preset-id="ooo-emphasis-flash-bulb" presentation:preset-sub-type="0">
                  <anim:transitionFilter smil:dur="0.5s" smil:targetElement="id355" smil:subtype="crossfade" smil:type="fade" smil:mode="out"/>
                  <anim:animateTransform smil:dur="0.25s" smil:begin="0s" smil:targetElement="id355" smil:attributeName="transform" smil:fill="hold" smil:autoReverse="true" smil:by="0.05,0.05" svg:type="scale"/>
                </anim:par>
                <anim:par presentation:node-type="with-previous" smil:begin="0s" smil:fill="hold" presentation:preset-class="emphasis" presentation:preset-id="ooo-emphasis-flash-bulb" presentation:preset-sub-type="0">
                  <anim:transitionFilter smil:dur="0.5s" smil:targetElement="id354" smil:subtype="crossfade" smil:type="fade" smil:mode="out"/>
                  <anim:animateTransform smil:dur="0.25s" smil:begin="0s" smil:targetElement="id354" smil:attributeName="transform" smil:fill="hold" smil:autoReverse="true" smil:by="0.05,0.05" svg:type="scale"/>
                </anim:par>
                <anim:par presentation:node-type="with-previous" smil:begin="0s" smil:fill="hold" presentation:preset-class="emphasis" presentation:preset-id="ooo-emphasis-flash-bulb" presentation:preset-sub-type="0">
                  <anim:transitionFilter smil:dur="0.5s" smil:targetElement="id353" smil:subtype="crossfade" smil:type="fade" smil:mode="out"/>
                  <anim:animateTransform smil:dur="0.25s" smil:begin="0s" smil:targetElement="id353" smil:attributeName="transform" smil:fill="hold" smil:autoReverse="true" smil:by="0.05,0.05" svg:type="scale"/>
                </anim:par>
                <anim:par presentation:node-type="with-previous" smil:begin="0s" smil:fill="hold" presentation:preset-class="emphasis" presentation:preset-id="ooo-emphasis-flash-bulb" presentation:preset-sub-type="0">
                  <anim:transitionFilter smil:dur="0.5s" smil:targetElement="id352" smil:subtype="crossfade" smil:type="fade" smil:mode="out"/>
                  <anim:animateTransform smil:dur="0.25s" smil:begin="0s" smil:targetElement="id352" smil:attributeName="transform" smil:fill="hold" smil:autoReverse="true" smil:by="0.05,0.05" svg:type="scale"/>
                </anim:par>
                <anim:par presentation:node-type="with-previous" smil:begin="0s" smil:fill="hold" presentation:preset-class="emphasis" presentation:preset-id="ooo-emphasis-flash-bulb" presentation:preset-sub-type="0">
                  <anim:transitionFilter smil:dur="0.5s" smil:targetElement="id351" smil:subtype="crossfade" smil:type="fade" smil:mode="out"/>
                  <anim:animateTransform smil:dur="0.25s" smil:begin="0s" smil:targetElement="id351" smil:attributeName="transform" smil:fill="hold" smil:autoReverse="true" smil:by="0.05,0.05" svg:type="scale"/>
                </anim:par>
              </anim:par>
            </anim:par>
          </anim:seq>
        </anim:par>
        <presentation:notes draw:style-name="dp88">
          <draw:frame xml:id="id360" draw:id="id360" draw:name="Slide Image Placeholder 1" draw:text-style-name="P459" draw:layer="layout" presentation:style-name="pr123" presentation:class="title" presentation:placeholder="true" svg:width="0.035cm" svg:height="0.937cm" svg:x="0cm" svg:y="0cm">
            <draw:text-box fo:min-height="0.937cm">
              <text:p text:style-name="P460"><text:span/></text:p>
            </draw:text-box>
          </draw:frame>
          <draw:frame xml:id="id361" draw:id="id361" draw:name="Notes Placeholder 2" draw:text-style-name="P461" draw:layer="layout" presentation:style-name="pr124" presentation:class="outline" presentation:placeholder="true" svg:width="0.035cm" svg:height="0.937cm" svg:x="0cm" svg:y="0cm">
            <draw:text-box fo:min-height="0.937cm">
              <text:p text:style-name="P462"><text:span/></text:p>
            </draw:text-box>
          </draw:frame>
          <draw:frame xml:id="id362" draw:id="id362" draw:name="Slide Number Placeholder 3" draw:text-style-name="P463" draw:layer="layout" presentation:style-name="pr125" presentation:class="page-number" presentation:placeholder="true" svg:width="0.035cm" svg:height="0.543cm" svg:x="0cm" svg:y="0cm">
            <draw:text-box fo:min-height="0.543cm">
              <text:p text:style-name="P464"><text:span text:style-name="T174"><text:page-number>&lt;numéro&gt;</text:page-number>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fill-image draw:name="FillImage1" draw:display_name="UserFillImage1" xlink:href="Pictures/image4.jpg" xlink:type="simple" xlink:show="embed" xlink:actuate="onLoad"/>
    <draw:fill-image draw:name="FillImage2" draw:display_name="UserFillImage2" xlink:href="Pictures/image4.jpg" xlink:type="simple" xlink:show="embed" xlink:actuate="onLoad"/>
    <draw:fill-image draw:name="FillImage3" draw:display_name="UserFillImage3" xlink:href="Pictures/image4.jpg" xlink:type="simple" xlink:show="embed" xlink:actuate="onLoad"/>
    <draw:fill-image draw:name="FillImage4" draw:display_name="UserFillImage4" xlink:href="Pictures/image4.jpg" xlink:type="simple" xlink:show="embed" xlink:actuate="onLoad"/>
    <draw:fill-image draw:name="FillImage5" draw:display_name="UserFillImage5" xlink:href="Pictures/image4.jpg" xlink:type="simple" xlink:show="embed" xlink:actuate="onLoad"/>
    <draw:fill-image draw:name="FillImage6" draw:display_name="UserFillImage6" xlink:href="Pictures/image4.jpg" xlink:type="simple" xlink:show="embed" xlink:actuate="onLoad"/>
    <draw:fill-image draw:name="FillImage7" draw:display_name="UserFillImage7" xlink:href="Pictures/image7.jpg" xlink:type="simple" xlink:show="embed" xlink:actuate="onLoad"/>
    <draw:fill-image draw:name="FillImage8" draw:display_name="UserFillImage8" xlink:href="Pictures/image7.jpg" xlink:type="simple" xlink:show="embed" xlink:actuate="onLoad"/>
    <draw:fill-image draw:name="FillImage9" draw:display_name="UserFillImage9" xlink:href="Pictures/image7.jpg" xlink:type="simple" xlink:show="embed" xlink:actuate="onLoad"/>
    <draw:fill-image draw:name="FillImage10" draw:display_name="UserFillImage10" xlink:href="Pictures/image7.jpg" xlink:type="simple" xlink:show="embed" xlink:actuate="onLoad"/>
    <draw:fill-image draw:name="FillImage11" draw:display_name="UserFillImage11" xlink:href="Pictures/image7.jpg" xlink:type="simple" xlink:show="embed" xlink:actuate="onLoad"/>
    <draw:fill-image draw:name="FillImage12" draw:display_name="UserFillImage12" xlink:href="Pictures/image7.jpg" xlink:type="simple" xlink:show="embed" xlink:actuate="onLoad"/>
    <draw:fill-image draw:name="FillImage13" draw:display_name="UserFillImage13" xlink:href="Pictures/image14.jpg" xlink:type="simple" xlink:show="embed" xlink:actuate="onLoad"/>
    <draw:fill-image draw:name="FillImage14" draw:display_name="UserFillImage14" xlink:href="Pictures/image14.jpg" xlink:type="simple" xlink:show="embed" xlink:actuate="onLoad"/>
    <draw:fill-image draw:name="FillImage15" draw:display_name="UserFillImage15" xlink:href="Pictures/image14.jpg" xlink:type="simple" xlink:show="embed" xlink:actuate="onLoad"/>
    <draw:fill-image draw:name="FillImage16" draw:display_name="UserFillImage16" xlink:href="Pictures/image14.jpg" xlink:type="simple" xlink:show="embed" xlink:actuate="onLoad"/>
    <draw:fill-image draw:name="FillImage17" draw:display_name="UserFillImage17" xlink:href="Pictures/image14.jpg" xlink:type="simple" xlink:show="embed" xlink:actuate="onLoad"/>
    <draw:fill-image draw:name="FillImage18" draw:display_name="UserFillImage18" xlink:href="Pictures/image14.jpg" xlink:type="simple" xlink:show="embed" xlink:actuate="onLoad"/>
    <draw:fill-image draw:name="FillImage19" draw:display_name="UserFillImage19" xlink:href="Pictures/image20.jpg" xlink:type="simple" xlink:show="embed" xlink:actuate="onLoad"/>
    <draw:fill-image draw:name="FillImage20" draw:display_name="UserFillImage20" xlink:href="Pictures/image20.jpg" xlink:type="simple" xlink:show="embed" xlink:actuate="onLoad"/>
    <draw:fill-image draw:name="FillImage21" draw:display_name="UserFillImage21" xlink:href="Pictures/image20.jpg" xlink:type="simple" xlink:show="embed" xlink:actuate="onLoad"/>
    <draw:fill-image draw:name="FillImage22" draw:display_name="UserFillImage22" xlink:href="Pictures/image20.jpg" xlink:type="simple" xlink:show="embed" xlink:actuate="onLoad"/>
    <draw:fill-image draw:name="FillImage23" draw:display_name="UserFillImage23" xlink:href="Pictures/image20.jpg" xlink:type="simple" xlink:show="embed" xlink:actuate="onLoad"/>
    <draw:fill-image draw:name="FillImage24" draw:display_name="UserFillImage24" xlink:href="Pictures/image20.jpg" xlink:type="simple" xlink:show="embed" xlink:actuate="onLoad"/>
    <draw:fill-image draw:name="FillImage25" draw:display_name="UserFillImage25" xlink:href="Pictures/image34.jpg" xlink:type="simple" xlink:show="embed" xlink:actuate="onLoad"/>
    <draw:fill-image draw:name="FillImage26" draw:display_name="UserFillImage26" xlink:href="Pictures/image34.jpg" xlink:type="simple" xlink:show="embed" xlink:actuate="onLoad"/>
    <draw:fill-image draw:name="FillImage27" draw:display_name="UserFillImage27" xlink:href="Pictures/image34.jpg" xlink:type="simple" xlink:show="embed" xlink:actuate="onLoad"/>
    <draw:fill-image draw:name="FillImage28" draw:display_name="UserFillImage28" xlink:href="Pictures/image34.jpg" xlink:type="simple" xlink:show="embed" xlink:actuate="onLoad"/>
    <draw:fill-image draw:name="FillImage29" draw:display_name="UserFillImage29" xlink:href="Pictures/image34.jpg" xlink:type="simple" xlink:show="embed" xlink:actuate="onLoad"/>
    <draw:fill-image draw:name="FillImage30" draw:display_name="UserFillImage30" xlink:href="Pictures/image34.jpg" xlink:type="simple" xlink:show="embed" xlink:actuate="onLoad"/>
    <draw:fill-image draw:name="FillImage31" draw:display_name="UserFillImage31" xlink:href="Pictures/image43.jpg" xlink:type="simple" xlink:show="embed" xlink:actuate="onLoad"/>
    <draw:fill-image draw:name="FillImage32" draw:display_name="UserFillImage32" xlink:href="Pictures/image43.jpg" xlink:type="simple" xlink:show="embed" xlink:actuate="onLoad"/>
    <draw:fill-image draw:name="FillImage33" draw:display_name="UserFillImage33" xlink:href="Pictures/image43.jpg" xlink:type="simple" xlink:show="embed" xlink:actuate="onLoad"/>
    <draw:fill-image draw:name="FillImage34" draw:display_name="UserFillImage34" xlink:href="Pictures/image43.jpg" xlink:type="simple" xlink:show="embed" xlink:actuate="onLoad"/>
    <draw:fill-image draw:name="FillImage35" draw:display_name="UserFillImage35" xlink:href="Pictures/image43.jpg" xlink:type="simple" xlink:show="embed" xlink:actuate="onLoad"/>
    <draw:fill-image draw:name="FillImage36" draw:display_name="UserFillImage36" xlink:href="Pictures/image43.jpg" xlink:type="simple" xlink:show="embed" xlink:actuate="onLoad"/>
    <draw:fill-image draw:name="FillImage37" draw:display_name="UserFillImage37" xlink:href="Pictures/image45.jpg" xlink:type="simple" xlink:show="embed" xlink:actuate="onLoad"/>
    <draw:fill-image draw:name="FillImage38" draw:display_name="UserFillImage38" xlink:href="Pictures/image45.jpg" xlink:type="simple" xlink:show="embed" xlink:actuate="onLoad"/>
    <draw:fill-image draw:name="FillImage39" draw:display_name="UserFillImage39" xlink:href="Pictures/image45.jpg" xlink:type="simple" xlink:show="embed" xlink:actuate="onLoad"/>
    <draw:fill-image draw:name="FillImage40" draw:display_name="UserFillImage40" xlink:href="Pictures/image45.jpg" xlink:type="simple" xlink:show="embed" xlink:actuate="onLoad"/>
    <draw:fill-image draw:name="FillImage41" draw:display_name="UserFillImage41" xlink:href="Pictures/image45.jpg" xlink:type="simple" xlink:show="embed" xlink:actuate="onLoad"/>
    <draw:fill-image draw:name="FillImage42" draw:display_name="UserFillImage42" xlink:href="Pictures/image45.jpg" xlink:type="simple" xlink:show="embed" xlink:actuate="onLoad"/>
    <draw:fill-image draw:name="FillImage43" draw:display_name="UserFillImage43" xlink:href="Pictures/image49.jpg" xlink:type="simple" xlink:show="embed" xlink:actuate="onLoad"/>
    <draw:fill-image draw:name="FillImage44" draw:display_name="UserFillImage44" xlink:href="Pictures/image49.jpg" xlink:type="simple" xlink:show="embed" xlink:actuate="onLoad"/>
    <draw:fill-image draw:name="FillImage45" draw:display_name="UserFillImage45" xlink:href="Pictures/image49.jpg" xlink:type="simple" xlink:show="embed" xlink:actuate="onLoad"/>
    <draw:fill-image draw:name="FillImage46" draw:display_name="UserFillImage46" xlink:href="Pictures/image49.jpg" xlink:type="simple" xlink:show="embed" xlink:actuate="onLoad"/>
    <draw:fill-image draw:name="FillImage47" draw:display_name="UserFillImage47" xlink:href="Pictures/image49.jpg" xlink:type="simple" xlink:show="embed" xlink:actuate="onLoad"/>
    <draw:fill-image draw:name="FillImage48" draw:display_name="UserFillImage48" xlink:href="Pictures/image49.jpg" xlink:type="simple" xlink:show="embed" xlink:actuate="onLoad"/>
    <draw:fill-image draw:name="FillImage49" draw:display_name="UserFillImage49" xlink:href="Pictures/image51.jpg" xlink:type="simple" xlink:show="embed" xlink:actuate="onLoad"/>
    <draw:fill-image draw:name="FillImage50" draw:display_name="UserFillImage50" xlink:href="Pictures/image51.jpg" xlink:type="simple" xlink:show="embed" xlink:actuate="onLoad"/>
    <draw:fill-image draw:name="FillImage51" draw:display_name="UserFillImage51" xlink:href="Pictures/image51.jpg" xlink:type="simple" xlink:show="embed" xlink:actuate="onLoad"/>
    <draw:fill-image draw:name="FillImage52" draw:display_name="UserFillImage52" xlink:href="Pictures/image51.jpg" xlink:type="simple" xlink:show="embed" xlink:actuate="onLoad"/>
    <draw:fill-image draw:name="FillImage53" draw:display_name="UserFillImage53" xlink:href="Pictures/image51.jpg" xlink:type="simple" xlink:show="embed" xlink:actuate="onLoad"/>
    <draw:fill-image draw:name="FillImage54" draw:display_name="UserFillImage54" xlink:href="Pictures/image51.jpg" xlink:type="simple" xlink:show="embed" xlink:actuate="onLoad"/>
    <style:presentation-page-layout style:name="AL1">
      <presentation:placeholder presentation:object="title" svg:height="3.507cm" svg:width="23.91cm" svg:x="2.058cm" svg:y="1.743cm" draw:text-style-name="P1"/>
      <presentation:placeholder presentation:object="outline" svg:height="13.23cm" svg:width="23.91cm" svg:x="2.058cm" svg:y="5.838cm" draw:text-style-name="P2"/>
    </style:presentation-page-layout>
    <style:presentation-page-layout style:name="AL2">
      <presentation:placeholder presentation:object="title" svg:height="3.507cm" svg:width="23.91cm" svg:x="2.058cm" svg:y="1.743cm" draw:text-style-name="P3"/>
      <presentation:placeholder presentation:object="outline" svg:height="13.23cm" svg:width="23.91cm" svg:x="2.058cm" svg:y="5.838cm" draw:text-style-name="P4"/>
    </style:presentation-page-layout>
    <style:style style:family="graphic" style:name="Frame">
      <style:graphic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</office:styles>
  <office:automatic-styles>
    <style:page-layout style:name="Mpm1">
      <style:page-layout-properties fo:page-width="28cm" fo:page-height="15.75cm"/>
    </style:page-layout>
    <style:page-layout style:name="Mpm2">
      <style:page-layout-properties fo:page-width="19.05cm" fo:page-height="25.4cm"/>
    </style:page-layout>
    <style:page-layout style:name="Mpm3">
      <style:page-layout-properties fo:page-width="28cm" fo:page-height="15.75cm"/>
    </style:page-layout>
    <style:page-layout style:name="Mpm4">
      <style:page-layout-properties fo:page-width="19.05cm" fo:page-height="25.4cm"/>
    </style:page-layout>
    <style:style style:family="drawing-page" style:name="dp1">
      <style:drawing-page-properties/>
    </style:style>
    <style:style style:family="paragraph" style:name="P1">
      <style:paragraph-properties/>
      <style:text-properties/>
    </style:style>
    <style:style style:family="paragraph" style:name="P2">
      <style:paragraph-properties/>
      <style:text-properties/>
    </style:style>
    <style:style style:family="drawing-page" style:name="dp2">
      <style:drawing-page-properties/>
    </style:style>
    <style:style style:family="paragraph" style:name="P3">
      <style:paragraph-properties/>
      <style:text-properties/>
    </style:style>
    <style:style style:family="paragraph" style:name="P4">
      <style:paragraph-properties/>
      <style:text-properties/>
    </style:style>
    <style:style style:family="drawing-page" style:name="dp3">
      <style:drawing-page-properties draw:fill="none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5">
      <style:paragraph-properties/>
      <style:text-properties/>
    </style:style>
    <style:style style:family="paragraph" style:name="P6">
      <style:paragraph-properties/>
      <style:text-properties/>
    </style:style>
    <style:style style:family="presentation" style:name="pr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">
      <style:paragraph-properties/>
      <style:text-properties/>
    </style:style>
    <style:style style:family="paragraph" style:name="P8">
      <style:paragraph-properties/>
      <style:text-properties/>
    </style:style>
    <style:style style:family="drawing-page" style:name="dp4">
      <style:drawing-page-properties/>
    </style:style>
    <style:style style:family="drawing-page" style:name="dp7">
      <style:drawing-page-properties draw:fill="none"/>
    </style:style>
    <style:style style:family="presentation" style:name="pr4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7">
      <style:paragraph-properties/>
      <style:text-properties/>
    </style:style>
    <style:style style:family="paragraph" style:name="P18">
      <style:paragraph-properties/>
      <style:text-properties/>
    </style:style>
    <style:style style:family="presentation" style:name="pr5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9">
      <style:paragraph-properties/>
      <style:text-properties/>
    </style:style>
    <style:style style:family="paragraph" style:name="P20">
      <style:paragraph-properties/>
      <style:text-properties/>
    </style:style>
    <style:style style:family="drawing-page" style:name="dp8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______5f__5f__5f_Standard" style:page-layout-name="Mpm1" draw:style-name="dp3">
      <presentation:notes draw:style-name="dp4" style:page-layout-name="Mpm2"/>
      <draw:frame xml:id="id1" draw:id="id1" draw:name="place_holder" draw:text-style-name="P5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6"><text:span/></text:p>
        </draw:text-box>
      </draw:frame>
      <draw:frame xml:id="id2" draw:id="id2" draw:name="place_holder" draw:text-style-name="P7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8"><text:span/></text:p>
        </draw:text-box>
      </draw:frame>
    </style:master-page>
    <style:master-page style:name="_______5f__5f__5f_Standard2" style:page-layout-name="Mpm3" draw:style-name="dp7">
      <presentation:notes draw:style-name="dp8" style:page-layout-name="Mpm4"/>
      <draw:frame xml:id="id10" draw:id="id10" draw:name="place_holder" draw:text-style-name="P17" draw:layer="backgroundobjects" presentation:style-name="pr4" presentation:class="title" presentation:placeholder="false" presentation:user-transformed="true" svg:width="23.91cm" svg:height="3.507cm" svg:x="2.058cm" svg:y="1.743cm">
        <draw:text-box fo:min-height="3.507cm">
          <text:p text:style-name="P18"><text:span/></text:p>
        </draw:text-box>
      </draw:frame>
      <draw:frame xml:id="id11" draw:id="id11" draw:name="place_holder" draw:text-style-name="P19" draw:layer="backgroundobjects" presentation:style-name="pr5" presentation:class="outline" presentation:placeholder="false" presentation:user-transformed="true" svg:width="23.91cm" svg:height="13.23cm" svg:x="2.058cm" svg:y="5.838cm">
        <draw:text-box fo:min-height="13.23cm">
          <text:p text:style-name="P20"><text:span/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</office:meta>
</office:document-meta>
</file>